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asi todo sí, pero <text:span text:style-name="Strong_20_Emphasis">no al 100% todavía</text:span>.</text:p>
      <text:p text:style-name="Text_20_body">Persistente ya tienes:</text:p>
      <text:list text:style-name="L1">
        <text:list-item>
          <text:p text:style-name="P1">código en <text:span text:style-name="Source_20_Text">/opt/ai-lab</text:span> </text:p>
        </text:list-item>
        <text:list-item>
          <text:p text:style-name="P1">claves SSH </text:p>
        </text:list-item>
        <text:list-item>
          <text:p text:style-name="P1">Docker stacks </text:p>
        </text:list-item>
        <text:list-item>
          <text:p text:style-name="P1">wrappers <text:span text:style-name="Source_20_Text">opencode-ialab</text:span> y <text:span text:style-name="Source_20_Text">opencode-ialab-ui</text:span> </text:p>
        </text:list-item>
        <text:list-item>
          <text:p text:style-name="P1">router API <text:span text:style-name="Source_20_Text">router_api.py</text:span> </text:p>
        </text:list-item>
        <text:list-item>
          <text:p text:style-name="P1">config/contextos </text:p>
        </text:list-item>
        <text:list-item>
          <text:p text:style-name="P2">Git tag/checkpoint </text:p>
        </text:list-item>
      </text:list>
      <text:p text:style-name="Text_20_body">Lo que <text:span text:style-name="Strong_20_Emphasis">NO</text:span> es persistente aún si apagas/reinicias:</text:p>
      <text:list text:style-name="L2">
        <text:list-item>
          <text:p text:style-name="P3"><text:span text:style-name="Source_20_Text">uvicorn</text:span> del router en <text:span text:style-name="Source_20_Text">:8008</text:span>, salvo que lo lances a mano </text:p>
        </text:list-item>
        <text:list-item>
          <text:p text:style-name="P3"><text:span text:style-name="Source_20_Text">opencode-ialab-ui</text:span> en <text:span text:style-name="Source_20_Text">:4096</text:span>, salvo que lo lances a mano </text:p>
        </text:list-item>
        <text:list-item>
          <text:p text:style-name="P3">LM Studio debe estar abierto en las Gaming Stations </text:p>
        </text:list-item>
        <text:list-item>
          <text:p text:style-name="P3">los modelos deben estar cargados/disponibles </text:p>
        </text:list-item>
        <text:list-item>
          <text:p text:style-name="P4">Docker debería volver si los stacks tienen restart policy, pero habría que confirmarlo </text:p>
          <text:p text:style-name="P4"/>
        </text:list-item>
      </text:list>
      <text:p text:style-name="Text_20_body">Mañana, para levantarlo manualmente:</text:p>
      <text:section text:style-name="Sect1" text:name="code-block-viewer">
        <text:p text:style-name="P5"><text:span text:style-name="Source_20_Text">cd /opt/ai-lab</text:span></text:p>
        <text:p text:style-name="Preformatted_20_Text"><text:span text:style-name="Source_20_Text">source .venv/bin/activate</text:span></text:p>
        <text:p text:style-name="Preformatted_20_Text"><text:span text:style-name="Source_20_Text">export PYTHONPATH=/opt/ai-lab</text:span></text:p>
        <text:p text:style-name="P6"><text:span text:style-name="Source_20_Text">uvicorn runtime.llm.router_api:app --host 0.0.0.0 --port 8008</text:span></text:p>
      </text:section>
      <text:p text:style-name="Text_20_body">En otra terminal:</text:p>
      <text:section text:style-name="Sect1" text:name="Sección1">
        <text:p text:style-name="P7"><text:bookmark text:name="code-block-viewer"/><text:span text:style-name="Source_20_Text">opencode-ialab-ui</text:span></text:p>
      </text:section>
      <text:p text:style-name="Text_20_body">usuario: opencode</text:p>
      <text:p text:style-name="Text_20_body">contraseña: ailab</text:p>
      <text:p text:style-name="Text_20_body">Y comprobar:</text:p>
      <text:section text:style-name="Sect1" text:name="Sección2">
        <text:p text:style-name="P5"><text:bookmark text:name="code-block-viewer Copia 1"/><text:span text:style-name="Source_20_Text">curl http://192.168.1.30:8008/health</text:span></text:p>
        <text:p text:style-name="P6"><text:span text:style-name="Source_20_Text">curl http://192.168.1.30:8008/v1/models</text:span></text:p>
      </text:section>
      <text:p text:style-name="Text_20_body">Para dejarlo <text:span text:style-name="Strong_20_Emphasis">realmente persistente</text:span>, mañana hacemos dos servicios <text:span text:style-name="Source_20_Text">systemd</text:span>:</text:p>
      <text:section text:style-name="Sect1" text:name="Sección3">
        <text:p text:style-name="P5"><text:bookmark text:name="code-block-viewer Copia 2"/><text:span text:style-name="Source_20_Text">ai-lab-router.service</text:span></text:p>
        <text:p text:style-name="P6"><text:span text:style-name="Source_20_Text">opencode-ialab-ui.service</text:span></text:p>
      </text:section>
      <text:p text:style-name="Text_20_body">Así arrancan solos al boot.<text:line-break/>Ahora mismo: si apagas todo, mañana funcionará, pero tendrás que arrancar esos procesos manualm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02:15:30.103931600</meta:creation-date>
    <dc:date>2026-05-10T12:20:15.490908700</dc:date>
    <meta:editing-duration>PT17M51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32" meta:word-count="158" meta:character-count="1136" meta:non-whitespace-character-count="1012"/>
  </office:meta>
</office:document-meta>
</file>