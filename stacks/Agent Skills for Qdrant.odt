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193cm" table:align="left"/>
    </style:style>
    <style:style style:name="Tabla1.A" style:family="table-column">
      <style:table-column-properties style:column-width="1.819cm"/>
    </style:style>
    <style:style style:name="Tabla1.B" style:family="table-column">
      <style:table-column-properties style:column-width="7.375cm"/>
    </style:style>
    <style:style style:name="Tabla1.A1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555962"/>
    </style:style>
    <style:style style:name="Tabla1.A2" style:family="table-cell">
      <style:table-cell-properties style:vertical-align="middle" fo:padding="0cm" fo:border="none"/>
    </style:style>
    <style:style style:name="Tabla1.3" style:family="table-row">
      <style:table-row-properties fo:background-color="transparent">
        <style:background-image/>
      </style:table-row-properties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_top"/>Habilidades del agente</text:h>
      <text:p text:style-name="Text_20_body">Defina el comportamiento reutilizable mediante definiciones de SKILL.md</text:p>
      <text:p text:style-name="Text_20_body">Las habilidades del agente permiten a OpenCode descubrir instrucciones reutilizables de su repositorio o directorio de inicio. Las habilidades se cargan bajo demanda a través de la herramienta nativa <text:span text:style-name="Source_20_Text">skill</text:span>: los agentes ven las habilidades disponibles y pueden cargar el contenido completo cuando sea necesario.</text:p>
      <text:p text:style-name="Horizontal_20_Line"/>
      <text:h text:style-name="Heading_20_2" text:outline-level="2"><text:a xlink:type="simple" xlink:href="https://opencode.ai/docs/skills/#colocar-archivos" text:style-name="Internet_20_link" text:visited-style-name="Visited_20_Internet_20_Link"><text:bookmark text:name="colocar-archivos"/>Colocar archivos</text:a></text:h>
      <text:p text:style-name="Text_20_body">Cree una carpeta por nombre de habilidad y coloque un <text:span text:style-name="Source_20_Text">SKILL.md</text:span> dentro de ella. OpenCode busca estas ubicaciones:</text:p>
      <text:list text:style-name="L1">
        <text:list-item>
          <text:p text:style-name="P1">Configuración del proyecto: <text:span text:style-name="Source_20_Text">.opencode/skills/&lt;name&gt;/SKILL.md</text:span></text:p>
        </text:list-item>
        <text:list-item>
          <text:p text:style-name="P1">Configuración global: <text:span text:style-name="Source_20_Text">~/.config/opencode/skills/&lt;name&gt;/SKILL.md</text:span></text:p>
        </text:list-item>
        <text:list-item>
          <text:p text:style-name="P1">Compatible con Proyecto Claude: <text:span text:style-name="Source_20_Text">.claude/skills/&lt;name&gt;/SKILL.md</text:span></text:p>
        </text:list-item>
        <text:list-item>
          <text:p text:style-name="P1">Compatible con Claude global: <text:span text:style-name="Source_20_Text">~/.claude/skills/&lt;name&gt;/SKILL.md</text:span></text:p>
        </text:list-item>
        <text:list-item>
          <text:p text:style-name="P1">Compatible con agente de proyecto: <text:span text:style-name="Source_20_Text">.agents/skills/&lt;name&gt;/SKILL.md</text:span></text:p>
        </text:list-item>
        <text:list-item>
          <text:p text:style-name="P1">Compatible con agentes globales: <text:span text:style-name="Source_20_Text">~/.agents/skills/&lt;name&gt;/SKILL.md</text:span></text:p>
        </text:list-item>
      </text:list>
      <text:p text:style-name="Horizontal_20_Line"/>
      <text:h text:style-name="Heading_20_2" text:outline-level="2"><text:a xlink:type="simple" xlink:href="https://opencode.ai/docs/skills/#entender-el-descubrimiento" text:style-name="Internet_20_link" text:visited-style-name="Visited_20_Internet_20_Link"><text:bookmark text:name="entender-el-descubrimiento"/>Entender el descubrimiento</text:a></text:h>
      <text:p text:style-name="Text_20_body">Para las rutas locales del proyecto, OpenCode sube desde su directorio de trabajo actual hasta llegar al árbol de trabajo de git. Carga cualquier <text:span text:style-name="Source_20_Text">skills/*/SKILL.md</text:span> coincidente en <text:span text:style-name="Source_20_Text">.opencode/</text:span> y cualquier <text:span text:style-name="Source_20_Text">.claude/skills/*/SKILL.md</text:span> o <text:span text:style-name="Source_20_Text">.agents/skills/*/SKILL.md</text:span> coincidente a lo largo del camino.</text:p>
      <text:p text:style-name="Text_20_body">Las definiciones globales también se cargan desde <text:span text:style-name="Source_20_Text">~/.config/opencode/skills/*/SKILL.md</text:span>, <text:span text:style-name="Source_20_Text">~/.claude/skills/*/SKILL.md</text:span> y <text:span text:style-name="Source_20_Text">~/.agents/skills/*/SKILL.md</text:span>.</text:p>
      <text:p text:style-name="Horizontal_20_Line"/>
      <text:h text:style-name="Heading_20_2" text:outline-level="2"><text:a xlink:type="simple" xlink:href="https://opencode.ai/docs/skills/#escribir-la-introducción" text:style-name="Internet_20_link" text:visited-style-name="Visited_20_Internet_20_Link"><text:bookmark text:name="escribir-la-introducción"/>Escribir la introducción</text:a></text:h>
      <text:p text:style-name="Text_20_body">Cada <text:span text:style-name="Source_20_Text">SKILL.md</text:span> debe comenzar con el frontmatter de YAML. Sólo se reconocen estos campos:</text:p>
      <text:list text:style-name="L2">
        <text:list-item>
          <text:p text:style-name="P2"><text:span text:style-name="Source_20_Text">name</text:span> (obligatorio)</text:p>
        </text:list-item>
        <text:list-item>
          <text:p text:style-name="P2"><text:span text:style-name="Source_20_Text">description</text:span> (obligatorio)</text:p>
        </text:list-item>
        <text:list-item>
          <text:p text:style-name="P2"><text:span text:style-name="Source_20_Text">license</text:span> (opcional)</text:p>
        </text:list-item>
        <text:list-item>
          <text:p text:style-name="P2"><text:soft-page-break/><text:span text:style-name="Source_20_Text">compatibility</text:span> (opcional)</text:p>
        </text:list-item>
        <text:list-item>
          <text:p text:style-name="P2"><text:span text:style-name="Source_20_Text">metadata</text:span> (opcional, mapa de cadena a cadena)</text:p>
        </text:list-item>
      </text:list>
      <text:p text:style-name="Text_20_body">Los campos desconocidos se ignoran.</text:p>
      <text:p text:style-name="Horizontal_20_Line"/>
      <text:h text:style-name="Heading_20_2" text:outline-level="2"><text:a xlink:type="simple" xlink:href="https://opencode.ai/docs/skills/#validar-nombres" text:style-name="Internet_20_link" text:visited-style-name="Visited_20_Internet_20_Link"><text:bookmark text:name="validar-nombres"/>Validar nombres</text:a></text:h>
      <text:p text:style-name="Text_20_body"><text:span text:style-name="Source_20_Text">name</text:span> debe:</text:p>
      <text:list text:style-name="L3">
        <text:list-item>
          <text:p text:style-name="P3">Tener entre 1 y 64 caracteres.</text:p>
        </text:list-item>
        <text:list-item>
          <text:p text:style-name="P3">Ser alfanuméricos en minúsculas con separadores de guión simple</text:p>
        </text:list-item>
        <text:list-item>
          <text:p text:style-name="P3">No comienza ni termina con <text:span text:style-name="Source_20_Text">-</text:span></text:p>
        </text:list-item>
        <text:list-item>
          <text:p text:style-name="P3">No contener <text:span text:style-name="Source_20_Text">--</text:span> consecutivos</text:p>
        </text:list-item>
        <text:list-item>
          <text:p text:style-name="P3">Coincide con el nombre del directorio que contiene <text:span text:style-name="Source_20_Text">SKILL.md</text:span></text:p>
        </text:list-item>
      </text:list>
      <text:p text:style-name="Text_20_body">expresión regular equivalente:</text:p>
      <text:p text:style-name="Preformatted_20_Text"><text:span text:style-name="Source_20_Text">^[a-z0-9]+(-[a-z0-9]+)*$</text:span></text:p>
      <text:p text:style-name="Horizontal_20_Line"/>
      <text:h text:style-name="Heading_20_2" text:outline-level="2"><text:a xlink:type="simple" xlink:href="https://opencode.ai/docs/skills/#seguir-las-reglas-de-longitud" text:style-name="Internet_20_link" text:visited-style-name="Visited_20_Internet_20_Link"><text:bookmark text:name="seguir-las-reglas-de-longitud"/>Seguir las reglas de longitud</text:a></text:h>
      <text:p text:style-name="Text_20_body"><text:span text:style-name="Source_20_Text">description</text:span> debe tener entre 1 y 1024 caracteres. Manténgalo lo suficientemente específico para que el agente elija correctamente.</text:p>
      <text:p text:style-name="Horizontal_20_Line"/>
      <text:h text:style-name="Heading_20_2" text:outline-level="2"><text:a xlink:type="simple" xlink:href="https://opencode.ai/docs/skills/#usar-un-ejemplo" text:style-name="Internet_20_link" text:visited-style-name="Visited_20_Internet_20_Link"><text:bookmark text:name="usar-un-ejemplo"/>Usar un ejemplo</text:a></text:h>
      <text:p text:style-name="Text_20_body">Crea <text:span text:style-name="Source_20_Text">.opencode/skills/git-release/SKILL.md</text:span> así:</text:p>
      <text:p text:style-name="Preformatted_20_Text"><text:span text:style-name="Source_20_Text">---</text:span></text:p>
      <text:p text:style-name="Preformatted_20_Text"><text:span text:style-name="Source_20_Text">name: git-release</text:span></text:p>
      <text:p text:style-name="Preformatted_20_Text"><text:span text:style-name="Source_20_Text">description: Create consistent releases and changelogs</text:span></text:p>
      <text:p text:style-name="Preformatted_20_Text"><text:span text:style-name="Source_20_Text">license: MIT</text:span></text:p>
      <text:p text:style-name="Preformatted_20_Text"><text:span text:style-name="Source_20_Text">compatibility: opencode</text:span></text:p>
      <text:p text:style-name="Preformatted_20_Text"><text:span text:style-name="Source_20_Text">metadata:</text:span></text:p>
      <text:p text:style-name="Preformatted_20_Text"><text:span text:style-name="Source_20_Text"><text:s text:c="2"/>audience: maintainers</text:span></text:p>
      <text:p text:style-name="Preformatted_20_Text"><text:span text:style-name="Source_20_Text"><text:s text:c="2"/>workflow: github</text:span></text:p>
      <text:p text:style-name="Preformatted_20_Text"><text:span text:style-name="Source_20_Text">---</text:span></text:p>
      <text:p text:style-name="Preformatted_20_Text"/>
      <text:p text:style-name="Preformatted_20_Text"><text:span text:style-name="Source_20_Text">## What I do</text:span></text:p>
      <text:p text:style-name="Preformatted_20_Text"/>
      <text:p text:style-name="Preformatted_20_Text"><text:span text:style-name="Source_20_Text">- Draft release notes from merged PRs</text:span></text:p>
      <text:p text:style-name="Preformatted_20_Text"><text:span text:style-name="Source_20_Text">- Propose a version bump</text:span></text:p>
      <text:p text:style-name="Preformatted_20_Text"><text:span text:style-name="Source_20_Text">- Provide a copy-pasteable `gh release create` command</text:span></text:p>
      <text:p text:style-name="Preformatted_20_Text"/>
      <text:p text:style-name="Preformatted_20_Text"><text:span text:style-name="Source_20_Text">## When to use me</text:span></text:p>
      <text:p text:style-name="Preformatted_20_Text"/>
      <text:p text:style-name="Preformatted_20_Text"><text:span text:style-name="Source_20_Text">Use this when you are preparing a tagged release.</text:span></text:p>
      <text:p text:style-name="Preformatted_20_Text"><text:span text:style-name="Source_20_Text">Ask clarifying questions if the target versioning scheme is unclear.</text:span></text:p>
      <text:p text:style-name="Horizontal_20_Line"/>
      <text:h text:style-name="Heading_20_2" text:outline-level="2"><text:a xlink:type="simple" xlink:href="https://opencode.ai/docs/skills/#reconocer-la-descripción-de-la-herramienta" text:style-name="Internet_20_link" text:visited-style-name="Visited_20_Internet_20_Link"><text:bookmark text:name="reconocer-la-descripción-de-la-herramienta"/><text:soft-page-break/>Reconocer la descripción de la herramienta</text:a></text:h>
      <text:p text:style-name="Text_20_body">OpenCode enumera las habilidades disponibles en la descripción de la herramienta <text:span text:style-name="Source_20_Text">skill</text:span>. Cada entrada incluye el nombre y la descripción de la habilidad:</text:p>
      <text:p text:style-name="Preformatted_20_Text"><text:span text:style-name="Source_20_Text">&lt;available_skills&gt;</text:span></text:p>
      <text:p text:style-name="Preformatted_20_Text"><text:span text:style-name="Source_20_Text"><text:s text:c="2"/>&lt;skill&gt;</text:span></text:p>
      <text:p text:style-name="Preformatted_20_Text"><text:span text:style-name="Source_20_Text"><text:s text:c="4"/>&lt;name&gt;git-release&lt;/name&gt;</text:span></text:p>
      <text:p text:style-name="Preformatted_20_Text"><text:span text:style-name="Source_20_Text"><text:s text:c="4"/>&lt;description&gt;Create consistent releases and changelogs&lt;/description&gt;</text:span></text:p>
      <text:p text:style-name="Preformatted_20_Text"><text:span text:style-name="Source_20_Text"><text:s text:c="2"/>&lt;/skill&gt;</text:span></text:p>
      <text:p text:style-name="Preformatted_20_Text"><text:span text:style-name="Source_20_Text">&lt;/available_skills&gt;</text:span></text:p>
      <text:p text:style-name="Text_20_body">El agente carga una habilidad llamando a la herramienta:</text:p>
      <text:p text:style-name="Preformatted_20_Text"><text:span text:style-name="Source_20_Text">skill({ name: "git-release" })</text:span></text:p>
      <text:p text:style-name="Horizontal_20_Line"/>
      <text:h text:style-name="Heading_20_2" text:outline-level="2"><text:a xlink:type="simple" xlink:href="https://opencode.ai/docs/skills/#configurar-permisos" text:style-name="Internet_20_link" text:visited-style-name="Visited_20_Internet_20_Link"><text:bookmark text:name="configurar-permisos"/>Configurar permisos</text:a></text:h>
      <text:p text:style-name="Text_20_body">Controle a qué agentes de habilidades pueden acceder utilizando permisos basados ​​en patrones en <text:span text:style-name="Source_20_Text">opencode.json</text:span>:</text:p>
      <text:p text:style-name="Preformatted_20_Text"><text:span text:style-name="Source_20_Text">{</text:span></text:p>
      <text:p text:style-name="Preformatted_20_Text"><text:span text:style-name="Source_20_Text"><text:s text:c="2"/>"permission": {</text:span></text:p>
      <text:p text:style-name="Preformatted_20_Text"><text:span text:style-name="Source_20_Text"><text:s text:c="4"/>"skill": {</text:span></text:p>
      <text:p text:style-name="Preformatted_20_Text"><text:span text:style-name="Source_20_Text"><text:s text:c="6"/>"*": "allow",</text:span></text:p>
      <text:p text:style-name="Preformatted_20_Text"><text:span text:style-name="Source_20_Text"><text:s text:c="6"/>"pr-review": "allow",</text:span></text:p>
      <text:p text:style-name="Preformatted_20_Text"><text:span text:style-name="Source_20_Text"><text:s text:c="6"/>"internal-*": "deny",</text:span></text:p>
      <text:p text:style-name="Preformatted_20_Text"><text:span text:style-name="Source_20_Text"><text:s text:c="6"/>"experimental-*": "ask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Permiso</text:p>
            </table:table-cell>
            <table:table-cell table:style-name="Tabla1.A1" office:value-type="string">
              <text:p text:style-name="Table_20_Heading">Comportamiento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ource_20_Text">allow</text:span></text:p>
          </table:table-cell>
          <table:table-cell table:style-name="Tabla1.A2" office:value-type="string">
            <text:p text:style-name="Table_20_Contents">La habilidad se carga inmediatamente</text:p>
          </table:table-cell>
        </table:table-row>
        <table:table-row table:style-name="Tabla1.3">
          <table:table-cell table:style-name="Tabla1.A2" office:value-type="string">
            <text:p text:style-name="Table_20_Contents"><text:span text:style-name="Source_20_Text">deny</text:span></text:p>
          </table:table-cell>
          <table:table-cell table:style-name="Tabla1.A2" office:value-type="string">
            <text:p text:style-name="Table_20_Contents">Habilidad oculta al agente, acceso rechazado</text:p>
          </table:table-cell>
        </table:table-row>
        <table:table-row>
          <table:table-cell table:style-name="Tabla1.A2" office:value-type="string">
            <text:p text:style-name="Table_20_Contents"><text:span text:style-name="Source_20_Text">ask</text:span></text:p>
          </table:table-cell>
          <table:table-cell table:style-name="Tabla1.A2" office:value-type="string">
            <text:p text:style-name="Table_20_Contents">Se solicita al usuario aprobación antes de cargar</text:p>
          </table:table-cell>
        </table:table-row>
      </table:table>
      <text:p text:style-name="Text_20_body">Los patrones admiten comodines: <text:span text:style-name="Source_20_Text">internal-*</text:span> coincide con <text:span text:style-name="Source_20_Text">internal-docs</text:span>, <text:span text:style-name="Source_20_Text">internal-tools</text:span>, etc.</text:p>
      <text:p text:style-name="Horizontal_20_Line"/>
      <text:h text:style-name="Heading_20_2" text:outline-level="2"><text:a xlink:type="simple" xlink:href="https://opencode.ai/docs/skills/#anulación-por-agente" text:style-name="Internet_20_link" text:visited-style-name="Visited_20_Internet_20_Link"><text:bookmark text:name="anulación-por-agente"/>Anulación por agente</text:a></text:h>
      <text:p text:style-name="Text_20_body">Otorgue a agentes específicos permisos diferentes a los predeterminados globales.</text:p>
      <text:p text:style-name="Text_20_body"><text:span text:style-name="Strong_20_Emphasis">Para agentes personalizados</text:span> (en el frente del agente):</text:p>
      <text:p text:style-name="Preformatted_20_Text"><text:span text:style-name="Source_20_Text">---</text:span></text:p>
      <text:p text:style-name="Preformatted_20_Text"><text:span text:style-name="Source_20_Text">permission:</text:span></text:p>
      <text:p text:style-name="Preformatted_20_Text"><text:span text:style-name="Source_20_Text"><text:s text:c="2"/>skill:</text:span></text:p>
      <text:p text:style-name="Preformatted_20_Text"><text:span text:style-name="Source_20_Text"><text:s text:c="4"/>"documents-*": "allow"</text:span></text:p>
      <text:p text:style-name="Preformatted_20_Text"><text:span text:style-name="Source_20_Text">---</text:span></text:p>
      <text:p text:style-name="Text_20_body"><text:span text:style-name="Strong_20_Emphasis">Para agentes integrados</text:span> (en <text:span text:style-name="Source_20_Text">opencode.json</text:span>):</text:p>
      <text:p text:style-name="Preformatted_20_Text"><text:span text:style-name="Source_20_Text">{</text:span></text:p>
      <text:p text:style-name="Preformatted_20_Text"><text:span text:style-name="Source_20_Text"><text:s text:c="2"/>"agent": {</text:span></text:p>
      <text:p text:style-name="Preformatted_20_Text"><text:span text:style-name="Source_20_Text"><text:s text:c="4"/>"plan": {</text:span></text:p>
      <text:p text:style-name="Preformatted_20_Text"><text:soft-page-break/><text:span text:style-name="Source_20_Text"><text:s text:c="6"/>"permission": {</text:span></text:p>
      <text:p text:style-name="Preformatted_20_Text"><text:span text:style-name="Source_20_Text"><text:s text:c="8"/>"skill": {</text:span></text:p>
      <text:p text:style-name="Preformatted_20_Text"><text:span text:style-name="Source_20_Text"><text:s text:c="10"/>"internal-*": "allow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Horizontal_20_Line"/>
      <text:h text:style-name="Heading_20_2" text:outline-level="2"><text:a xlink:type="simple" xlink:href="https://opencode.ai/docs/skills/#deshabilitar-la-herramienta-de-habilidades" text:style-name="Internet_20_link" text:visited-style-name="Visited_20_Internet_20_Link"><text:bookmark text:name="deshabilitar-la-herramienta-de-habilidades"/>Deshabilitar la herramienta de habilidades</text:a></text:h>
      <text:p text:style-name="Text_20_body">Deshabilite completamente las habilidades para los agentes que no deberían usarlas:</text:p>
      <text:p text:style-name="Text_20_body"><text:span text:style-name="Strong_20_Emphasis">Para agentes personalizados</text:span>:</text:p>
      <text:p text:style-name="Preformatted_20_Text"><text:span text:style-name="Source_20_Text">---</text:span></text:p>
      <text:p text:style-name="Preformatted_20_Text"><text:span text:style-name="Source_20_Text">tools:</text:span></text:p>
      <text:p text:style-name="Preformatted_20_Text"><text:span text:style-name="Source_20_Text"><text:s text:c="2"/>skill: false</text:span></text:p>
      <text:p text:style-name="Preformatted_20_Text"><text:span text:style-name="Source_20_Text">---</text:span></text:p>
      <text:p text:style-name="Text_20_body"><text:span text:style-name="Strong_20_Emphasis">Para agentes integrados</text:span>:</text:p>
      <text:p text:style-name="Preformatted_20_Text"><text:span text:style-name="Source_20_Text">{</text:span></text:p>
      <text:p text:style-name="Preformatted_20_Text"><text:span text:style-name="Source_20_Text"><text:s text:c="2"/>"agent": {</text:span></text:p>
      <text:p text:style-name="Preformatted_20_Text"><text:span text:style-name="Source_20_Text"><text:s text:c="4"/>"plan": {</text:span></text:p>
      <text:p text:style-name="Preformatted_20_Text"><text:span text:style-name="Source_20_Text"><text:s text:c="6"/>"tools": {</text:span></text:p>
      <text:p text:style-name="Preformatted_20_Text"><text:span text:style-name="Source_20_Text"><text:s text:c="8"/>"skill": false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Text_20_body">Cuando está deshabilitada, la sección <text:span text:style-name="Source_20_Text">&lt;available_skills&gt;</text:span> se omite por completo.</text:p>
      <text:p text:style-name="Horizontal_20_Line"/>
      <text:h text:style-name="Heading_20_2" text:outline-level="2"><text:a xlink:type="simple" xlink:href="https://opencode.ai/docs/skills/#solucionar-problemas-de-carga" text:style-name="Internet_20_link" text:visited-style-name="Visited_20_Internet_20_Link"><text:bookmark text:name="solucionar-problemas-de-carga"/>Solucionar problemas de carga</text:a></text:h>
      <text:p text:style-name="Text_20_body">Si una habilidad no aparece:</text:p>
      <text:list text:style-name="L4">
        <text:list-item>
          <text:p text:style-name="P4">Verifique que <text:span text:style-name="Source_20_Text">SKILL.md</text:span> esté escrito en mayúsculas.</text:p>
        </text:list-item>
        <text:list-item>
          <text:p text:style-name="P4">Verifique que el frontmatter incluya <text:span text:style-name="Source_20_Text">name</text:span> y <text:span text:style-name="Source_20_Text">description</text:span></text:p>
        </text:list-item>
        <text:list-item>
          <text:p text:style-name="P4">Asegúrese de que los nombres de las habilidades sean únicos en todas las ubicaciones</text:p>
        </text:list-item>
        <text:list-item>
          <text:p text:style-name="P4">Verifique los permisos: las habilidades con <text:span text:style-name="Source_20_Text">deny</text:span> están ocultas para los agent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0T19:10:06.880213600</meta:creation-date>
    <dc:date>2026-05-10T19:10:51.685011100</dc:date>
    <meta:editing-duration>PT45S</meta:editing-duration>
    <meta:editing-cycles>1</meta:editing-cycles>
    <meta:document-statistic meta:table-count="1" meta:image-count="0" meta:object-count="0" meta:page-count="4" meta:paragraph-count="126" meta:word-count="619" meta:character-count="4619" meta:non-whitespace-character-count="4002"/>
    <meta:generator>LibreOffice/26.2.3.2$Windows_X86_64 LibreOffice_project/70e089b17412e4cb7773e41413306b17a2328c34</meta:generator>
  </office:meta>
</office:document-meta>
</file>