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Standard">
      <style:text-properties fo:background-color="#00a933"/>
    </style:style>
    <style:style style:name="T1" style:family="text">
      <style:text-properties fo:background-color="#00a933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crear una sinergia real entre tu web B2B de merchandising y <text:span text:style-name="Strong_20_Emphasis">n8n</text:span> (corriendo en tu Docker Desktop), la clave es usar n8n como el "sistema nervioso" que automatiza lo que tu web no hace por sí sola.</text:p>
      <text:p text:style-name="Standard">Aquí tienes tres formas prácticas de conectarlos:</text:p>
      <text:p text:style-name="Standard">1. Automatización de Pedidos y Stock (Webhook)</text:p>
      <text:p text:style-name="Standard">Configura un <text:span text:style-name="Strong_20_Emphasis">Webhook</text:span> en n8n que reciba los datos cada vez que se realice una venta en tu web.</text:p>
      <text:list text:style-name="L1">
        <text:list-item>
          <text:p text:style-name="P1"><text:span text:style-name="Strong_20_Emphasis">Sinergia:</text:span> Cuando entra un pedido de 50 gorras, n8n puede enviar automáticamente una orden de producción a tu proveedor o actualizar una hoja de cálculo en <text:span text:style-name="Strong_20_Emphasis">Google Sheets/Airtable</text:span> para control de inventario en tiempo real.</text:p>
        </text:list-item>
        <text:list-item>
          <text:p text:style-name="P1"><text:span text:style-name="Strong_20_Emphasis">Pro Tip:</text:span> Usa el nodo de <text:span text:style-name="Strong_20_Emphasis">Discord o Slack</text:span> para recibir una notificación instantánea cada vez que caiga una venta B2B.</text:p>
        </text:list-item>
      </text:list>
      <text:p text:style-name="Text_20_body">2. Generación de Mockups Personalizados (IA)</text:p>
      <text:p text:style-name="Text_20_body">Ya que mencionaste generación de imágenes, puedes automatizar la creación de diseños.</text:p>
      <text:list text:style-name="L2">
        <text:list-item>
          <text:p text:style-name="P2"><text:span text:style-name="Strong_20_Emphasis">Sinergia:</text:span> Cuando un cliente sube su logo a tu web, n8n recibe la imagen, la envía a una API de generación de imágenes (como <text:span text:style-name="Strong_20_Emphasis">DALL-E 3 o Leonardo.ai</text:span>) para "estamparla" virtualmente en una camiseta, y le envía el mockup resultante por email al cliente para su aprobación.</text:p>
        </text:list-item>
        <text:list-item>
          <text:p text:style-name="P2"><text:span text:style-name="Strong_20_Emphasis">Herramienta:</text:span> Usa el nodo de <text:span text:style-name="Strong_20_Emphasis">HTTP Request</text:span> en n8n para conectar con APIs de IA.</text:p>
        </text:list-item>
      </text:list>
      <text:p text:style-name="Text_20_body">3. CRM y Seguimiento B2B</text:p>
      <text:p text:style-name="Text_20_body">Las ventas B2B suelen requerir facturas y seguimiento.</text:p>
      <text:list text:style-name="L3">
        <text:list-item>
          <text:p text:style-name="P3"><text:span text:style-name="Strong_20_Emphasis">Sinergia:</text:span> n8n puede detectar cuando un carrito es abandonado o cuando un cliente recurrente no ha comprado en 30 días. Puede generar una <text:span text:style-name="Strong_20_Emphasis">factura en PDF</text:span> (usando servicios como Bannerbear o herramientas de HTML a PDF) y enviarla por correo a través de <text:span text:style-name="Strong_20_Emphasis">Gmail o SendGrid</text:span>.</text:p>
        </text:list-item>
      </text:list>
      <text:p text:style-name="Text_20_body">Cómo conectar tu Homelab con la Web</text:p>
      <text:p text:style-name="Text_20_body">Como tienes n8n en <text:span text:style-name="Strong_20_Emphasis">Docker Desktop</text:span> (local), tu web B2B (en la nube) no podrá "verlo" a menos que abras un túnel:</text:p>
      <text:list text:style-name="L4">
        <text:list-item>
          <text:p text:style-name="P4"><text:span text:style-name="Strong_20_Emphasis">Cloudflare Tunnel:</text:span> Es la opción más segura para exponer tu instancia de n8n local a internet de forma gratuita.</text:p>
        </text:list-item>
        <text:list-item>
          <text:p text:style-name="P4"><text:span text:style-name="Strong_20_Emphasis">Tailscale Funnel:</text:span> Otra alternativa sencilla para que tu web pueda enviar los Webhooks a tu servidor local.</text:p>
        </text:list-item>
      </text:list>
      <text:p text:style-name="Text_20_body"><text:span text:style-name="T1">¿En qué </text:span><text:span text:style-name="Strong_20_Emphasis"><text:span text:style-name="T1">lenguaje o framework</text:span></text:span><text:span text:style-name="T1"> está construida tu web B2B para darte el código exacto de la conexión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00:44:15.334527000</meta:creation-date>
    <dc:date>2026-03-26T00:45:13.258614900</dc:date>
    <meta:editing-duration>PT58S</meta:editing-duration>
    <meta:editing-cycles>1</meta:editing-cycles>
    <meta:document-statistic meta:table-count="0" meta:image-count="0" meta:object-count="0" meta:page-count="1" meta:paragraph-count="18" meta:word-count="356" meta:character-count="2011" meta:non-whitespace-character-count="1680"/>
    <meta:generator>LibreOffice/25.8.5.2$Windows_X86_64 LibreOffice_project/9c8b85f387cc00a89945a79c9e6239f32e450ac2</meta:generator>
  </office:meta>
</office:document-meta>
</file>