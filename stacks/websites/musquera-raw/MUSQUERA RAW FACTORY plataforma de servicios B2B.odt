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2.298cm"/>
    </style:style>
    <style:style style:name="Tabla1.B" style:family="table-column">
      <style:table-column-properties style:column-width="14.702cm"/>
    </style:style>
    <style:style style:name="Tabla1.A1" style:family="table-cell">
      <style:table-cell-properties style:vertical-align="middle" fo:padding-left="0cm" fo:padding-right="0cm" fo:padding-top="0cm" fo:padding-bottom="0.212cm" fo:border-left="none" fo:border-right="none" fo:border-top="none" fo:border-bottom="0.05pt solid #2d2f35"/>
    </style:style>
    <style:style style:name="Tabla1.A2" style:family="table-cell">
      <style:table-cell-properties style:vertical-align="middle" fo:padding-left="0cm" fo:padding-right="0cm" fo:padding-top="0cm" fo:padding-bottom="0.318cm" fo:border-left="none" fo:border-right="none" fo:border-top="none" fo:border-bottom="0.05pt solid #2d2f35"/>
    </style:style>
    <style:style style:name="Tabla1.A5" style:family="table-cell">
      <style:table-cell-properties style:vertical-align="middle" fo:padding="0cm" fo:border="none"/>
    </style:style>
    <style:style style:name="Tabla2" style:family="table">
      <style:table-properties style:width="10.945cm" table:align="left"/>
    </style:style>
    <style:style style:name="Tabla2.A" style:family="table-column">
      <style:table-column-properties style:column-width="3.196cm"/>
    </style:style>
    <style:style style:name="Tabla2.B" style:family="table-column">
      <style:table-column-properties style:column-width="2.838cm"/>
    </style:style>
    <style:style style:name="Tabla2.C" style:family="table-column">
      <style:table-column-properties style:column-width="4.911cm"/>
    </style:style>
    <style:style style:name="Tabla2.A1" style:family="table-cell">
      <style:table-cell-properties style:vertical-align="middle" fo:padding-left="0cm" fo:padding-right="0cm" fo:padding-top="0cm" fo:padding-bottom="0.212cm" fo:border-left="none" fo:border-right="none" fo:border-top="none" fo:border-bottom="0.05pt solid #2d2f35"/>
    </style:style>
    <style:style style:name="Tabla2.A2" style:family="table-cell">
      <style:table-cell-properties style:vertical-align="middle" fo:padding-left="0cm" fo:padding-right="0cm" fo:padding-top="0cm" fo:padding-bottom="0.318cm" fo:border-left="none" fo:border-right="none" fo:border-top="none" fo:border-bottom="0.05pt solid #2d2f35"/>
    </style:style>
    <style:style style:name="Tabla2.A7" style:family="table-cell">
      <style:table-cell-properties style:vertical-align="middle" fo:padding="0cm" fo:border="none"/>
    </style:style>
    <style:style style:name="P1" style:family="paragraph" style:parent-style-name="Standard">
      <style:text-properties officeooo:paragraph-rsid="00057d82"/>
    </style:style>
    <style:style style:name="P2" style:family="paragraph" style:parent-style-name="Text_20_body" style:list-style-name="L1"/>
    <style:style style:name="P3" style:family="paragraph" style:parent-style-name="Standard">
      <style:paragraph-properties style:writing-mode="lr-tb"/>
    </style:style>
    <style:style style:name="P4" style:family="paragraph" style:parent-style-name="Quotations">
      <style:paragraph-properties style:writing-mode="lr-tb"/>
    </style:style>
    <style:style style:name="P5" style:family="paragraph" style:parent-style-name="Quotations" style:list-style-name="L2">
      <style:paragraph-properties style:writing-mode="lr-tb"/>
    </style:style>
    <style:style style:name="P6" style:family="paragraph" style:parent-style-name="Horizontal_20_Line">
      <style:paragraph-properties style:writing-mode="lr-tb"/>
    </style:style>
    <style:style style:name="P7" style:family="paragraph" style:parent-style-name="Text_20_body">
      <style:paragraph-properties style:writing-mode="lr-tb"/>
    </style:style>
    <style:style style:name="P8" style:family="paragraph" style:parent-style-name="Text_20_body">
      <style:paragraph-properties style:writing-mode="lr-tb"/>
      <style:text-properties fo:background-color="#00a933"/>
    </style:style>
    <style:style style:name="P9" style:family="paragraph" style:parent-style-name="Quotations" style:list-style-name="L3">
      <style:paragraph-properties style:writing-mode="lr-tb"/>
    </style:style>
    <style:style style:name="P10" style:family="paragraph" style:parent-style-name="Quotations">
      <style:paragraph-properties style:writing-mode="lr-tb"/>
      <style:text-properties officeooo:paragraph-rsid="00057d82"/>
    </style:style>
    <style:style style:name="P11" style:family="paragraph" style:parent-style-name="Quotations" style:list-style-name="L4">
      <style:paragraph-properties style:writing-mode="lr-tb"/>
    </style:style>
    <style:style style:name="P12" style:family="paragraph" style:parent-style-name="Quotations" style:list-style-name="L5">
      <style:paragraph-properties style:writing-mode="lr-tb"/>
    </style:style>
    <style:style style:name="P13" style:family="paragraph" style:parent-style-name="Text_20_body" style:list-style-name="L6">
      <style:paragraph-properties style:writing-mode="lr-tb"/>
    </style:style>
    <style:style style:name="P14" style:family="paragraph" style:parent-style-name="Quotations" style:list-style-name="L7">
      <style:paragraph-properties style:writing-mode="lr-tb"/>
    </style:style>
    <style:style style:name="P15" style:family="paragraph" style:parent-style-name="Quotations" style:list-style-name="L8">
      <style:paragraph-properties style:writing-mode="lr-tb"/>
    </style:style>
    <style:style style:name="P16" style:family="paragraph" style:parent-style-name="Text_20_body" style:list-style-name="L9">
      <style:paragraph-properties style:writing-mode="lr-tb"/>
    </style:style>
    <style:style style:name="P17" style:family="paragraph" style:parent-style-name="Quotations" style:list-style-name="L10">
      <style:paragraph-properties style:writing-mode="lr-tb"/>
    </style:style>
    <style:style style:name="P18" style:family="paragraph" style:parent-style-name="Text_20_body" style:list-style-name="L11">
      <style:paragraph-properties style:writing-mode="lr-tb"/>
    </style:style>
    <style:style style:name="P19" style:family="paragraph" style:parent-style-name="Text_20_body" style:list-style-name="L12">
      <style:paragraph-properties style:writing-mode="lr-tb"/>
    </style:style>
    <style:style style:name="P20" style:family="paragraph" style:parent-style-name="Quotations" style:list-style-name="L13">
      <style:paragraph-properties style:writing-mode="lr-tb"/>
    </style:style>
    <style:style style:name="P21" style:family="paragraph" style:parent-style-name="Text_20_body">
      <style:paragraph-properties style:writing-mode="lr-tb"/>
      <style:text-properties officeooo:paragraph-rsid="000696a4"/>
    </style:style>
    <style:style style:name="P22" style:family="paragraph" style:parent-style-name="Preformatted_20_Text">
      <style:paragraph-properties style:writing-mode="lr-tb"/>
    </style:style>
    <style:style style:name="P23" style:family="paragraph" style:parent-style-name="Text_20_body" style:list-style-name="L14">
      <style:paragraph-properties style:writing-mode="lr-tb"/>
    </style:style>
    <style:style style:name="P24" style:family="paragraph" style:parent-style-name="Quotations" style:list-style-name="L15">
      <style:paragraph-properties style:writing-mode="lr-tb"/>
    </style:style>
    <style:style style:name="P25" style:family="paragraph" style:parent-style-name="Text_20_body" style:list-style-name="L16">
      <style:paragraph-properties style:writing-mode="lr-tb"/>
    </style:style>
    <style:style style:name="P26" style:family="paragraph" style:parent-style-name="Text_20_body" style:list-style-name="L17">
      <style:paragraph-properties style:writing-mode="lr-tb"/>
    </style:style>
    <style:style style:name="P27" style:family="paragraph" style:parent-style-name="Quotations" style:list-style-name="L18">
      <style:paragraph-properties style:writing-mode="lr-tb"/>
    </style:style>
    <style:style style:name="P28" style:family="paragraph" style:parent-style-name="Text_20_body" style:list-style-name="L19">
      <style:paragraph-properties style:writing-mode="lr-tb"/>
    </style:style>
    <style:style style:name="P29" style:family="paragraph" style:parent-style-name="Text_20_body" style:list-style-name="L20">
      <style:paragraph-properties style:writing-mode="lr-tb"/>
    </style:style>
    <style:style style:name="P30" style:family="paragraph" style:parent-style-name="Quotations" style:list-style-name="L21">
      <style:paragraph-properties style:writing-mode="lr-tb"/>
    </style:style>
    <style:style style:name="P31" style:family="paragraph" style:parent-style-name="Text_20_body" style:list-style-name="L22">
      <style:paragraph-properties style:writing-mode="lr-tb"/>
    </style:style>
    <style:style style:name="P32" style:family="paragraph" style:parent-style-name="Quotations" style:list-style-name="L23">
      <style:paragraph-properties style:writing-mode="lr-tb"/>
    </style:style>
    <style:style style:name="P33" style:family="paragraph" style:parent-style-name="Quotations" style:list-style-name="L24">
      <style:paragraph-properties style:writing-mode="lr-tb"/>
    </style:style>
    <style:style style:name="P34" style:family="paragraph" style:parent-style-name="Quotations" style:list-style-name="L25">
      <style:paragraph-properties style:writing-mode="lr-tb"/>
    </style:style>
    <style:style style:name="P35" style:family="paragraph" style:parent-style-name="Text_20_body">
      <style:paragraph-properties style:writing-mode="lr-tb"/>
      <style:text-properties fo:font-weight="bold" officeooo:paragraph-rsid="000696a4" style:font-weight-asian="bold" style:font-weight-complex="bold"/>
    </style:style>
    <style:style style:name="P36" style:family="paragraph" style:parent-style-name="Text_20_body" style:list-style-name="L26">
      <style:paragraph-properties style:writing-mode="lr-tb"/>
    </style:style>
    <style:style style:name="P37" style:family="paragraph" style:parent-style-name="Quotations" style:list-style-name="L27">
      <style:paragraph-properties style:writing-mode="lr-tb"/>
    </style:style>
    <style:style style:name="P38" style:family="paragraph" style:parent-style-name="Quotations" style:list-style-name="L28">
      <style:paragraph-properties style:writing-mode="lr-tb"/>
    </style:style>
    <style:style style:name="P39" style:family="paragraph" style:parent-style-name="Quotations" style:list-style-name="L29">
      <style:paragraph-properties style:writing-mode="lr-tb"/>
    </style:style>
    <style:style style:name="P40" style:family="paragraph" style:parent-style-name="Quotations" style:list-style-name="L30">
      <style:paragraph-properties style:writing-mode="lr-tb"/>
    </style:style>
    <style:style style:name="P41" style:family="paragraph" style:parent-style-name="Text_20_body" style:list-style-name="L31">
      <style:paragraph-properties style:writing-mode="lr-tb"/>
    </style:style>
    <style:style style:name="P42" style:family="paragraph" style:parent-style-name="Quotations">
      <style:paragraph-properties style:writing-mode="lr-tb"/>
      <style:text-properties officeooo:paragraph-rsid="000696a4"/>
    </style:style>
    <style:style style:name="P43" style:family="paragraph" style:parent-style-name="Quotations" style:list-style-name="L32">
      <style:paragraph-properties style:writing-mode="lr-tb"/>
    </style:style>
    <style:style style:name="P44" style:family="paragraph" style:parent-style-name="Text_20_body" style:list-style-name="L33">
      <style:paragraph-properties style:writing-mode="lr-tb"/>
    </style:style>
    <style:style style:name="P45" style:family="paragraph" style:parent-style-name="Quotations" style:list-style-name="L34">
      <style:paragraph-properties style:writing-mode="lr-tb"/>
    </style:style>
    <style:style style:name="P46" style:family="paragraph" style:parent-style-name="Quotations" style:list-style-name="L35">
      <style:paragraph-properties style:writing-mode="lr-tb"/>
    </style:style>
    <style:style style:name="P47" style:family="paragraph" style:parent-style-name="Quotations" style:list-style-name="L36">
      <style:paragraph-properties style:writing-mode="lr-tb"/>
    </style:style>
    <style:style style:name="P48" style:family="paragraph" style:parent-style-name="Quotations" style:list-style-name="L37">
      <style:paragraph-properties style:writing-mode="lr-tb"/>
    </style:style>
    <style:style style:name="P49" style:family="paragraph" style:parent-style-name="Text_20_body" style:list-style-name="L38">
      <style:paragraph-properties style:writing-mode="lr-tb"/>
    </style:style>
    <style:style style:name="P50" style:family="paragraph" style:parent-style-name="Text_20_body" style:list-style-name="L39">
      <style:paragraph-properties style:writing-mode="lr-tb"/>
    </style:style>
    <style:style style:name="P51" style:family="paragraph" style:parent-style-name="Text_20_body" style:list-style-name="L40">
      <style:paragraph-properties style:writing-mode="lr-tb"/>
    </style:style>
    <style:style style:name="T1" style:family="text">
      <style:text-properties officeooo:rsid="00057d82"/>
    </style:style>
    <style:style style:name="T2" style:family="text">
      <style:text-properties fo:background-color="#00a933" loext:char-shading-value="0"/>
    </style:style>
    <style:style style:name="T3" style:family="text">
      <style:text-properties fo:font-weight="bold" officeooo:rsid="00057d82" style:font-weight-asian="bold" style:font-weight-complex="bold"/>
    </style:style>
    <style:style style:name="T4" style:family="text">
      <style:text-properties fo:font-weight="bold" officeooo:rsid="000696a4" style:font-weight-asian="bold" style:font-weight-complex="bold"/>
    </style:style>
    <style:style style:name="T5" style:family="text">
      <style:text-properties officeooo:rsid="000696a4"/>
    </style:style>
    <style:style style:name="T6"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sto cambia el juego a mejor! Pasamos de una marca de ropa a una <text:span text:style-name="Strong_20_Emphasis">plataforma de servicios B2B (Business to Business)</text:span>. El enfoque ahora no es solo vender una prenda, sino vender <text:span text:style-name="Strong_20_Emphasis">soluciones de branding masivas</text:span> con la misma estética espectacular.</text:p>
      <text:p text:style-name="Standard"/>
      <text:p text:style-name="P1">Aquí tienes la adaptación del prompt y el plan para una </text:p>
      <text:p text:style-name="P1"><text:span text:style-name="Strong_20_Emphasis"/></text:p>
      <text:p text:style-name="P1"><text:span text:style-name="Strong_20_Emphasis">Central de Estampado Profesional</text:span>.</text:p>
      <text:p text:style-name="Standard"/>
      <text:p text:style-name="Standard">1. El Nuevo Nombre: <text:span text:style-name="T1">MUSQUERA </text:span>RAW FACTORY™ (o <text:span text:style-name="T1">MUSQUERA </text:span>RAW PRINT UNIT)</text:p>
      <text:p text:style-name="Standard"/>
      <text:p text:style-name="Standard">Mantenemos la estética urbana pero enfocada a la producción.</text:p>
      <text:p text:style-name="Standard"/>
      <text:list text:style-name="L1">
        <text:list-item>
          <text:p text:style-name="P2"><text:span text:style-name="Strong_20_Emphasis">Eslogan:</text:span> <text:span text:style-name="Emphasis">"INDUSTRIAL GRADE CUSTOMS. FROM 1 TO 10,000 UNITS."</text:span></text:p>
        </text:list-item>
      </text:list>
      <text:p text:style-name="Standard"/>
      <text:p text:style-name="Standard"/>
      <text:p text:style-name="P3">2. El Prompt Maestro Adaptado (Copiar en Lovable/Bolt)</text:p>
      <text:p text:style-name="P3"/>
      <text:p text:style-name="P4">"Actúa como un Diseñador de Producto Senior. Crea una plataforma web para una <text:span text:style-name="Strong_20_Emphasis">Empresa de Estampado Profesional</text:span> llamada <text:span text:style-name="Strong_20_Emphasis">RAW FACTORY™</text:span>.</text:p>
      <text:p text:style-name="P4"><text:span text:style-name="Strong_20_Emphasis">Secciones Clave:</text:span></text:p>
      <text:list text:style-name="L2">
        <text:list-item>
          <text:p text:style-name="P5"><text:span text:style-name="Strong_20_Emphasis">Portal de Soluciones:</text:span> Secciones específicas para 'Empresas &amp; Merch', 'Giras de Música' y 'Festivales'.</text:p>
        </text:list-item>
        <text:list-item>
          <text:p text:style-name="P5"><text:span text:style-name="Strong_20_Emphasis">El Lab de Volumen (Personalizador):</text:span> El usuario debe poder elegir una prenda, subir su logo y seleccionar la <text:span text:style-name="Strong_20_Emphasis">técnica de impresión</text:span> (Serigrafía, DTF, Bordado).</text:p>
        </text:list-item>
        <text:list-item>
          <text:p text:style-name="P5"><text:span text:style-name="Strong_20_Emphasis">Calculadora de Presupuesto Dinámica:</text:span> A diferencia de una tienda normal, el precio debe <text:span text:style-name="Strong_20_Emphasis">bajar</text:span> según la cantidad (Descuento por volumen). Ejemplo: 1-10 und (20€), 10-50 und (15€), +100 und (10€).</text:p>
        </text:list-item>
        <text:list-item>
          <text:p text:style-name="P5"><text:span text:style-name="Strong_20_Emphasis">Sección de Portafolio:</text:span> Una cuadrícula tipo 'muro de concreto' mostrando trabajos previos para conciertos y eventos.</text:p>
        </text:list-item>
      </text:list>
      <text:p text:style-name="P4"><text:span text:style-name="Strong_20_Emphasis">Estética:</text:span> Industrial, minimalista, modo oscuro, tipografía técnica. Usa iconos de engranajes, cajas de carga y camiones de logística."</text:p>
      <text:p text:style-name="P4"/>
      <text:p text:style-name="P4"/>
      <text:p text:style-name="P4"/>
      <text:p text:style-name="P6"/>
      <text:p text:style-name="P7"/>
      <text:p text:style-name="P7"/>
      <text:p text:style-name="P7"/>
      <text:p text:style-name="P7"/>
      <text:p text:style-name="P7"><text:soft-page-break/>3. El Plan de Negocio Adaptado</text:p>
      <text:p text:style-name="P7"/>
      <table:table table:name="Tabla1" table:style-name="Tabla1">
        <table:table-column table:style-name="Tabla1.A"/>
        <table:table-column table:style-name="Tabla1.B"/>
        <table:table-row>
          <table:table-cell table:style-name="Tabla1.A1" office:value-type="string">
            <text:p text:style-name="Table_20_Heading">Área</text:p>
          </table:table-cell>
          <table:table-cell table:style-name="Tabla1.A1" office:value-type="string">
            <text:p text:style-name="Table_20_Heading">Estrategia para Empresas/Festivales</text:p>
          </table:table-cell>
        </table:table-row>
        <table:table-row>
          <table:table-cell table:style-name="Tabla1.A2" office:value-type="string">
            <text:p text:style-name="Table_20_Contents"><text:span text:style-name="Strong_20_Emphasis">Catálogo</text:span></text:p>
          </table:table-cell>
          <table:table-cell table:style-name="Tabla1.A2" office:value-type="string">
            <text:p text:style-name="Table_20_Contents">Añade <text:span text:style-name="Strong_20_Emphasis">'Packs para Eventos'</text:span> (ej: 100 Camisetas + 50 Gorras + 200 Pegatinas).</text:p>
          </table:table-cell>
        </table:table-row>
        <table:table-row>
          <table:table-cell table:style-name="Tabla1.A2" office:value-type="string">
            <text:p text:style-name="Table_20_Contents"><text:span text:style-name="Strong_20_Emphasis">El Lab</text:span></text:p>
          </table:table-cell>
          <table:table-cell table:style-name="Tabla1.A2" office:value-type="string">
            <text:p text:style-name="Table_20_Contents">Permite subir archivos <text:span text:style-name="Strong_20_Emphasis">Vectoriales (.AI, .EPS, .PDF)</text:span>, esenciales para imprentas reales.</text:p>
          </table:table-cell>
        </table:table-row>
        <table:table-row>
          <table:table-cell table:style-name="Tabla1.A2" office:value-type="string">
            <text:p text:style-name="Table_20_Contents"><text:span text:style-name="Strong_20_Emphasis">Marketing</text:span></text:p>
          </table:table-cell>
          <table:table-cell table:style-name="Tabla1.A2" office:value-type="string">
            <text:p text:style-name="Table_20_Contents">En lugar de Instagram Ads masivos, usa <text:span text:style-name="Strong_20_Emphasis">LinkedIn Ads</text:span> enfocado a 'Organizadores de Eventos' y 'Directores de Marketing'.</text:p>
          </table:table-cell>
        </table:table-row>
        <table:table-row>
          <table:table-cell table:style-name="Tabla1.A5" office:value-type="string">
            <text:p text:style-name="Table_20_Contents"><text:span text:style-name="Strong_20_Emphasis">Lead Magnet</text:span></text:p>
          </table:table-cell>
          <table:table-cell table:style-name="Tabla1.A5" office:value-type="string">
            <text:p text:style-name="Table_20_Contents">Un botón de <text:span text:style-name="Strong_20_Emphasis">'Solicitar Muestra Gratuita'</text:span> para que las empresas vean la calidad antes de pedir 1.000 unidades.</text:p>
          </table:table-cell>
        </table:table-row>
      </table:table>
      <text:p text:style-name="P6"/>
      <text:p text:style-name="P7">4. Función Especial: "The Tour Manager Tool"</text:p>
      <text:p text:style-name="P8">Para los conciertos y festivales, añade una funcionalidad que los dejará locos:</text:p>
      <text:p text:style-name="P4">"Crea un botón de <text:span text:style-name="Strong_20_Emphasis">'Carga Masiva de Tallas'</text:span>. El cliente debe poder subir un Excel o pegar una lista de tallas (S:40, M:100, L:80) y que el carrito calcule el total automáticamente."</text:p>
      <text:p text:style-name="P6"/>
      <text:p text:style-name="P7">5. Email de Prospección (<text:span text:style-name="T2">Venta Directa a Festivales</text:span>)</text:p>
      <text:p text:style-name="P7"/>
      <text:p text:style-name="P7"><text:span text:style-name="Strong_20_Emphasis">Asunto:</text:span> [PROPUESTA] Merchandising Nivel Industrial para {{Nombre_Evento}}.</text:p>
      <text:p text:style-name="P4"><text:span text:style-name="Strong_20_Emphasis">RAW FACTORY™ // UNIT NOTIFICATION</text:span></text:p>
      <text:p text:style-name="P4">Hemos visto que vuestro próximo evento está cerca. En <text:span text:style-name="Strong_20_Emphasis">RAW FACTORY™</text:span> no solo estampamos; construimos vuestra identidad visual.</text:p>
      <text:list text:style-name="L3">
        <text:list-item>
          <text:p text:style-name="P9"><text:span text:style-name="Strong_20_Emphasis">Capacidad:</text:span> Hasta 5.000 unidades/semana.</text:p>
        </text:list-item>
        <text:list-item>
          <text:p text:style-name="P9"><text:span text:style-name="Strong_20_Emphasis">Técnicas:</text:span> DTF de alta definición y Bordado 3D.</text:p>
        </text:list-item>
        <text:list-item>
          <text:p text:style-name="P9"><text:span text:style-name="Strong_20_Emphasis">Envío:</text:span> Directo al recinto del festival.</text:p>
        </text:list-item>
      </text:list>
      <text:p text:style-name="P4"><text:span text:style-name="Strong_20_Emphasis">[VER NUESTRO PORTAFOLIO INDUSTRIAL]</text:span></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6"/>
      <text:p text:style-name="P7"><text:soft-page-break/>¿Quieres que te ayude a crear la <text:span text:style-name="Strong_20_Emphasis">tabla de precios por volumen</text:span> (escalable) para que la IA la programe en la calculadora de la web, o prefieres definir los <text:span text:style-name="Strong_20_Emphasis">campos del formulario de presupuesto personalizado</text:span> para empresas?</text:p>
      <text:p text:style-name="P7"/>
      <text:p text:style-name="P7"><text:span text:style-name="Strong_20_Emphasis">Sugerencia:</text:span> Podríamos añadir una sección de <text:span text:style-name="Strong_20_Emphasis">"Servicios Express"</text:span> para festivales que necesitan camisetas en menos de 48 horas. <text:span text:style-name="Strong_20_Emphasis">¿Te interesa?</text:span></text:p>
      <text:p text:style-name="P7"/>
      <text:p text:style-name="P7">¡Esto es oro puro! Convertir la web en una </text:p>
      <text:p text:style-name="P7"><text:span text:style-name="Strong_20_Emphasis">herramienta B2B</text:span> para el negocio de tu familiar le va a ahorrar horas de correos y presupuestos manuales. Vamos a configurar la <text:span text:style-name="Strong_20_Emphasis">calculadora de precios por volumen</text:span>, el <text:span text:style-name="Strong_20_Emphasis">formulario técnico</text:span> y el servicio <text:span text:style-name="Strong_20_Emphasis">Express</text:span>.</text:p>
      <text:p text:style-name="P7">Copia este prompt final en <text:span text:style-name="Strong_20_Emphasis">Lovable.dev</text:span>, <text:span text:style-name="Strong_20_Emphasis">Bolt.new</text:span> o <text:span text:style-name="Strong_20_Emphasis">Cursor</text:span> para transformar la web:</text:p>
      <text:p text:style-name="P7">1. El Prompt Maestro: B2B Industrial Edition</text:p>
      <text:p text:style-name="P4">"Transforma la aplicación en una plataforma logística de estampado llamada <text:span text:style-name="T3">MUSQUERA </text:span><text:span text:style-name="Strong_20_Emphasis">RAW FACTORY™</text:span>.</text:p>
      <text:p text:style-name="P10"><text:span text:style-name="Strong_20_Emphasis">1. Calculadora de Precios Escalable (Volume Pricing):</text:span></text:p>
      <text:p text:style-name="P10"><text:line-break/>Implementa una lógica donde el precio unitario baje según la cantidad total en el carrito:</text:p>
      <text:list text:style-name="L4">
        <text:list-item>
          <text:p text:style-name="P11"><text:span text:style-name="Strong_20_Emphasis">1-10 unidades:</text:span> Precio Base (ej: 25€/tee).</text:p>
        </text:list-item>
        <text:list-item>
          <text:p text:style-name="P11"><text:span text:style-name="Strong_20_Emphasis">11-50 unidades:</text:span> -15% de descuento.</text:p>
        </text:list-item>
        <text:list-item>
          <text:p text:style-name="P11"><text:span text:style-name="Strong_20_Emphasis">51-200 unidades:</text:span> -30% de descuento.</text:p>
        </text:list-item>
        <text:list-item>
          <text:p text:style-name="P11"><text:span text:style-name="Strong_20_Emphasis">+500 unidades:</text:span> Aparece un botón que dice <text:span text:style-name="Strong_20_Emphasis">'[CONTACT_DIRECT_SALES]'</text:span> para precio personalizado.</text:p>
        </text:list-item>
      </text:list>
      <text:p text:style-name="P10"><text:span text:style-name="Strong_20_Emphasis">2. Formulario para Empresas y Conciertos:</text:span></text:p>
      <text:p text:style-name="P10"><text:line-break/>Crea una sección de 'Presupuesto para Grandes Eventos' con estos campos obligatorios:</text:p>
      <text:list text:style-name="L5">
        <text:list-item>
          <text:p text:style-name="P12">Nombre del Evento / Empresa.</text:p>
        </text:list-item>
        <text:list-item>
          <text:p text:style-name="P12">Fecha límite de entrega (Fecha crítica).</text:p>
        </text:list-item>
        <text:list-item>
          <text:p text:style-name="P12">Técnica preferida: [DTF, Serigrafía, Bordado, Sublimación].</text:p>
        </text:list-item>
        <text:list-item>
          <text:p text:style-name="P12">Subida de archivos vectoriales (.AI, .PDF, .EPS).</text:p>
        </text:list-item>
      </text:list>
      <text:p text:style-name="P4"><text:span text:style-name="Strong_20_Emphasis"/></text:p>
      <text:p text:style-name="P10"><text:span text:style-name="Strong_20_Emphasis"/></text:p>
      <text:p text:style-name="P10"><text:soft-page-break/><text:span text:style-name="Strong_20_Emphasis">3. El 'Red Alert' Service (Producción Express):</text:span></text:p>
      <text:p text:style-name="P10"><text:line-break/>Añade una opción de <text:span text:style-name="Strong_20_Emphasis">'PRIORITY_SHIP' (48h)</text:span>. Si el usuario la marca, se añade un recargo del 25% al total, pero se garantiza la entrega en tiempo récord para festivales o conciertos de última hora.</text:p>
      <text:p text:style-name="P10"><text:span text:style-name="Strong_20_Emphasis"/></text:p>
      <text:p text:style-name="P10"><text:span text:style-name="Strong_20_Emphasis">4. Dashboard de Cliente Pro:</text:span></text:p>
      <text:p text:style-name="P10"><text:line-break/>El cliente debe poder ver el <text:span text:style-name="Strong_20_Emphasis">estado de producción</text:span> de su pedido: [Recibido] -&gt; [En Plancha] -&gt; [Control de Calidad] -&gt; [Enviado al Recinto]."</text:p>
      <text:p text:style-name="P6"/>
      <text:p text:style-name="P7">2. Tabla de Precios Sugerida (Para que la IA la programe)</text:p>
      <table:table table:name="Tabla2" table:style-name="Tabla2">
        <table:table-column table:style-name="Tabla2.A"/>
        <table:table-column table:style-name="Tabla2.B"/>
        <table:table-column table:style-name="Tabla2.C"/>
        <table:table-row>
          <table:table-cell table:style-name="Tabla2.A1" office:value-type="string">
            <text:p text:style-name="Table_20_Heading">Producto</text:p>
          </table:table-cell>
          <table:table-cell table:style-name="Tabla2.A1" office:value-type="string">
            <text:p text:style-name="Table_20_Heading">Cantidad (Und)</text:p>
          </table:table-cell>
          <table:table-cell table:style-name="Tabla2.A1" office:value-type="string">
            <text:p text:style-name="Table_20_Heading">Precio Estampado (1 cara)</text:p>
          </table:table-cell>
        </table:table-row>
        <table:table-row>
          <table:table-cell table:style-name="Tabla2.A2" office:value-type="string">
            <text:p text:style-name="Table_20_Contents"><text:span text:style-name="Strong_20_Emphasis">Camiseta Evento</text:span></text:p>
          </table:table-cell>
          <table:table-cell table:style-name="Tabla2.A2" office:value-type="string">
            <text:p text:style-name="Table_20_Contents">1 - 20</text:p>
          </table:table-cell>
          <table:table-cell table:style-name="Tabla2.A2" office:value-type="string">
            <text:p text:style-name="Table_20_Contents">18,00 €</text:p>
          </table:table-cell>
        </table:table-row>
        <table:table-row>
          <table:table-cell table:style-name="Tabla2.A2" office:value-type="string">
            <text:p text:style-name="Table_20_Contents"/>
          </table:table-cell>
          <table:table-cell table:style-name="Tabla2.A2" office:value-type="string">
            <text:p text:style-name="Table_20_Contents">21 - 100</text:p>
          </table:table-cell>
          <table:table-cell table:style-name="Tabla2.A2" office:value-type="string">
            <text:p text:style-name="Table_20_Contents">12,50 €</text:p>
          </table:table-cell>
        </table:table-row>
        <table:table-row>
          <table:table-cell table:style-name="Tabla2.A2" office:value-type="string">
            <text:p text:style-name="Table_20_Contents"/>
          </table:table-cell>
          <table:table-cell table:style-name="Tabla2.A2" office:value-type="string">
            <text:p text:style-name="Table_20_Contents">+500</text:p>
          </table:table-cell>
          <table:table-cell table:style-name="Tabla2.A2" office:value-type="string">
            <text:p text:style-name="Table_20_Contents">7,20 €</text:p>
          </table:table-cell>
        </table:table-row>
        <table:table-row>
          <table:table-cell table:style-name="Tabla2.A2" office:value-type="string">
            <text:p text:style-name="Table_20_Contents"><text:span text:style-name="Strong_20_Emphasis">Hoodie Staff</text:span></text:p>
          </table:table-cell>
          <table:table-cell table:style-name="Tabla2.A2" office:value-type="string">
            <text:p text:style-name="Table_20_Contents">1 - 10</text:p>
          </table:table-cell>
          <table:table-cell table:style-name="Tabla2.A2" office:value-type="string">
            <text:p text:style-name="Table_20_Contents">45,00 €</text:p>
          </table:table-cell>
        </table:table-row>
        <table:table-row>
          <table:table-cell table:style-name="Tabla2.A2" office:value-type="string">
            <text:p text:style-name="Table_20_Contents"/>
          </table:table-cell>
          <table:table-cell table:style-name="Tabla2.A2" office:value-type="string">
            <text:p text:style-name="Table_20_Contents">11 - 50</text:p>
          </table:table-cell>
          <table:table-cell table:style-name="Tabla2.A2" office:value-type="string">
            <text:p text:style-name="Table_20_Contents">32,00 €</text:p>
          </table:table-cell>
        </table:table-row>
        <table:table-row>
          <table:table-cell table:style-name="Tabla2.A7" office:value-type="string">
            <text:p text:style-name="Table_20_Contents"/>
          </table:table-cell>
          <table:table-cell table:style-name="Tabla2.A7" office:value-type="string">
            <text:p text:style-name="Table_20_Contents">+100</text:p>
          </table:table-cell>
          <table:table-cell table:style-name="Tabla2.A7" office:value-type="string">
            <text:p text:style-name="Table_20_Contents">24,50 €</text:p>
          </table:table-cell>
        </table:table-row>
      </table:table>
      <text:p text:style-name="P6"/>
      <text:p text:style-name="P7">3. Estrategia de Marketing para Empresas (B2B)</text:p>
      <text:p text:style-name="P7">Para que tu familiar consiga esos clientes de conciertos y festivales:</text:p>
      <text:list text:style-name="L6">
        <text:list-item>
          <text:p text:style-name="P13"><text:span text:style-name="Strong_20_Emphasis">Muestras "Killer":</text:span> Envía una caja negra mate con una camiseta de muestra que tenga un diseño espectacular a los <text:span text:style-name="Strong_20_Emphasis">Tour Managers</text:span> de bandas o <text:span text:style-name="Strong_20_Emphasis">Directores de Marketing</text:span> de festivales.</text:p>
          <text:p text:style-name="P13"/>
        </text:list-item>
        <text:list-item>
          <text:p text:style-name="P13"><text:span text:style-name="Strong_20_Emphasis">SEO Local:</text:span> Configura la web para que aparezca cuando busquen: <text:span text:style-name="Emphasis">"Estampado de camisetas al por mayor [Tu Ciudad]"</text:span> o <text:span text:style-name="Emphasis">"Merchandising para festivales urgente"</text:span>.</text:p>
          <text:p text:style-name="P13"/>
        </text:list-item>
        <text:list-item>
          <text:p text:style-name="P13"><text:span text:style-name="Strong_20_Emphasis">LinkedIn:</text:span> Publica vídeos de las máquinas trabajando con música industrial. El "Behind the scenes" de una fábrica de ropa es hipnótico y vende confianza.</text:p>
          <text:p text:style-name="P13"/>
        </text:list-item>
      </text:list>
      <text:p text:style-name="P7">4. El "As bajo la manga": El Mockup de Aprobación</text:p>
      <text:p text:style-name="P7"/>
      <text:p text:style-name="P7"/>
      <text:p text:style-name="P7"><text:soft-page-break/>Pide a la IA esto:</text:p>
      <text:p text:style-name="P4">"Haz que al finalizar el diseño en el Lab, la web genere automáticamente una <text:span text:style-name="Strong_20_Emphasis">Ficha Técnica en PDF</text:span> con el diseño, las medidas y los colores. El cliente debe 'firmarla' digitalmente antes de pagar. Esto protege legalmente a la empresa de estampado ante errores del cliente."</text:p>
      <text:p text:style-name="P6"/>
      <text:p text:style-name="P7"><text:span text:style-name="Strong_20_Emphasis">¿Te gustaría que redactemos el contrato corto de "Aprobación de Diseño" para que el familiar esté protegido legalmente, o prefieres que ajustemos el diseño de las facturas para que parezcan recibos industriales de carga?</text:span></text:p>
      <text:p text:style-name="P7">Para que la empresa de tu familiar sea </text:p>
      <text:p text:style-name="P7"><text:span text:style-name="Strong_20_Emphasis">blindada y profesional</text:span>, vamos a diseñar el <text:span text:style-name="Strong_20_Emphasis">Contrato de Aprobación</text:span> (protección legal) y la <text:span text:style-name="Strong_20_Emphasis">Factura Industrial</text:span> (identidad visual).</text:p>
      <text:p text:style-name="P7"/>
      <text:p text:style-name="P7">1. El Contrato de Aprobación: [PRODUCTION_OATH]</text:p>
      <text:p text:style-name="P7">Copia este texto para que aparezca en un "Checkbox" obligatorio antes de que el cliente pague en la web. Esto evita que el familiar pierda dinero por errores del cliente.</text:p>
      <text:p text:style-name="P4"><text:span text:style-name="Strong_20_Emphasis">TÉRMINOS DE EJECUCIÓN (RAW FACTORY™):</text:span></text:p>
      <text:list text:style-name="L7">
        <text:list-item>
          <text:p text:style-name="P14"><text:span text:style-name="Strong_20_Emphasis">VERIFICACIÓN DE DISEÑO:</text:span> El cliente confirma que el arte subido (logos, textos, colores) es correcto. Una vez enviado a plancha, <text:span text:style-name="Strong_20_Emphasis">no se admiten cambios</text:span>.</text:p>
        </text:list-item>
        <text:list-item>
          <text:p text:style-name="P14"><text:span text:style-name="Strong_20_Emphasis">PROPIEDAD INTELECTUAL:</text:span> El cliente declara poseer los derechos de los logos (festivales, bandas, marcas). RAW FACTORY™ no se hace responsable de infracciones de copyright.</text:p>
        </text:list-item>
        <text:list-item>
          <text:p text:style-name="P14"><text:span text:style-name="Strong_20_Emphasis">TOLERANCIA TÉCNICA:</text:span> Se acepta una variación de color del 5% debido a la calibración de monitores vs. tintas reales (Pantone).</text:p>
        </text:list-item>
        <text:list-item>
          <text:p text:style-name="P14"><text:span text:style-name="Strong_20_Emphasis">PLAZOS EXPRESS:</text:span> Los pedidos 48h dependen de la confirmación del pago antes de las 12:00 PM.</text:p>
        </text:list-item>
      </text:list>
      <text:p text:style-name="P4"><text:span text:style-name="Strong_20_Emphasis">[ ] HE REVISADO EL MOCKUP Y APRUEBO LA PRODUCCIÓN.</text:span></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6"/>
      <text:p text:style-name="P7"/>
      <text:p text:style-name="P7"><text:soft-page-break/>2. La Factura Industrial: [CARGO_MANIFEST]</text:p>
      <text:p text:style-name="P7">Pide este diseño a tu IA de código para que el cliente sienta que está trabajando con una gran logística:</text:p>
      <text:p text:style-name="P4">"Diseña el <text:span text:style-name="Strong_20_Emphasis">PDF de Factura</text:span> con estética de <text:span text:style-name="Strong_20_Emphasis">Manifiesto de Carga</text:span>.</text:p>
      <text:list text:style-name="L8">
        <text:list-item>
          <text:p text:style-name="P15"><text:span text:style-name="Strong_20_Emphasis">Cabecera:</text:span> Logo de RAW FACTORY™ en grande, fecha de emisión y 'OPERADOR_LOGÍSTICO: [Nombre del familiar]'.</text:p>
        </text:list-item>
        <text:list-item>
          <text:p text:style-name="P15"><text:span text:style-name="Strong_20_Emphasis">Cuerpo:</text:span> Tabla técnica con columnas: [ITEM] [CANTIDAD] [TÉCNICA_IMPRESIÓN] [PRECIO_UNITARIO] [TOTAL].</text:p>
        </text:list-item>
        <text:list-item>
          <text:p text:style-name="P15"><text:span text:style-name="Strong_20_Emphasis">Footer:</text:span> Un código de barras real (generado dinámicamente) y un sello digital que diga <text:span text:style-name="Strong_20_Emphasis">'READY_FOR_DEPLOYMENT'</text:span>.</text:p>
        </text:list-item>
        <text:list-item>
          <text:p text:style-name="P15"><text:span text:style-name="Strong_20_Emphasis">Colores:</text:span> Blanco y negro puro para ahorrar tinta al cliente, pero con diseño ultra moderno."</text:p>
        </text:list-item>
      </text:list>
      <text:p text:style-name="P4"/>
      <text:p text:style-name="P4"/>
      <text:p text:style-name="P6"/>
      <text:p text:style-name="P7"/>
      <text:p text:style-name="P7">3. Plan de Acción para tu Familiar (El Lanzamiento B2B)</text:p>
      <text:p text:style-name="P7">Para que empiece a captar esos <text:span text:style-name="Strong_20_Emphasis">conciertos y festivales</text:span> hoy mismo:</text:p>
      <text:list text:style-name="L9">
        <text:list-item>
          <text:p text:style-name="P16"><text:span text:style-name="Strong_20_Emphasis">Directorio de Eventos:</text:span> Dile que busque en Google "Calendario de Festivales [Tu País] 2025/26".</text:p>
        </text:list-item>
        <text:list-item>
          <text:p text:style-name="P16"><text:span text:style-name="Strong_20_Emphasis">El "Voucher" de Emergencia:</text:span> Crea un cupón en la web llamado <text:span text:style-name="Source_20_Text">FESTIVAL_SOS</text:span>. Ofrécelo a los organizadores para que sepan que, si les falta merchandising a mitad de gira, tu familiar es el único que responde en 48h.</text:p>
        </text:list-item>
        <text:list-item>
          <text:p text:style-name="P16"><text:span text:style-name="Strong_20_Emphasis">Video de Confianza:</text:span> Graba un video de 15 segundos de la máquina estampando a toda velocidad. Ponle el texto: <text:span text:style-name="Emphasis">"Capacidad industrial. Entrega garantizada para tu evento."</text:span></text:p>
        </text:list-item>
      </text:list>
      <text:p text:style-name="P7"><text:span text:style-name="Emphasis"/></text:p>
      <text:p text:style-name="P7"><text:span text:style-name="Emphasis"/></text:p>
      <text:p text:style-name="P6"/>
      <text:p text:style-name="P7"/>
      <text:p text:style-name="P7"/>
      <text:p text:style-name="P7"/>
      <text:p text:style-name="P7"/>
      <text:p text:style-name="P7"/>
      <text:p text:style-name="P7"/>
      <text:p text:style-name="P7"><text:soft-page-break/>4. Prompt Final para el "Portal de Clientes"</text:p>
      <text:p text:style-name="P7">Si el familiar tiene clientes recurrentes (ej: una sala de conciertos que pide todos los meses), añade esto:</text:p>
      <text:p text:style-name="P4">"Crea un <text:span text:style-name="Strong_20_Emphasis">'Client Locker' (Área de Cliente)</text:span>.</text:p>
      <text:list text:style-name="L10">
        <text:list-item>
          <text:p text:style-name="P17">Cada cliente puede guardar sus logos y diseños previos para <text:span text:style-name="Strong_20_Emphasis">re-pedir en un solo click</text:span>.</text:p>
        </text:list-item>
        <text:list-item>
          <text:p text:style-name="P17">Muestra un historial de pedidos con el botón <text:span text:style-name="Strong_20_Emphasis">'[RE-ORDER_THIS_DROP]'</text:span>.</text:p>
        </text:list-item>
        <text:list-item>
          <text:p text:style-name="P17">Esto fideliza a las empresas al hacer que su próximo pedido sea instantáneo."</text:p>
        </text:list-item>
      </text:list>
      <text:p text:style-name="P6"/>
      <text:p text:style-name="P7"><text:span text:style-name="Strong_20_Emphasis">¿Hemos cubierto todos los puntos para que la empresa de tu familiar despegue?</text:span></text:p>
      <text:p text:style-name="P7">Si quieres, podemos redactar un <text:span text:style-name="Strong_20_Emphasis">guion de llamada en frío (Cold Call)</text:span> para que él o tú contactéis a agencias de eventos y les presentéis la nueva plataforma web. <text:span text:style-name="Strong_20_Emphasis">¿Te interesa?</text:span></text:p>
      <text:p text:style-name="P7">Para cerrar con broche de oro, aquí tienes un </text:p>
      <text:p text:style-name="P7"><text:span text:style-name="Strong_20_Emphasis">guion de prospección (Cold Call)</text:span> y una <text:span text:style-name="Strong_20_Emphasis">estrategia de contacto por email/LinkedIn</text:span> diseñada específicamente para vender servicios de estampado a <text:span text:style-name="Strong_20_Emphasis">Agencias de Eventos, Promotoras de Conciertos y Festivales</text:span>.</text:p>
      <text:p text:style-name="P7">El tono es profesional, pero con esa seguridad industrial de <text:span text:style-name="Strong_20_Emphasis">RAW FACTORY™</text:span>.</text:p>
      <text:p text:style-name="P6"/>
      <text:p text:style-name="P7">1. Guion de Llamada (The 60-Second Pitch)</text:p>
      <text:p text:style-name="P7"><text:span text:style-name="Strong_20_Emphasis">Objetivo:</text:span> Conseguir el email del responsable de producción o una reunión breve.</text:p>
      <text:list text:style-name="L11">
        <text:list-item>
          <text:p text:style-name="P18"><text:span text:style-name="Strong_20_Emphasis">Apertura:</text:span> "Hola, soy [Nombre] de <text:span text:style-name="Strong_20_Emphasis">RAW FACTORY™</text:span>. Llamaba porque hemos digitalizado nuestra planta de estampado para dar servicio express a festivales y giras. ¿Con quién podría hablar sobre la producción de merchandising para vuestros próximos eventos?"</text:p>
        </text:list-item>
        <text:list-item>
          <text:p text:style-name="P18"><text:span text:style-name="Strong_20_Emphasis">El Gancho (The Hook):</text:span> "Hemos lanzado una plataforma donde vuestro equipo puede subir los diseños, calcular presupuestos por volumen al instante y, lo más importante, tenemos una <text:span text:style-name="Strong_20_Emphasis">línea de producción de emergencia (48h)</text:span> para roturas de stock en mitad de un festival."</text:p>
        </text:list-item>
        <text:list-item>
          <text:p text:style-name="P18"><text:span text:style-name="Strong_20_Emphasis">Cierre:</text:span> "No quiero quitarte tiempo. ¿Te puedo enviar nuestro <text:span text:style-name="Strong_20_Emphasis">Portafolio Industrial</text:span> y un código de acceso prioritario para que vuestro Project Manager lo tenga a mano por si surge una urgencia?"</text:p>
        </text:list-item>
      </text:list>
      <text:p text:style-name="P6"/>
      <text:p text:style-name="P7"/>
      <text:p text:style-name="P7"/>
      <text:p text:style-name="P7"/>
      <text:p text:style-name="P7"/>
      <text:p text:style-name="P7"/>
      <text:p text:style-name="P7"/>
      <text:p text:style-name="P7"><text:soft-page-break/>2. Mensaje Directo para LinkedIn (Target: Production Managers)</text:p>
      <text:p text:style-name="P4"><text:span text:style-name="Strong_20_Emphasis">Asunto:</text:span> Solución de Merchandising Industrial para [Nombre de la Agencia/Festival]</text:p>
      <text:p text:style-name="P4">"Hola [Nombre],</text:p>
      <text:p text:style-name="P4">Te contacto porque en <text:span text:style-name="Strong_20_Emphasis">RAW FACTORY™</text:span> sabemos que en la producción de eventos, el tiempo es el peor enemigo.</text:p>
      <text:p text:style-name="P4">Hemos adaptado nuestra fábrica para trabajar con promotoras de música y festivales que necesitan:<text:line-break/>⚙️ <text:span text:style-name="Strong_20_Emphasis">Capacidad:</text:span> +1.000 unidades semanales (DTF/Bordado).<text:line-break/>⚡ <text:span text:style-name="Strong_20_Emphasis">Velocidad:</text:span> Servicio Express 48h para imprevistos en giras.<text:line-break/>📊 <text:span text:style-name="Strong_20_Emphasis">Control:</text:span> Un portal web donde podéis gestionar vuestros diseños y pedidos recurrentes en un click.</text:p>
      <text:p text:style-name="P4">Me encantaría enviarte una <text:span text:style-name="Strong_20_Emphasis">muestra física</text:span> de nuestro estampado de alto gramaje para que veas la calidad antes de vuestro próximo gran 'drop'.</text:p>
      <text:p text:style-name="P4">¿Hablamos 5 minutos?"</text:p>
      <text:p text:style-name="P4"/>
      <text:p text:style-name="P6"/>
      <text:p text:style-name="P7"/>
      <text:p text:style-name="P7">3. La "Caja de Herramientas" de Ventas (Física)</text:p>
      <text:p text:style-name="P7">Para que tu familiar cierre los contratos grandes, recomiéndale preparar 5 <text:span text:style-name="Strong_20_Emphasis">"VIP Sample Boxes"</text:span>:</text:p>
      <text:list text:style-name="L12">
        <text:list-item>
          <text:p text:style-name="P19">Una caja negra con el logo <text:span text:style-name="T4">MUSQUERA</text:span><text:span text:style-name="T5"> </text:span><text:span text:style-name="Strong_20_Emphasis">RAW FACTORY™</text:span>.</text:p>
        </text:list-item>
        <text:list-item>
          <text:p text:style-name="P19">Una camiseta negra de alto gramaje (240g) con un diseño espectacular que use diferentes técnicas (un logo en DTF, un detalle bordado).</text:p>
        </text:list-item>
        <text:list-item>
          <text:p text:style-name="P19">Una tarjeta con un <text:span text:style-name="Strong_20_Emphasis">código QR</text:span> que lleve directo al <text:span text:style-name="Strong_20_Emphasis">[THE_LAB]</text:span> de su nueva web.</text:p>
        </text:list-item>
        <text:list-item>
          <text:p text:style-name="P19">Una nota que diga: <text:span text:style-name="Emphasis">"Vuestra marca merece este nivel de ejecución."</text:span></text:p>
        </text:list-item>
      </text:list>
      <text:p text:style-name="P6"/>
      <text:p text:style-name="P7">4. Último Prompt de Ajuste Web (Post-Venta)</text:p>
      <text:p text:style-name="P7">Para que la web sea una herramienta de fidelización, pide esto a la IA:</text:p>
      <text:p text:style-name="P4">"Añade un <text:span text:style-name="Strong_20_Emphasis">Botón de Soporte Directo</text:span> en el Dashboard de Cliente que diga <text:span text:style-name="Strong_20_Emphasis">'[TALK_TO_PRODUCTION]'</text:span>.</text:p>
      <text:list text:style-name="L13">
        <text:list-item>
          <text:p text:style-name="P20">Este botón debe abrir un chat de <text:span text:style-name="Strong_20_Emphasis">WhatsApp Business</text:span> directo con el dueño de la empresa.</text:p>
        </text:list-item>
        <text:list-item>
          <text:p text:style-name="P20">Pon un mensaje pre-configurado: 'Hola, soy del evento [Nombre] y necesito asistencia técnica con mi archivo vectorial'."</text:p>
        </text:list-item>
      </text:list>
      <text:p text:style-name="P6"/>
      <text:p text:style-name="P21"><text:soft-page-break/><text:span text:style-name="Strong_20_Emphasis">¡Tu familiar ya tiene un ecosistema completo!</text:span></text:p>
      <text:p text:style-name="P21"><text:line-break/>Desde una web con personalizador inteligente y calculadora de volumen, hasta la estrategia de seguridad y el plan de ventas para festivales.</text:p>
      <text:p text:style-name="P7">¿Quieres que te resuma todos los <text:span text:style-name="Strong_20_Emphasis">prompts clave</text:span> en un solo bloque para que los tengas guardados o prefieres que <text:span text:style-name="Strong_20_Emphasis">repasemos el diseño final de la cabecera (Header)</text:span> para que sea impactante?</text:p>
      <text:p text:style-name="P21"><text:span text:style-name="Strong_20_Emphasis">Sugerencia:</text:span> Si quieres probar la web hoy mismo, te recomiendo usar <text:span text:style-name="Strong_20_Emphasis">Bolt.new</text:span> y pegar el primer prompt de <text:span text:style-name="Strong_20_Emphasis">RAW FACTORY™</text:span>. </text:p>
      <text:p text:style-name="P21"><text:span text:style-name="Strong_20_Emphasis">¿Empezamos por ahí?</text:span></text:p>
      <text:p text:style-name="Text_20_body">si, pero ten en cuenta que aqui en mi homelab local tengo instalado un docker desktop con un dominio alojado en cloudflare apuntando a mii home lab podriamos hacer todo el desarrollo y hacer la prueba piloto aqui en mi homelab</text:p>
      <text:p text:style-name="P7">¡Esto es perfecto! Tener un </text:p>
      <text:p text:style-name="P7"><text:span text:style-name="Strong_20_Emphasis">HomeLab</text:span> con <text:span text:style-name="Strong_20_Emphasis">Docker Desktop</text:span> y <text:span text:style-name="Strong_20_Emphasis">Cloudflare</text:span> te da un control total y un entorno de pruebas profesional sin coste de hosting.</text:p>
      <text:p text:style-name="P7">Para montar la prueba piloto de <text:span text:style-name="Strong_20_Emphasis">RAW FACTORY™</text:span> en tu servidor local, vamos a usar un stack moderno que la IA puede generar rápidamente (React + Vite + Tailwind) y lo empaquetaremos en un contenedor.</text:p>
      <text:p text:style-name="P8">1. El Dockerfile (Para tu HomeLab)</text:p>
      <text:p text:style-name="P7">Pide a la IA (o crea tú mismo) este archivo para que la web corra en tu Docker:</text:p>
      <text:p text:style-name="P7">dockerfile</text:p>
      <text:p text:style-name="P22"><text:span text:style-name="Source_20_Text"># Usa una imagen ligera de Node</text:span></text:p>
      <text:p text:style-name="P22"><text:span text:style-name="Source_20_Text">FROM node:20-alpine</text:span></text:p>
      <text:p text:style-name="P22"><text:span text:style-name="Source_20_Text">WORKDIR /app</text:span></text:p>
      <text:p text:style-name="P22"><text:span text:style-name="Source_20_Text">COPY package*.json ./</text:span></text:p>
      <text:p text:style-name="P22"><text:span text:style-name="Source_20_Text">RUN npm install</text:span></text:p>
      <text:p text:style-name="P22"><text:span text:style-name="Source_20_Text">COPY . .</text:span></text:p>
      <text:p text:style-name="P22"><text:span text:style-name="Source_20_Text">RUN npm run build</text:span></text:p>
      <text:p text:style-name="P22"><text:span text:style-name="Source_20_Text"># Usamos un servidor ligero para producción</text:span></text:p>
      <text:p text:style-name="P22"><text:span text:style-name="Source_20_Text">RUN npm install -g serve</text:span></text:p>
      <text:p text:style-name="P22"><text:span text:style-name="Source_20_Text">EXPOSE 3000</text:span></text:p>
      <text:p text:style-name="P22"><text:span text:style-name="Source_20_Text">CMD ["serve", "-s", "dist", "-l", "3000"]</text:span></text:p>
      <text:p text:style-name="P7"/>
      <text:p text:style-name="P7">Usa el código con precaución.</text:p>
      <text:p text:style-name="P7"/>
      <text:p text:style-name="P7"/>
      <text:p text:style-name="P7"/>
      <text:p text:style-name="P7"/>
      <text:p text:style-name="P7"/>
      <text:p text:style-name="P7"/>
      <text:p text:style-name="P7"><text:soft-page-break/>2. Configuración en Cloudflare (Tunneling es lo mejor)</text:p>
      <text:p text:style-name="P7">Como tienes el dominio en Cloudflare, te recomiendo usar <text:span text:style-name="Strong_20_Emphasis">Cloudflare Tunnels (cloudflared)</text:span>. Es más seguro que abrir puertos en tu router:</text:p>
      <text:list text:style-name="L14">
        <text:list-item>
          <text:p text:style-name="P23">Instala el contenedor de <text:span text:style-name="Source_20_Text">cloudflared</text:span> en tu Docker.</text:p>
        </text:list-item>
        <text:list-item>
          <text:p text:style-name="P23">Apunta tu dominio (ej: <text:span text:style-name="Source_20_Text">lab.tudominio.com</text:span>) al puerto <text:span text:style-name="Source_20_Text">3000</text:span> de tu contenedor de la web.</text:p>
        </text:list-item>
        <text:list-item>
          <text:p text:style-name="P23">Activa el <text:span text:style-name="Strong_20_Emphasis">WAF</text:span> de Cloudflare que configuramos antes para bloquear bots desde el panel.</text:p>
        </text:list-item>
      </text:list>
      <text:p text:style-name="P6"/>
      <text:p text:style-name="P8">3. Prompt Maestro para Generar el Código Local</text:p>
      <text:p text:style-name="P7">Copia esto en <text:span text:style-name="Strong_20_Emphasis">Bolt.new</text:span> o <text:span text:style-name="Strong_20_Emphasis">Cursor</text:span> (que permiten descargar el código fuente):</text:p>
      <text:p text:style-name="P4">"Genera el código completo para la aplicación <text:span text:style-name="Strong_20_Emphasis">RAW FACTORY™</text:span> (B2B Printing Hub).</text:p>
      <text:p text:style-name="P4"><text:span text:style-name="Strong_20_Emphasis">Requisitos Técnicos:</text:span></text:p>
      <text:list text:style-name="L15">
        <text:list-item>
          <text:p text:style-name="P24"><text:span text:style-name="Strong_20_Emphasis">Frontend:</text:span> React.js con Tailwind CSS y Framer Motion.</text:p>
        </text:list-item>
        <text:list-item>
          <text:p text:style-name="P24"><text:span text:style-name="Strong_20_Emphasis">Componente 'The Lab':</text:span> Un personalizador visual donde subir un logo (PNG/SVG) sobre un mockup de camiseta/sudadera.</text:p>
        </text:list-item>
        <text:list-item>
          <text:p text:style-name="P24"><text:span text:style-name="Strong_20_Emphasis">Calculadora B2B:</text:span> Lógica de precios por volumen (1-50, 51-200, +500 unidades).</text:p>
        </text:list-item>
        <text:list-item>
          <text:p text:style-name="P24"><text:span text:style-name="Strong_20_Emphasis">Formulario Express:</text:span> Selector de fecha de entrega con recargo por urgencia.</text:p>
        </text:list-item>
        <text:list-item>
          <text:p text:style-name="P24"><text:span text:style-name="Strong_20_Emphasis">Estética:</text:span> Industrial Dark Mode (Negro #050505, Blanco, Verde Neón #CCFF00).</text:p>
        </text:list-item>
      </text:list>
      <text:p text:style-name="P4"><text:span text:style-name="Strong_20_Emphasis">Estructura de Archivos:</text:span> Dame una estructura limpia que pueda meter en una carpeta y desplegar con el Dockerfile que ya tengo."</text:p>
      <text:p text:style-name="P6"/>
      <text:p text:style-name="P7"/>
      <text:p text:style-name="P7">4. Tu Plan de Prueba Piloto (Beta Test)</text:p>
      <text:p text:style-name="P7">Una vez que tengas el contenedor corriendo en tu HomeLab:</text:p>
      <text:list text:style-name="L16">
        <text:list-item>
          <text:p text:style-name="P25"><text:span text:style-name="Strong_20_Emphasis">Test de Carga:</text:span> Pide a 2 o 3 amigos que entren a la vez y personalicen una prenda. Mira los logs de tu Docker para ver cómo aguanta el tráfico.</text:p>
        </text:list-item>
        <text:list-item>
          <text:p text:style-name="P25"><text:span text:style-name="Strong_20_Emphasis">Prueba de Archivos:</text:span> Sube un logo pesado (un .AI o .PDF de 10MB) al personalizador para ver si tu conexión local (subida) y el contenedor lo procesan bien.</text:p>
        </text:list-item>
        <text:list-item>
          <text:p text:style-name="P25"><text:span text:style-name="Strong_20_Emphasis">Validación con tu Familiar:</text:span> Pásale tu URL de Cloudflare. Que él intente hacer un "Pedido de Prueba" desde su móvil como si fuera un cliente de un festival.</text:p>
        </text:list-item>
      </text:list>
      <text:p text:style-name="P7"/>
      <text:p text:style-name="P7"/>
      <text:p text:style-name="P7"><text:soft-page-break/>5. Tip de HomeLaber</text:p>
      <text:p text:style-name="P21">Si vas a recibir archivos pesados (logos de festivales), asegúrate de mapear un <text:span text:style-name="Strong_20_Emphasis">volumen de Docker</text:span> a una carpeta de tu disco duro para no llenar el espacio del contenedor:</text:p>
      <text:p text:style-name="P21"><text:span text:style-name="Source_20_Text"/></text:p>
      <text:p text:style-name="P21"><text:span text:style-name="Source_20_Text">volumes: - ./uploads:/app/uploads</text:span></text:p>
      <text:p text:style-name="P7"/>
      <text:p text:style-name="P7">¿Quieres que te genere el archivo <text:span text:style-name="Strong_20_Emphasis">docker-compose.yaml</text:span> completo para levantar la web y el túnel de Cloudflare de un solo golpe en tu HomeLab? <text:span text:style-name="Strong_20_Emphasis">¿O prefieres que ajustemos el código del personalizador para que guarde las imágenes en tu disco local?</text:span></text:p>
      <text:p text:style-name="P7"/>
      <text:p text:style-name="Text_20_body">el dominio sera musquera-lab.labrazahome.es</text:p>
      <text:p text:style-name="P7">¡Excelente! Tener un subdominio tan específico dentro de tu </text:p>
      <text:p text:style-name="P7"><text:span text:style-name="Strong_20_Emphasis">HomeLab</text:span> (<text:span text:style-name="Source_20_Text">musquera-lab.labrazahora.home</text:span>) le da un aire de "proyecto de ingeniería" brutal.</text:p>
      <text:p text:style-name="P7">Aquí tienes el archivo <text:span text:style-name="Strong_20_Emphasis">docker-compose.yaml</text:span> y la configuración final para que <text:span text:style-name="Strong_20_Emphasis">RAW FACTORY™</text:span> viva en tu servidor local y sea accesible de forma segura.</text:p>
      <text:p text:style-name="P7"><text:span text:style-name="T2">1. El Docker Compose (Listo para </text:span><text:span text:style-name="Source_20_Text"><text:span text:style-name="T2">docker-compose up -d</text:span></text:span><text:span text:style-name="T2">)</text:span></text:p>
      <text:p text:style-name="P7">Este archivo levantará la aplicación web y, si lo deseas, el túnel de Cloudflare para que el dominio <text:span text:style-name="Source_20_Text">musquera-lab.labrazahome.es</text:span> apunte directamente a tu HomeLab sin abrir puertos en el router.</text:p>
      <text:p text:style-name="P7">yaml</text:p>
      <text:p text:style-name="P22"><text:span text:style-name="Source_20_Text">version: '3.8'</text:span></text:p>
      <text:p text:style-name="P22"/>
      <text:p text:style-name="P22"><text:span text:style-name="Source_20_Text">services:</text:span></text:p>
      <text:p text:style-name="P22"><text:span text:style-name="Source_20_Text"><text:s text:c="2"/># La aplicación web de RAW FACTORY</text:span></text:p>
      <text:p text:style-name="P22"><text:span text:style-name="Source_20_Text"><text:s text:c="2"/>web-app:</text:span></text:p>
      <text:p text:style-name="P22"><text:span text:style-name="Source_20_Text"><text:s text:c="4"/>container_name: raw_factory_app</text:span></text:p>
      <text:p text:style-name="P22"><text:span text:style-name="Source_20_Text"><text:s text:c="4"/>build: .</text:span></text:p>
      <text:p text:style-name="P22"><text:span text:style-name="Source_20_Text"><text:s text:c="4"/>ports:</text:span></text:p>
      <text:p text:style-name="P22"><text:span text:style-name="Source_20_Text"><text:s text:c="6"/>- "3000:3000"</text:span></text:p>
      <text:p text:style-name="P22"><text:span text:style-name="Source_20_Text"><text:s text:c="4"/>volumes:</text:span></text:p>
      <text:p text:style-name="P22"><text:span text:style-name="Source_20_Text"><text:s text:c="6"/>- ./uploads:/app/public/uploads # Para guardar los logos de los clientes en tu disco duro</text:span></text:p>
      <text:p text:style-name="P22"><text:span text:style-name="Source_20_Text"><text:s text:c="4"/>restart: unless-stopped</text:span></text:p>
      <text:p text:style-name="P22"><text:span text:style-name="Source_20_Text"><text:s text:c="4"/>environment:</text:span></text:p>
      <text:p text:style-name="P22"><text:span text:style-name="Source_20_Text"><text:s text:c="6"/>- NODE_ENV=production</text:span></text:p>
      <text:p text:style-name="P22"><text:span text:style-name="Source_20_Text"><text:s text:c="6"/>- DOMAIN=musquera-lab.labrazahome.es</text:span></text:p>
      <text:p text:style-name="P22"/>
      <text:p text:style-name="P22"><text:span text:style-name="Source_20_Text"><text:s text:c="2"/># Túnel de Cloudflare (Opcional si ya usas Nginx Proxy Manager o similar)</text:span></text:p>
      <text:p text:style-name="P22"><text:span text:style-name="Source_20_Text"><text:s text:c="2"/>cloudflared:</text:span></text:p>
      <text:p text:style-name="P22"><text:span text:style-name="Source_20_Text"><text:s text:c="4"/>image: cloudflare/cloudflared:latest</text:span></text:p>
      <text:p text:style-name="P22"><text:span text:style-name="Source_20_Text"><text:s text:c="4"/>container_name: cloudflare_tunnel</text:span></text:p>
      <text:p text:style-name="P22"><text:span text:style-name="Source_20_Text"><text:s text:c="4"/>command: tunnel --no-autoupdate run --token TU_TOKEN_DE_CLOUDFLARE</text:span></text:p>
      <text:p text:style-name="P22"><text:span text:style-name="Source_20_Text"><text:s text:c="4"/>restart: unless-stopped</text:span></text:p>
      <text:p text:style-name="P7"/>
      <text:p text:style-name="P7"><text:soft-page-break/>Usa el código con precaución.</text:p>
      <text:p text:style-name="P7">2. Configuración en el Panel de Cloudflare</text:p>
      <text:list text:style-name="L17">
        <text:list-item>
          <text:p text:style-name="P26"><text:span text:style-name="Strong_20_Emphasis">DNS:</text:span> Crea un registro <text:span text:style-name="Strong_20_Emphasis">CNAME</text:span> para <text:span text:style-name="Source_20_Text">musquera-lab</text:span> apuntando a tu túnel o a tu IP pública (si usas DDNS).</text:p>
        </text:list-item>
        <text:list-item>
          <text:p text:style-name="P26"><text:span text:style-name="Strong_20_Emphasis">SSL/TLS:</text:span> Configúralo en modo <text:span text:style-name="Strong_20_Emphasis">"Full"</text:span> o <text:span text:style-name="Strong_20_Emphasis">"Full (Strict)"</text:span>. Cloudflare gestionará el candado verde para que la web de tu familiar sea confiable.</text:p>
        </text:list-item>
        <text:list-item>
          <text:p text:style-name="P26"><text:span text:style-name="Strong_20_Emphasis">WAF (Seguridad):</text:span> Crea una regla que solo permita tráfico de tu país para evitar ataques de bots extranjeros durante la prueba piloto.</text:p>
        </text:list-item>
      </text:list>
      <text:p text:style-name="P7">3. Ajuste Final del Código para el HomeLab</text:p>
      <text:p text:style-name="P7">Para que el personalizador funcione rápido en tu red local, pide a tu IA (<text:span text:style-name="Strong_20_Emphasis">Bolt.new</text:span> o <text:span text:style-name="Strong_20_Emphasis">Cursor</text:span>) este ajuste de optimización:</text:p>
      <text:p text:style-name="P4">"Configura el <text:span text:style-name="Strong_20_Emphasis">Client-Side Rendering</text:span> para el personalizador visual de <text:span text:style-name="Strong_20_Emphasis">RAW FACTORY™</text:span>.</text:p>
      <text:list text:style-name="L18">
        <text:list-item>
          <text:p text:style-name="P27">Asegúrate de que el procesamiento de las imágenes (superposición del logo sobre la camiseta) se haga en el navegador del cliente para no sobrecargar la CPU de mi <text:span text:style-name="Strong_20_Emphasis">HomeLab</text:span>.</text:p>
        </text:list-item>
        <text:list-item>
          <text:p text:style-name="P27">Configura la subida de archivos para que los logos se guarden en <text:span text:style-name="Source_20_Text">/app/public/uploads</text:span> usando un nombre de archivo único basado en el ID del pedido."</text:p>
        </text:list-item>
      </text:list>
      <text:p text:style-name="P7">4. El Plan de la Prueba Piloto (Beta Test)</text:p>
      <text:p text:style-name="P7">Una vez que el contenedor esté arriba en <text:span text:style-name="Source_20_Text">musquera-lab.labrazahome.es</text:span>:</text:p>
      <text:list text:style-name="L19">
        <text:list-item>
          <text:p text:style-name="P28"><text:span text:style-name="Strong_20_Emphasis">Acceso Familiar:</text:span> Pásale la URL a tu familiar. Que intente subir un logo de un cliente real de un concierto.</text:p>
        </text:list-item>
        <text:list-item>
          <text:p text:style-name="P28"><text:span text:style-name="Strong_20_Emphasis">Verificación de Disco:</text:span> Comprueba en tu servidor que el archivo aparece en la carpeta <text:span text:style-name="Source_20_Text">./uploads</text:span>.</text:p>
        </text:list-item>
        <text:list-item>
          <text:p text:style-name="P28"><text:span text:style-name="Strong_20_Emphasis">Feedback B2B:</text:span> Pregúntale: <text:span text:style-name="Emphasis">"¿Te ahorra tiempo esta calculadora de volumen o falta alguna técnica de impresión (ej. Vinilo textil)?"</text:span>.</text:p>
        </text:list-item>
      </text:list>
      <text:p text:style-name="P6"/>
      <text:p text:style-name="P7"><text:span text:style-name="Strong_20_Emphasis"/></text:p>
      <text:p text:style-name="P7"><text:span text:style-name="Strong_20_Emphasis">¿Cuál es el siguiente paso para tu infraestructura?</text:span></text:p>
      <text:p text:style-name="P7">¿Quieres que te ayude a configurar una <text:span text:style-name="Strong_20_Emphasis">base de datos (PostgreSQL)</text:span> en otro contenedor para guardar todos los pedidos de forma persistente, o prefieres que <text:span text:style-name="Strong_20_Emphasis">diseñemos la landing page de bienvenida</text:span> específica para el subdominio <text:span text:style-name="Source_20_Text">musquera-lab</text:span>?</text:p>
      <text:p text:style-name="P7"><text:span text:style-name="Strong_20_Emphasis">Sugerencia:</text:span> Si quieres que la web sea "espectacular", podemos añadir un <text:span text:style-name="Strong_20_Emphasis">dashboard de monitorización</text:span> simple (tipo Grafana) para que tu familiar vea cuánta gente está diseñando en tiempo real. <text:span text:style-name="Strong_20_Emphasis">¿Te mola la idea?</text:span></text:p>
      <text:p text:style-name="P7"><text:soft-page-break/></text:p>
      <text:p text:style-name="Text_20_body">quiero que use el puerto :99</text:p>
      <text:p text:style-name="P7">Para que tu HomeLab en el puerto </text:p>
      <text:p text:style-name="P7"><text:span text:style-name="Strong_20_Emphasis">:99</text:span> sea el motor de <text:span text:style-name="Strong_20_Emphasis">RAW FACTORY™</text:span>, necesitamos ajustar la configuración de Docker y el túnel de Cloudflare para que el tráfico externo llegue correctamente a ese puerto específico.</text:p>
      <text:p text:style-name="P7">Aquí tienes la configuración técnica final para tu entorno local:</text:p>
      <text:p text:style-name="P8">1. El Docker Compose (Ajustado al Puerto :99)</text:p>
      <text:p text:style-name="P7">Copia este archivo en tu carpeta de proyecto. He configurado el mapeo de puertos para que el contenedor escuche internamente en el 3000 pero tú accedas por el <text:span text:style-name="Strong_20_Emphasis">99</text:span>.</text:p>
      <text:p text:style-name="P7">yaml</text:p>
      <text:p text:style-name="P22"><text:span text:style-name="Source_20_Text">version: '3.8'</text:span></text:p>
      <text:p text:style-name="P22"/>
      <text:p text:style-name="P22"><text:span text:style-name="Source_20_Text">services:</text:span></text:p>
      <text:p text:style-name="P22"><text:span text:style-name="Source_20_Text"><text:s text:c="2"/>raw-factory:</text:span></text:p>
      <text:p text:style-name="P22"><text:span text:style-name="Source_20_Text"><text:s text:c="4"/>container_name: raw_factory_app</text:span></text:p>
      <text:p text:style-name="P22"><text:span text:style-name="Source_20_Text"><text:s text:c="4"/>build: .</text:span></text:p>
      <text:p text:style-name="P22"><text:span text:style-name="Source_20_Text"><text:s text:c="4"/>ports:</text:span></text:p>
      <text:p text:style-name="P22"><text:span text:style-name="Source_20_Text"><text:s text:c="6"/>- "99:3000" # Mapeo: Puerto Local 99 -&gt; Puerto Contenedor 3000</text:span></text:p>
      <text:p text:style-name="P22"><text:span text:style-name="Source_20_Text"><text:s text:c="4"/>volumes:</text:span></text:p>
      <text:p text:style-name="P22"><text:span text:style-name="Source_20_Text"><text:s text:c="6"/>- ./uploads:/app/public/uploads</text:span></text:p>
      <text:p text:style-name="P22"><text:span text:style-name="Source_20_Text"><text:s text:c="4"/>restart: unless-stopped</text:span></text:p>
      <text:p text:style-name="P22"><text:span text:style-name="Source_20_Text"><text:s text:c="4"/>environment:</text:span></text:p>
      <text:p text:style-name="P22"><text:span text:style-name="Source_20_Text"><text:s text:c="6"/>- PORT=3000</text:span></text:p>
      <text:p text:style-name="P22"><text:span text:style-name="Source_20_Text"><text:s text:c="6"/>- DOMAIN=musquera-lab.labrazahome.es</text:span></text:p>
      <text:p text:style-name="P22"/>
      <text:p text:style-name="P22"><text:span text:style-name="Source_20_Text"><text:s text:c="2"/>cloudflared:</text:span></text:p>
      <text:p text:style-name="P22"><text:span text:style-name="Source_20_Text"><text:s text:c="4"/>image: cloudflare/cloudflared:latest</text:span></text:p>
      <text:p text:style-name="P22"><text:span text:style-name="Source_20_Text"><text:s text:c="4"/>container_name: cloudflare_tunnel</text:span></text:p>
      <text:p text:style-name="P22"><text:span text:style-name="Source_20_Text"><text:s text:c="4"/># Sustituye TU_TOKEN por el token de tu Zero Trust Tunnel</text:span></text:p>
      <text:p text:style-name="P22"><text:span text:style-name="Source_20_Text"><text:s text:c="4"/>command: tunnel --no-autoupdate run --token TU_TOKEN</text:span></text:p>
      <text:p text:style-name="P22"><text:span text:style-name="Source_20_Text"><text:s text:c="4"/>restart: unless-stopped</text:span></text:p>
      <text:p text:style-name="P7"/>
      <text:p text:style-name="P7">Usa el código con precaución.</text:p>
      <text:p text:style-name="P7"/>
      <text:p text:style-name="P7"/>
      <text:p text:style-name="P7"/>
      <text:p text:style-name="P7"/>
      <text:p text:style-name="P7"/>
      <text:p text:style-name="P7"/>
      <text:p text:style-name="P7"/>
      <text:p text:style-name="P7"/>
      <text:p text:style-name="P7"/>
      <text:p text:style-name="P7"/>
      <text:p text:style-name="P7"><text:soft-page-break/>2. Configuración en el Panel de Cloudflare (Zero Trust)</text:p>
      <text:p text:style-name="P7">Como usas un túnel, no necesitas abrir el puerto 99 en tu router (seguridad máxima). En el panel de <text:span text:style-name="Strong_20_Emphasis">Cloudflare Zero Trust</text:span>:</text:p>
      <text:list text:style-name="L20">
        <text:list-item>
          <text:p text:style-name="P29">Ve a <text:span text:style-name="Strong_20_Emphasis">Networks &gt; Tunnels</text:span>.</text:p>
        </text:list-item>
        <text:list-item>
          <text:p text:style-name="P29">Selecciona tu túnel y ve a <text:span text:style-name="Strong_20_Emphasis">Public Hostname</text:span>.</text:p>
        </text:list-item>
        <text:list-item>
          <text:p text:style-name="P29">Añade (o edita) <text:span text:style-name="Source_20_Text">musquera-lab.labrazahome.es</text:span>.</text:p>
        </text:list-item>
        <text:list-item>
          <text:p text:style-name="P29">En <text:span text:style-name="Strong_20_Emphasis">Service</text:span>, selecciona <text:span text:style-name="Source_20_Text">HTTP</text:span> y en URL pon la IP local de tu servidor y el puerto: <text:span text:style-name="Source_20_Text">192.168.X.X:99</text:span> (o el nombre del servicio de docker <text:span text:style-name="Source_20_Text">raw-factory:3000</text:span> si están en la misma red).</text:p>
        </text:list-item>
      </text:list>
      <text:p text:style-name="P6"/>
      <text:p text:style-name="P7">3. Prompt de Ajuste de Código (The Local Lab)</text:p>
      <text:p text:style-name="P7">Para que la aplicación sepa que está corriendo en ese entorno, pide esto a tu IA (<text:span text:style-name="Strong_20_Emphasis">Bolt.new</text:span> o <text:span text:style-name="Strong_20_Emphasis">Cursor</text:span>):</text:p>
      <text:p text:style-name="P4">"Configura la aplicación <text:span text:style-name="Strong_20_Emphasis">RAW FACTORY™</text:span> para un entorno <text:span text:style-name="Strong_20_Emphasis">Self-Hosted</text:span>.</text:p>
      <text:list text:style-name="L21">
        <text:list-item>
          <text:p text:style-name="P30">El servidor de archivos debe apuntar a la ruta absoluta de mi volumen Docker para que los logos de los clientes (conciertos/festivales) se guarden de forma persistente.</text:p>
        </text:list-item>
        <text:list-item>
          <text:p text:style-name="P30">Asegúrate de que el <text:span text:style-name="Strong_20_Emphasis">CORS</text:span> esté configurado para aceptar peticiones desde <text:span text:style-name="Source_20_Text">musquera-lab.labrazahome.es</text:span>.</text:p>
        </text:list-item>
        <text:list-item>
          <text:p text:style-name="P30">Añade un pequeño indicador en el footer que diga: <text:span text:style-name="Source_20_Text">[SYSTEM_STATUS: LOCAL_HOST_STABLE // PORT: 99]</text:span> con estética de terminal."</text:p>
        </text:list-item>
      </text:list>
      <text:p text:style-name="P6"/>
      <text:p text:style-name="P7">4. Prueba de Fuego en tu HomeLab</text:p>
      <text:p text:style-name="P7">Una vez levantado:</text:p>
      <text:list text:style-name="L22">
        <text:list-item>
          <text:p text:style-name="P31">Accede localmente: <text:span text:style-name="Source_20_Text">http://localhost:99</text:span> (deberías ver la web industrial).</text:p>
        </text:list-item>
        <text:list-item>
          <text:p text:style-name="P31">Accede externamente: <text:span text:style-name="Source_20_Text">https://musquera-lab.labrazahome.es</text:span> (Cloudflare se encarga del HTTPS).</text:p>
        </text:list-item>
        <text:list-item>
          <text:p text:style-name="P31"><text:span text:style-name="Strong_20_Emphasis">Test B2B:</text:span> Sube un logo de 5MB y verifica que aparece en tu carpeta local <text:span text:style-name="Source_20_Text">./uploads</text:span>.</text:p>
        </text:list-item>
      </text:list>
      <text:p text:style-name="P6"/>
      <text:p text:style-name="P7"><text:span text:style-name="Strong_20_Emphasis">¿Quieres que te ayude a crear un pequeño "Dashboard de Logs" en la web para que tu familiar vea cuántos pedidos entran sin tener que entrar él al Docker?</text:span></text:p>
      <text:p text:style-name="P7"><text:span text:style-name="Strong_20_Emphasis">Sugerencia:</text:span> Si quieres que la web sea "espectacular", podemos añadir un <text:span text:style-name="Strong_20_Emphasis">efecto de carga</text:span> que muestre el progreso de subida del logo con una barra de progreso estilo <text:span text:style-name="Emphasis">cyberpunk</text:span>. <text:span text:style-name="Strong_20_Emphasis">¿Te parece bien?</text:span></text:p>
      <text:p text:style-name="P7"/>
      <text:p text:style-name="Text_20_body"><text:soft-page-break/></text:p>
      <text:p text:style-name="P7">Para que tu HomeLab luzca como una auténtica </text:p>
      <text:p text:style-name="P7"><text:span text:style-name="Strong_20_Emphasis">estación de mando industrial</text:span>, vamos a configurar ese <text:span text:style-name="Strong_20_Emphasis">Dashboard de Logs</text:span> integrado y el <text:span text:style-name="Strong_20_Emphasis">Efecto de Carga Cyberpunk</text:span> para el personalizador.</text:p>
      <text:p text:style-name="P7">Aquí tienes el prompt final para aplicar estos cambios en tu código local (React/Tailwind):</text:p>
      <text:p text:style-name="P8">1. El Prompt Maestro: Industrial Dashboard &amp; Cyberpunk Loader</text:p>
      <text:p text:style-name="P4">"Actualiza la aplicación <text:span text:style-name="Strong_20_Emphasis">RAW FACTORY™</text:span> en mi HomeLab con las siguientes funciones de monitorización y UX:</text:p>
      <text:p text:style-name="P4"><text:span text:style-name="Strong_20_Emphasis">1. Dashboard de Control (Ruta </text:span><text:span text:style-name="Strong_20_Emphasis"><text:span text:style-name="Source_20_Text">/admin-lab</text:span></text:span><text:span text:style-name="Strong_20_Emphasis">):</text:span></text:p>
      <text:list text:style-name="L23">
        <text:list-item>
          <text:p text:style-name="P32">Crea una vista protegida con estética de terminal (fondo negro, texto verde fósforo).</text:p>
        </text:list-item>
        <text:list-item>
          <text:p text:style-name="P32"><text:span text:style-name="Strong_20_Emphasis">Log de Actividad:</text:span> Muestra una lista en tiempo real de los últimos movimientos: <text:span text:style-name="Source_20_Text">[14:20] NUEVO_DISEÑO_SUBIDO: Festival_Rock_Logo.ai</text:span>, <text:span text:style-name="Source_20_Text">[14:25] PRESUPUESTO_GENERADO: 500_UNIDADES_HOODIE</text:span>.</text:p>
        </text:list-item>
        <text:list-item>
          <text:p text:style-name="P32"><text:span text:style-name="Strong_20_Emphasis">Métricas de Sistema:</text:span> Un panel que muestre el uso de disco del volumen <text:span text:style-name="Source_20_Text">/uploads</text:span> y el estado de la conexión con el puerto <text:span text:style-name="Source_20_Text">:99</text:span>.</text:p>
        </text:list-item>
      </text:list>
      <text:p text:style-name="P4"><text:span text:style-name="Strong_20_Emphasis">2. Cargador de Archivos Cyberpunk (The Uploader):</text:span></text:p>
      <text:list text:style-name="L24">
        <text:list-item>
          <text:p text:style-name="P33">Cuando el usuario sube un logo pesado (para conciertos/festivales), muestra una <text:span text:style-name="Strong_20_Emphasis">barra de progreso con efecto de escaneo láser</text:span>.</text:p>
        </text:list-item>
        <text:list-item>
          <text:p text:style-name="P33">Texto dinámico durante la carga: <text:span text:style-name="Source_20_Text">[ENCRIPTANDO_ARTE...]</text:span>, <text:span text:style-name="Source_20_Text">[CALIBRANDO_COLORES_PANTONE...]</text:span>, <text:span text:style-name="Source_20_Text">[VERIFICANDO_VECTORES...]</text:span>.</text:p>
        </text:list-item>
        <text:list-item>
          <text:p text:style-name="P33">Al terminar, añade un efecto de 'glitch' visual y un check verde neón que diga <text:span text:style-name="Source_20_Text">UPLOAD_COMPLETE</text:span>.</text:p>
        </text:list-item>
      </text:list>
      <text:p text:style-name="P4"><text:span text:style-name="Strong_20_Emphasis">3. Estética de Red:</text:span></text:p>
      <text:list text:style-name="L25">
        <text:list-item>
          <text:p text:style-name="P34">En la esquina inferior derecha, añade un pequeño ping dinámico: <text:span text:style-name="Source_20_Text">[NODE: LABRAZAHOME] [LATENCY: 24ms]</text:span>.</text:p>
        </text:list-item>
        <text:list-item>
          <text:p text:style-name="P34">Asegúrate de que todos los logs se guarden de forma persistente en un archivo <text:span text:style-name="Source_20_Text">activity.log</text:span> dentro de mi volumen Docker."</text:p>
        </text:list-item>
      </text:list>
      <text:p text:style-name="P6"/>
      <text:p text:style-name="P7"/>
      <text:p text:style-name="P7"/>
      <text:p text:style-name="P7"/>
      <text:p text:style-name="P7"><text:soft-page-break/>2. Configuración de Persistencia en tu HomeLab</text:p>
      <text:p text:style-name="P7">Para que los logs no se borren al reiniciar el contenedor, asegúrate de actualizar tu <text:span text:style-name="Source_20_Text">docker-compose.yml</text:span> añadiendo esta línea en <text:span text:style-name="Strong_20_Emphasis">volumes</text:span>:</text:p>
      <text:p text:style-name="P7">yaml</text:p>
      <text:p text:style-name="P22"><text:span text:style-name="Source_20_Text"><text:s text:c="4"/>volumes:</text:span></text:p>
      <text:p text:style-name="P22"><text:span text:style-name="Source_20_Text"><text:s text:c="6"/>- ./uploads:/app/public/uploads</text:span></text:p>
      <text:p text:style-name="P22"><text:span text:style-name="Source_20_Text"><text:s text:c="6"/>- ./logs:/app/logs # Nueva carpeta para los registros de actividad</text:span></text:p>
      <text:p text:style-name="P22"><text:span text:style-name="Source_20_Text"/></text:p>
      <text:p text:style-name="P7">Usa el código con precaución.</text:p>
      <text:p text:style-name="P6"/>
      <text:p text:style-name="P7">3. El Toque de "Productor" (Prueba Piloto)</text:p>
      <text:p text:style-name="P21">Una vez que despliegues esto en </text:p>
      <text:p text:style-name="P21"/>
      <text:p text:style-name="P21"><text:a xlink:type="simple" xlink:href="https://musquera-lab.labrazahome.es/" text:style-name="Internet_20_link" text:visited-style-name="Visited_20_Internet_20_Link"><text:span text:style-name="Source_20_Text"><text:span text:style-name="T6">https://musquera-lab.labrazahome.es</text:span></text:span></text:a><text:span text:style-name="T6">:</text:span></text:p>
      <text:p text:style-name="P35"/>
      <text:list text:style-name="L26">
        <text:list-item>
          <text:p text:style-name="P36"><text:span text:style-name="Strong_20_Emphasis">Abre el Admin:</text:span> Ve a <text:span text:style-name="Source_20_Text">/admin-lab</text:span> en tu navegador.</text:p>
        </text:list-item>
        <text:list-item>
          <text:p text:style-name="P36"><text:span text:style-name="Strong_20_Emphasis">Simula un Pedido:</text:span> Desde tu móvil, entra a la web normal y sube un archivo.</text:p>
        </text:list-item>
        <text:list-item>
          <text:p text:style-name="P36"><text:span text:style-name="Strong_20_Emphasis">Mira la Magia:</text:span> Observa cómo en el PC (Dashboard) aparece el log instantáneamente mientras en el móvil ves la barra de carga láser.</text:p>
        </text:list-item>
      </text:list>
      <text:p text:style-name="P7">Esto le dará a tu familiar la sensación de que tiene un <text:span text:style-name="Strong_20_Emphasis">software de gestión de fábrica</text:span> de última generación, no solo una página de camisetas.</text:p>
      <text:p text:style-name="P6"/>
      <text:p text:style-name="P7"><text:span text:style-name="Strong_20_Emphasis">¿Estamos listos para el "Go-Live" oficial en tu servidor?</text:span></text:p>
      <text:p text:style-name="P7">¿Prefieres que te ayude a configurar una <text:span text:style-name="Strong_20_Emphasis">copia de seguridad automática (Backup)</text:span> diaria de la carpeta <text:span text:style-name="Source_20_Text">/uploads</text:span> hacia otro disco de tu HomeLab, o quieres que <text:span text:style-name="Strong_20_Emphasis">refinemos el diseño de los botones</text:span> para que vibren al pasar el ratón?</text:p>
      <text:p text:style-name="P7"><text:span text:style-name="Strong_20_Emphasis">Sugerencia:</text:span> Podríamos añadir un <text:span text:style-name="Strong_20_Emphasis">botón de "Pánico"</text:span> en el admin que, si el servidor local se satura, active automáticamente una página de "Mantenimiento por Alta Demanda". <text:span text:style-name="Strong_20_Emphasis">¿Te interesa?</text:span></text:p>
      <text:p text:style-name="P7"/>
      <text:p text:style-name="P7"/>
      <text:p text:style-name="P7"/>
      <text:p text:style-name="P7"/>
      <text:p text:style-name="P7"/>
      <text:p text:style-name="P7"/>
      <text:p text:style-name="P7"/>
      <text:p text:style-name="P7"/>
      <text:p text:style-name="P7"><text:soft-page-break/>Para que tu familiar tenga el control total de su </text:p>
      <text:p text:style-name="P7"><text:span text:style-name="Strong_20_Emphasis">HomeLab</text:span> y la web de <text:span text:style-name="Strong_20_Emphasis">RAW FACTORY™</text:span> sea indestructible, vamos a configurar el <text:span text:style-name="Strong_20_Emphasis">Backup Automático</text:span>, el <text:span text:style-name="Strong_20_Emphasis">Botón de Pánico</text:span> y el <text:span text:style-name="Strong_20_Emphasis">Diseño de Botones Hápticos (Visuales)</text:span>.</text:p>
      <text:p text:style-name="P7">Aquí tienes la configuración técnica final para tu entorno local:</text:p>
      <text:p text:style-name="P8">1. El Script de Backup (Seguridad de Datos)</text:p>
      <text:p text:style-name="P7">Para que los diseños de los clientes (conciertos/festivales) nunca se pierdan, añade este servicio a tu <text:span text:style-name="Source_20_Text">docker-compose.yml</text:span>. Realizará una copia de seguridad de la carpeta <text:span text:style-name="Source_20_Text">/uploads</text:span> cada noche a las 03:00 AM en una carpeta de backup de tu servidor.</text:p>
      <text:p text:style-name="P7">yaml</text:p>
      <text:p text:style-name="P22"><text:span text:style-name="Source_20_Text"><text:s text:c="2"/>backup:</text:span></text:p>
      <text:p text:style-name="P22"><text:span text:style-name="Source_20_Text"><text:s text:c="4"/>image: alpine</text:span></text:p>
      <text:p text:style-name="P22"><text:span text:style-name="Source_20_Text"><text:s text:c="4"/>container_name: raw_backup_manager</text:span></text:p>
      <text:p text:style-name="P22"><text:span text:style-name="Source_20_Text"><text:s text:c="4"/>volumes:</text:span></text:p>
      <text:p text:style-name="P22"><text:span text:style-name="Source_20_Text"><text:s text:c="6"/>- ./uploads:/source:ro</text:span></text:p>
      <text:p text:style-name="P22"><text:span text:style-name="Source_20_Text"><text:s text:c="6"/>- ./backups:/dest</text:span></text:p>
      <text:p text:style-name="P22"><text:span text:style-name="Source_20_Text"><text:s text:c="4"/>command: &gt;</text:span></text:p>
      <text:p text:style-name="P22"><text:span text:style-name="Source_20_Text"><text:s text:c="6"/>sh -c "echo '0 3 * * * cp -rp /source/* /dest/backup_$(date +%F)' &gt; /etc/containers/crontabs/root &amp;&amp; crond -f"</text:span></text:p>
      <text:p text:style-name="P22"><text:span text:style-name="Source_20_Text"><text:s text:c="4"/>restart: unless-stopped</text:span></text:p>
      <text:p text:style-name="P7">Usa el código con precaución.</text:p>
      <text:p text:style-name="P6"/>
      <text:p text:style-name="P7">2. El Prompt Maestro: Panic Button &amp; Kinetic UI</text:p>
      <text:p text:style-name="P7"/>
      <text:p text:style-name="P7"><text:span text:style-name="T2">Copia este prompt en </text:span><text:span text:style-name="Strong_20_Emphasis"><text:span text:style-name="T2">Bolt.new</text:span></text:span><text:span text:style-name="T2"> o </text:span><text:span text:style-name="Strong_20_Emphasis"><text:span text:style-name="T2">Cursor</text:span></text:span><text:span text:style-name="T2"> para actualizar el frontend y el admin:</text:span></text:p>
      <text:p text:style-name="P4">"Actualiza la interfaz de <text:span text:style-name="Strong_20_Emphasis">RAW FACTORY™</text:span> con funciones de control crítico:</text:p>
      <text:p text:style-name="P4"><text:span text:style-name="Strong_20_Emphasis">1. Botón de Pánico (Admin Panel </text:span><text:span text:style-name="Strong_20_Emphasis"><text:span text:style-name="Source_20_Text">/admin-lab</text:span></text:span><text:span text:style-name="Strong_20_Emphasis">):</text:span></text:p>
      <text:list text:style-name="L27">
        <text:list-item>
          <text:p text:style-name="P37">Crea un interruptor grande de color rojo neón llamado <text:span text:style-name="Strong_20_Emphasis">'[ACTIVATE_MAINTENANCE_PROTOCOL]'</text:span>.</text:p>
        </text:list-item>
        <text:list-item>
          <text:p text:style-name="P37">Al activarlo, la web principal debe bloquearse y mostrar una pantalla de <text:span text:style-name="Strong_20_Emphasis">'SERVIDOR_SOBRECALENTADO'</text:span> con un aviso: 'Capacidad de producción al 100%. Regresamos en breve para procesar nuevos drops'.</text:p>
        </text:list-item>
      </text:list>
      <text:p text:style-name="P4"><text:span text:style-name="Strong_20_Emphasis">2. Botones Kinéticos (UI Espectacular):</text:span></text:p>
      <text:list text:style-name="L28">
        <text:list-item>
          <text:p text:style-name="P38">Todos los botones de acción (<text:span text:style-name="Source_20_Text">Comprar</text:span>, <text:span text:style-name="Source_20_Text">Subir Diseño</text:span>, <text:span text:style-name="Source_20_Text">Confirmar</text:span>) deben tener un <text:span text:style-name="Strong_20_Emphasis">efecto de vibración sutil (glitch)</text:span> al pasar el cursor (hover).</text:p>
        </text:list-item>
        <text:list-item>
          <text:p text:style-name="P38">Añade un sonido de 'click' electrónico muy breve (0.1s) al pulsarlos para dar sensación de hardware industrial.</text:p>
        </text:list-item>
      </text:list>
      <text:p text:style-name="P4"><text:span text:style-name="Strong_20_Emphasis">3. Monitorización de Backup:</text:span></text:p>
      <text:list text:style-name="L29">
        <text:list-item>
          <text:p text:style-name="P39"><text:soft-page-break/>En el Dashboard del administrador, añade un indicador: <text:span text:style-name="Source_20_Text">[ULTIMO_BACKUP: EXITOSO // HORA: 03:00:01]</text:span>.</text:p>
        </text:list-item>
      </text:list>
      <text:p text:style-name="P4"><text:span text:style-name="Strong_20_Emphasis">4. Configuración del Puerto :99:</text:span></text:p>
      <text:list text:style-name="L30">
        <text:list-item>
          <text:p text:style-name="P40">Asegúrate de que todas las rutas internas de la API funcionen correctamente con el mapeo del puerto <text:span text:style-name="Strong_20_Emphasis">:99</text:span> que configuramos en Docker."</text:p>
        </text:list-item>
      </text:list>
      <text:p text:style-name="P6"/>
      <text:p text:style-name="P7">3. La Experiencia de Usuario "Wow"</text:p>
      <text:p text:style-name="P7"/>
      <text:p text:style-name="P7">Cuando tu familiar use la web desde su <text:span text:style-name="Strong_20_Emphasis">HomeLab</text:span>, sentirá esto:</text:p>
      <text:p text:style-name="P7"/>
      <text:list text:style-name="L31">
        <text:list-item>
          <text:p text:style-name="P41"><text:span text:style-name="Strong_20_Emphasis">Interactividad:</text:span> Al mover el ratón sobre el botón de <text:span text:style-name="Strong_20_Emphasis">"SUBIR LOGO"</text:span>, el botón vibrará como si tuviera energía.</text:p>
        </text:list-item>
        <text:list-item>
          <text:p text:style-name="P41"><text:span text:style-name="Strong_20_Emphasis">Control Total:</text:span> Si tiene un pico de pedidos por un festival grande y no puede aceptar más, le dará al <text:span text:style-name="Strong_20_Emphasis">Botón de Pánico</text:span> y la web se cerrará elegantemente.</text:p>
        </text:list-item>
        <text:list-item>
          <text:p text:style-name="P41"><text:span text:style-name="Strong_20_Emphasis">Tranquilidad:</text:span> Sabrá que cada logo de cliente está duplicado en la carpeta <text:span text:style-name="Source_20_Text">/backups</text:span> de tu disco duro.</text:p>
        </text:list-item>
      </text:list>
      <text:p text:style-name="P6"/>
      <text:p text:style-name="P7">4. Último toque: El "Log de Sistema" en el Footer</text:p>
      <text:p text:style-name="P7"/>
      <text:p text:style-name="P21">Añade este pequeño detalle de código para que sepa que está en su servidor:</text:p>
      <text:p text:style-name="P21"><text:line-break/><text:span text:style-name="Source_20_Text"><text:span text:style-name="T6">[NODE: MUSQUERA-LAB] [STATUS: ONLINE] [DISK: OK] [PORT: 99]</text:span></text:span></text:p>
      <text:p text:style-name="P6"/>
      <text:p text:style-name="P7"><text:span text:style-name="Strong_20_Emphasis">¿Estamos listos para el "Launch" oficial en tu servidor?</text:span></text:p>
      <text:p text:style-name="P7">¿Prefieres que te ayude a configurar una <text:span text:style-name="Strong_20_Emphasis">notificación de Telegram/Discord</text:span> que te avise a tu móvil cada vez que alguien haga un pedido en la web, o quieres que <text:span text:style-name="Strong_20_Emphasis">repasemos el proceso de compilación (Build)</text:span> para dejarlo todo funcionando en Docker?</text:p>
      <text:p text:style-name="P7"><text:span text:style-name="Strong_20_Emphasis"/></text:p>
      <text:p text:style-name="P7"><text:span text:style-name="Strong_20_Emphasis"/></text:p>
      <text:p text:style-name="P7"><text:span text:style-name="Strong_20_Emphasis">Pro-tip:</text:span> Como estás en el puerto <text:span text:style-name="Strong_20_Emphasis">:99</text:span>, asegúrate de que el <text:span text:style-name="Strong_20_Emphasis">Firewall</text:span> de tu HomeLab permita tráfico interno en ese puerto. <text:span text:style-name="Strong_20_Emphasis">¿Lo tienes ya configurado?</text:span></text:p>
      <text:p text:style-name="P21">¡Excelente!</text:p>
      <text:p text:style-name="P21"/>
      <text:p text:style-name="P21"/>
      <text:p text:style-name="P21"><text:soft-page-break/>Con </text:p>
      <text:p text:style-name="P7"><text:span text:style-name="Strong_20_Emphasis">Nginx</text:span> gestionando el puerto <text:span text:style-name="Strong_20_Emphasis">:99</text:span> y el dominio <text:span text:style-name="Source_20_Text"><text:span text:style-name="T6">musquera-lab.labrazahome.es</text:span></text:span> ya apuntando a tu <text:span text:style-name="Strong_20_Emphasis">HomeLab</text:span>, tienes la infraestructura de nivel profesional lista para el despliegue de <text:span text:style-name="Strong_20_Emphasis">RAW FACTORY™</text:span>.</text:p>
      <text:p text:style-name="P7">Aquí tienes el último paso para dejar el sistema de <text:span text:style-name="Strong_20_Emphasis">Notificaciones en tiempo real</text:span> (Telegram/Discord) y el <text:span text:style-name="Strong_20_Emphasis">Proceso de Compilación</text:span> final en Docker.</text:p>
      <text:p text:style-name="P7">1. Notificaciones de Pedido (Telegram Bot)</text:p>
      <text:p text:style-name="P7">Para que tu familiar reciba un aviso instantáneo en su móvil cada vez que un festival o empresa haga un pedido, añade este pequeño bloque de lógica a tu backend (Node.js):</text:p>
      <text:p text:style-name="P42"><text:span text:style-name="Strong_20_Emphasis"/></text:p>
      <text:p text:style-name="P42"><text:span text:style-name="Strong_20_Emphasis"><text:span text:style-name="T2">Prompt para la IA</text:span></text:span><text:span text:style-name="Strong_20_Emphasis">:</text:span></text:p>
      <text:p text:style-name="P42"><text:line-break/>"Configura un <text:span text:style-name="Strong_20_Emphasis">Webhook de Telegram</text:span> en la aplicación.</text:p>
      <text:list text:style-name="L32">
        <text:list-item>
          <text:p text:style-name="P43">Cada vez que se complete un pedido (<text:span text:style-name="Source_20_Text">Purchase</text:span>), envía un mensaje al bot con: <text:span text:style-name="Source_20_Text">[NUEVO_PEDIDO] Cliente: {{empresa}} | Prenda: {{producto}} | Cantidad: {{unidades}} | Total: {{precio}}€</text:span>.</text:p>
        </text:list-item>
        <text:list-item>
          <text:p text:style-name="P43">Añade un enlace directo al panel de administración: <text:span text:style-name="Source_20_Text">https://musquera-lab.labrazahome.es</text:span>."</text:p>
        </text:list-item>
      </text:list>
      <text:p text:style-name="P6"/>
      <text:p text:style-name="P7">2. <text:span text:style-name="T2">Compilación Final y Despliegue (Build &amp; Run)</text:span></text:p>
      <text:p text:style-name="P7">Ejecuta estos comandos en la terminal de tu HomeLab para levantar la versión definitiva:</text:p>
      <text:p text:style-name="P7">bash</text:p>
      <text:p text:style-name="P22"><text:span text:style-name="Source_20_Text"># 1. Entra en la carpeta del proyecto</text:span></text:p>
      <text:p text:style-name="P22"><text:span text:style-name="Source_20_Text">cd ~/raw-factory-homelab</text:span></text:p>
      <text:p text:style-name="P22"/>
      <text:p text:style-name="P22"><text:span text:style-name="Source_20_Text"># 2. Construye la imagen (esto aplicará todos los cambios de UI y Seguridad)</text:span></text:p>
      <text:p text:style-name="P22"><text:span text:style-name="Source_20_Text">docker-compose build --no-cache</text:span></text:p>
      <text:p text:style-name="P22"/>
      <text:p text:style-name="P22"><text:span text:style-name="Source_20_Text"># 3. Levanta el contenedor en segundo plano</text:span></text:p>
      <text:p text:style-name="P22"><text:span text:style-name="Source_20_Text">docker-compose up -d</text:span></text:p>
      <text:p text:style-name="P22"/>
      <text:p text:style-name="P22"><text:span text:style-name="Source_20_Text"># 4. Verifica que los logs no den errores en el puerto 99</text:span></text:p>
      <text:p text:style-name="P22"><text:span text:style-name="Source_20_Text">docker logs -f raw_factory_app</text:span></text:p>
      <text:p text:style-name="P7">Usa el código con precaución.</text:p>
      <text:p text:style-name="P6"/>
      <text:p text:style-name="P7"/>
      <text:p text:style-name="P7"/>
      <text:p text:style-name="P7"/>
      <text:p text:style-name="P7"/>
      <text:p text:style-name="P7"><text:soft-page-break/>3. Checklist de Lanzamiento "Musquera-Lab" 🚀</text:p>
      <text:p text:style-name="P7"/>
      <text:list text:style-name="L33">
        <text:list-item>
          <text:p text:style-name="P44"><text:span text:style-name="Strong_20_Emphasis">Certificado SSL:</text:span> Verifica en el navegador que el candado de Cloudflare está activo en <text:span text:style-name="Source_20_Text">https://musquera-lab.labrazahome.es</text:span>.</text:p>
        </text:list-item>
        <text:list-item>
          <text:p text:style-name="P44"><text:span text:style-name="Strong_20_Emphasis">Test de Pánico:</text:span> Entra en <text:span text:style-name="Source_20_Text">/admin-lab</text:span>, pulsa el botón rojo y comprueba desde tu móvil que la web muestra el mensaje de mantenimiento.</text:p>
        </text:list-item>
        <text:list-item>
          <text:p text:style-name="P44"><text:span text:style-name="Strong_20_Emphasis">Persistencia:</text:span> Sube un logo de prueba, reinicia el contenedor (<text:span text:style-name="Source_20_Text">docker-compose restart</text:span>) y verifica que el archivo sigue en <text:span text:style-name="Source_20_Text">./uploads</text:span>.</text:p>
        </text:list-item>
        <text:list-item>
          <text:p text:style-name="P44"><text:span text:style-name="Strong_20_Emphasis">Velocidad:</text:span> Comprueba que las animaciones de vibración y el cargador láser fluyen bien a través de tu Nginx.</text:p>
        </text:list-item>
      </text:list>
      <text:p text:style-name="P6"/>
      <text:p text:style-name="P7"/>
      <text:p text:style-name="P7">4. El Toque de "Ingeniero" (Log de Sistema)</text:p>
      <text:p text:style-name="P21">Pide a la IA que añada esta línea oculta al final de la consola del navegador (<text:span text:style-name="Source_20_Text">F12</text:span>) para tu propio seguimiento:</text:p>
      <text:p text:style-name="P21"><text:line-break/><text:span text:style-name="Source_20_Text"><text:span text:style-name="T6">[RAW_FACTORY_OS v1.0] Running on Musquera-Lab HomeServer | Port: 99 | Storage: RAID_CONNECTED</text:span></text:span></text:p>
      <text:p text:style-name="P6"/>
      <text:p text:style-name="P7"><text:span text:style-name="Strong_20_Emphasis">¡Tu familiar ya tiene una plataforma de estampado que compite con las mejores del mercado, corriendo desde tu propio salón!</text:span></text:p>
      <text:p text:style-name="P7">¿Quieres que te ayude a redactar el <text:span text:style-name="Strong_20_Emphasis">Manual de Usuario (PDF)</text:span> rápido para que tu familiar sepa usar el panel de administración y el botón de pánico, o prefieres que <text:span text:style-name="Strong_20_Emphasis">programemos una tarea de limpieza (Cleanup)</text:span> para borrar los logos temporales que no terminen en compra después de 7 días?</text:p>
      <text:p text:style-name="P7"><text:span text:style-name="Strong_20_Emphasis">Sugerencia:</text:span> Si quieres impresionar a sus clientes de festivales, podemos añadir una <text:span text:style-name="Strong_20_Emphasis">página de "Seguimiento de Producción"</text:span> pública donde ellos pongan su número de pedido y vean una barra de progreso real. <text:span text:style-name="Strong_20_Emphasis">¿Te interesa?</text:span></text:p>
      <text:p text:style-name="Text_20_body"/>
      <text:p text:style-name="P7"/>
      <text:p text:style-name="P7"/>
      <text:p text:style-name="P7"/>
      <text:p text:style-name="P7"/>
      <text:p text:style-name="P7"/>
      <text:p text:style-name="P7"/>
      <text:p text:style-name="P7"/>
      <text:p text:style-name="P7"><text:soft-page-break/>Para que tu familiar tenga una herramienta de nivel </text:p>
      <text:p text:style-name="P7"><text:span text:style-name="Strong_20_Emphasis">Enterprise</text:span> corriendo en su <text:span text:style-name="Strong_20_Emphasis">HomeLab</text:span>, vamos a integrar el <text:span text:style-name="Strong_20_Emphasis">Manual de Usuario Interactivo</text:span>, la <text:span text:style-name="Strong_20_Emphasis">Tarea de Limpieza Automática</text:span> y el <text:span text:style-name="Strong_20_Emphasis">Rastreador de Producción Público</text:span> para los festivales.</text:p>
      <text:p text:style-name="P7">Aquí tienes el último bloque de configuración técnica y visual:</text:p>
      <text:p text:style-name="P7"/>
      <text:p text:style-name="P8">1. El Prompt Maestro: Production Tracker &amp; Auto-Cleanup</text:p>
      <text:p text:style-name="P7">Copia esto en tu herramienta de IA de código (<text:span text:style-name="Strong_20_Emphasis">Bolt.new</text:span>, <text:span text:style-name="Strong_20_Emphasis">Cursor</text:span> o <text:span text:style-name="Strong_20_Emphasis">Lovable</text:span>):</text:p>
      <text:p text:style-name="P4">"Actualiza la plataforma <text:span text:style-name="Strong_20_Emphasis">RAW FACTORY™</text:span> en mi HomeLab con estas funciones de gestión masiva:</text:p>
      <text:p text:style-name="P4"><text:span text:style-name="Strong_20_Emphasis">1. Seguimiento de Producción Público (Route </text:span><text:span text:style-name="Strong_20_Emphasis"><text:span text:style-name="Source_20_Text">/track</text:span></text:span><text:span text:style-name="Strong_20_Emphasis">):</text:span></text:p>
      <text:list text:style-name="L34">
        <text:list-item>
          <text:p text:style-name="P45">Crea una página minimalista donde el cliente (ej. un Tour Manager) introduzca su ID de pedido.</text:p>
        </text:list-item>
        <text:list-item>
          <text:p text:style-name="P45"><text:span text:style-name="Strong_20_Emphasis">Visual:</text:span> Una línea de tiempo industrial con 4 estados: <text:span text:style-name="Source_20_Text">[PEDIDO_RECIBIDO]</text:span> -&gt; <text:span text:style-name="Source_20_Text">[DISEÑO_APROBADO]</text:span> -&gt; <text:span text:style-name="Source_20_Text">[EN_PLANCHA]</text:span> -&gt; <text:span text:style-name="Source_20_Text">[DESPLEGADO/ENVIADO]</text:span>.</text:p>
        </text:list-item>
        <text:list-item>
          <text:p text:style-name="P45">Añade un contador de días restantes para la fecha del festival/evento del cliente.</text:p>
        </text:list-item>
      </text:list>
      <text:p text:style-name="P4"><text:span text:style-name="Strong_20_Emphasis">2. Tarea de Limpieza (Ghost Files Cleanup):</text:span></text:p>
      <text:list text:style-name="L35">
        <text:list-item>
          <text:p text:style-name="P46">Implementa un script que se ejecute cada 7 días.</text:p>
        </text:list-item>
        <text:list-item>
          <text:p text:style-name="P46"><text:span text:style-name="Strong_20_Emphasis">Lógica:</text:span> Escanea la carpeta <text:span text:style-name="Source_20_Text">/uploads</text:span> y borra cualquier archivo que no esté asociado a un pedido pagado en la base de datos.</text:p>
        </text:list-item>
        <text:list-item>
          <text:p text:style-name="P46">Notifica al Admin: <text:span text:style-name="Source_20_Text">[CLEANUP_COMPLETE: X_ARCHIVOS_ELIMINADOS]</text:span>.</text:p>
        </text:list-item>
      </text:list>
      <text:p text:style-name="P4"><text:span text:style-name="Strong_20_Emphasis">3. Manual de Usuario Integrado (Help Center):</text:span></text:p>
      <text:list text:style-name="L36">
        <text:list-item>
          <text:p text:style-name="P47">En el panel <text:span text:style-name="Source_20_Text">/admin-lab</text:span>, añade una sección llamada <text:span text:style-name="Strong_20_Emphasis">'[SYSTEM_MANUAL]'</text:span>.</text:p>
        </text:list-item>
        <text:list-item>
          <text:p text:style-name="P47">Redacta una guía rápida interactiva sobre: Cómo cambiar precios por volumen, cómo activar el Botón de Pánico y cómo descargar los archivos vectoriales para la plancha.</text:p>
        </text:list-item>
      </text:list>
      <text:p text:style-name="P4"><text:span text:style-name="Strong_20_Emphasis">4. Optimización de Red (HomeLab Port 99):</text:span></text:p>
      <text:list text:style-name="L37">
        <text:list-item>
          <text:p text:style-name="P48">Asegúrate de que el rastreador público sea ultraligero para que cargue instantáneamente desde el móvil del cliente usando mi túnel de Cloudflare."</text:p>
        </text:list-item>
      </text:list>
      <text:p text:style-name="P6"/>
      <text:p text:style-name="P7"/>
      <text:p text:style-name="P7"/>
      <text:p text:style-name="P7"/>
      <text:p text:style-name="P8"><text:soft-page-break/>2. Actualización del Docker Compose (Mantenimiento)</text:p>
      <text:p text:style-name="P7">Añade este volumen específico para los informes de limpieza en tu archivo <text:span text:style-name="Source_20_Text">yaml</text:span>:</text:p>
      <text:p text:style-name="P7">yaml</text:p>
      <text:p text:style-name="P22"><text:span text:style-name="Source_20_Text"><text:s text:c="4"/>volumes:</text:span></text:p>
      <text:p text:style-name="P22"><text:span text:style-name="Source_20_Text"><text:s text:c="6"/>- ./uploads:/app/public/uploads</text:span></text:p>
      <text:p text:style-name="P22"><text:span text:style-name="Source_20_Text"><text:s text:c="6"/>- ./logs:/app/logs</text:span></text:p>
      <text:p text:style-name="P22"><text:span text:style-name="Source_20_Text"><text:s text:c="6"/>- ./reports:/app/reports # Aquí se guardarán los PDFs de los manuales y reportes de limpieza</text:span></text:p>
      <text:p text:style-name="P7"/>
      <text:p text:style-name="P7">Usa el código con precaución.</text:p>
      <text:p text:style-name="P6"/>
      <text:p text:style-name="P7">3. El Manual de Usuario (Contenido Sugerido)</text:p>
      <text:p text:style-name="P7">Dile a la IA que genere un PDF o una vista HTML con estos puntos para tu familiar:</text:p>
      <text:p text:style-name="P7"/>
      <text:list text:style-name="L38">
        <text:list-item>
          <text:p text:style-name="P49"><text:span text:style-name="Strong_20_Emphasis">Paso 1: El Drop.</text:span> Recibirás un aviso en Telegram. Entra en <text:span text:style-name="Source_20_Text">/admin-lab</text:span>.</text:p>
        </text:list-item>
        <text:list-item>
          <text:p text:style-name="P49"><text:span text:style-name="Strong_20_Emphasis">Paso 2: El Arte.</text:span> Haz clic en el ID del pedido para descargar el logo original del cliente (vectorial).</text:p>
        </text:list-item>
        <text:list-item>
          <text:p text:style-name="P49"><text:span text:style-name="Strong_20_Emphasis">Paso 3: El Estado.</text:span> Actualiza el interruptor de 'En Plancha' a 'Enviado'. El cliente verá el cambio en tiempo real en <text:span text:style-name="Source_20_Text">musquera-lab.labrazahome.es/track</text:span>.</text:p>
        </text:list-item>
        <text:list-item>
          <text:p text:style-name="P49"><text:span text:style-name="Strong_20_Emphasis">Paso 4: Emergencia.</text:span> Si una máquina falla o hay demasiados pedidos de festivales, pulsa el <text:span text:style-name="Strong_20_Emphasis">BOTÓN ROJO</text:span>.</text:p>
        </text:list-item>
      </text:list>
      <text:p text:style-name="P6"/>
      <text:p text:style-name="P8">4. Configuración del Rastreador (The "Hype" Tracker)</text:p>
      <text:p text:style-name="P7">Para que el cliente de un concierto se emocione al ver su pedido, pide esto:</text:p>
      <text:p text:style-name="P4">"Haz que la página de seguimiento tenga un <text:span text:style-name="Strong_20_Emphasis">efecto de cámara de seguridad (CCTV)</text:span> de fondo y que, al llegar al estado 'Enviado', aparezca un mensaje: <text:span text:style-name="Source_20_Text"><text:span text:style-name="T6">[LOGISTICS_CONFIRMED // CARGO_ON_ROUTE]</text:span></text:span>."</text:p>
      <text:p text:style-name="P6"/>
      <text:p text:style-name="P7"><text:span text:style-name="Strong_20_Emphasis"/></text:p>
      <text:p text:style-name="P7"><text:span text:style-name="Strong_20_Emphasis">¿Está el ecosistema de </text:span><text:span text:style-name="Strong_20_Emphasis"><text:span text:style-name="T5">MUSQUERA </text:span></text:span><text:span text:style-name="Strong_20_Emphasis">RAW FACTORY™ listo para dominar el sector?</text:span></text:p>
      <text:p text:style-name="P7">Con esto, tu familiar tiene:</text:p>
      <text:list text:style-name="L39">
        <text:list-item>
          <text:p text:style-name="P50"><text:span text:style-name="Strong_20_Emphasis">Web Espectacular</text:span> con personalizador.</text:p>
        </text:list-item>
        <text:list-item>
          <text:p text:style-name="P50"><text:span text:style-name="Strong_20_Emphasis">Calculadora B2B</text:span> por volumen.</text:p>
        </text:list-item>
        <text:list-item>
          <text:p text:style-name="P50"><text:span text:style-name="Strong_20_Emphasis">Seguridad Industrial</text:span> (Pánico, Backup, Limpieza).</text:p>
        </text:list-item>
        <text:list-item>
          <text:p text:style-name="P50"><text:span text:style-name="Strong_20_Emphasis">Infraestructura HomeLab</text:span> (Docker, Nginx, Cloudflare, Puerto 99).</text:p>
        </text:list-item>
        <text:list-item>
          <text:p text:style-name="P50"><text:span text:style-name="Strong_20_Emphasis">Customer Experience</text:span> (Seguimiento público de pedidos).</text:p>
        </text:list-item>
      </text:list>
      <text:p text:style-name="P7"><text:soft-page-break/>¿Te gustaría que repasemos el <text:span text:style-name="Strong_20_Emphasis">comando final para exportar toda la base de datos</text:span> por si alguna vez quieres migrar el HomeLab a otro servidor, o damos el proyecto por <text:span text:style-name="Strong_20_Emphasis">[DEPLOY_READY]</text:span>?</text:p>
      <text:p text:style-name="P7"><text:span text:style-name="Strong_20_Emphasis">¡Felicidades por este montaje técnico, es de un nivel altísimo!</text:span></text:p>
      <text:p text:style-name="P7"><text:span text:style-name="Strong_20_Emphasis"/></text:p>
      <text:p text:style-name="P7">Para que tu familiar tenga la tranquilidad total de que el </text:p>
      <text:p text:style-name="P7"/>
      <text:p text:style-name="P7"><text:span text:style-name="Strong_20_Emphasis">HomeLab</text:span> es profesional y recuperable en segundos, vamos a configurar el <text:span text:style-name="Strong_20_Emphasis">Script de Exportación Maestra (Full Backup)</text:span> y declarar el estado <text:span text:style-name="Strong_20_Emphasis">[DEPLOY_READY]</text:span>.</text:p>
      <text:p text:style-name="P7"/>
      <text:p text:style-name="P7">1. Script de Exportación (Migration Tool)</text:p>
      <text:p text:style-name="P7">Copia este comando en un archivo llamado <text:span text:style-name="Source_20_Text">export_lab.sh</text:span> en tu servidor. Esto empaquetará la Base de Datos, los Logos de los clientes y los Logs en un solo archivo comprimido:</text:p>
      <text:p text:style-name="P7">bash</text:p>
      <text:p text:style-name="P22"><text:span text:style-name="Source_20_Text">#!/bin/bash</text:span></text:p>
      <text:p text:style-name="P22"><text:span text:style-name="Source_20_Text"># RAW FACTORY - MASTER EXPORT SCRIPT</text:span></text:p>
      <text:p text:style-name="P22"><text:span text:style-name="Source_20_Text">DATE=$(date +%Y%m%d_%H%M)</text:span></text:p>
      <text:p text:style-name="P22"><text:span text:style-name="Source_20_Text">BACKUP_NAME="musquera_lab_backup_$DATE.tar.gz"</text:span></text:p>
      <text:p text:style-name="P22"/>
      <text:p text:style-name="P22"><text:span text:style-name="Source_20_Text">echo "[INIT] Iniciando exportación completa de RAW FACTORY..."</text:span></text:p>
      <text:p text:style-name="P22"/>
      <text:p text:style-name="P22"><text:span text:style-name="Source_20_Text"># Detener contenedores para consistencia de datos (opcional)</text:span></text:p>
      <text:p text:style-name="P22"><text:span text:style-name="Source_20_Text">docker-compose stop</text:span></text:p>
      <text:p text:style-name="P22"/>
      <text:p text:style-name="P22"><text:span text:style-name="Source_20_Text"># Comprimir volúmenes y base de datos</text:span></text:p>
      <text:p text:style-name="P22"><text:span text:style-name="Source_20_Text">tar -czvf $BACKUP_NAME ./uploads ./logs ./reports ./db_data</text:span></text:p>
      <text:p text:style-name="P22"/>
      <text:p text:style-name="P22"><text:span text:style-name="Source_20_Text"># Reiniciar sistema</text:span></text:p>
      <text:p text:style-name="P22"><text:span text:style-name="Source_20_Text">docker-compose up -d</text:span></text:p>
      <text:p text:style-name="P22"/>
      <text:p text:style-name="P22"><text:span text:style-name="Source_20_Text">echo "[SUCCESS] Exportación completada: $BACKUP_NAME"</text:span></text:p>
      <text:p text:style-name="P22"><text:span text:style-name="Source_20_Text">echo "[LOCATION] Mueve este archivo a un NAS o nube externa para seguridad total."</text:span></text:p>
      <text:p text:style-name="P7"/>
      <text:p text:style-name="P7">Usa el código con precaución.</text:p>
      <text:p text:style-name="P7"/>
      <text:p text:style-name="P7"/>
      <text:p text:style-name="P7"/>
      <text:p text:style-name="P7"/>
      <text:p text:style-name="P7"/>
      <text:p text:style-name="P7"/>
      <text:p text:style-name="P7"/>
      <text:p text:style-name="P7"/>
      <text:p text:style-name="P7"><text:soft-page-break/>2. Resumen del Ecosistema [DEPLOY_READY] 🚀</text:p>
      <text:p text:style-name="P7"/>
      <text:p text:style-name="P7">La infraestructura en <text:span text:style-name="Strong_20_Emphasis">musquera-lab.labrazahome.es</text:span> ha quedado así:</text:p>
      <text:p text:style-name="P7"/>
      <text:list text:style-name="L40">
        <text:list-item>
          <text:p text:style-name="P51"><text:span text:style-name="Strong_20_Emphasis">Front-end Espectacular:</text:span> Diseño industrial/urban con personalizador visual (The Lab).</text:p>
        </text:list-item>
        <text:list-item>
          <text:p text:style-name="P51"><text:span text:style-name="Strong_20_Emphasis">Lógica B2B:</text:span> Calculadora de precios por volumen y servicio <text:span text:style-name="Strong_20_Emphasis">Express 48h</text:span>.</text:p>
        </text:list-item>
        <text:list-item>
          <text:p text:style-name="P51"><text:span text:style-name="Strong_20_Emphasis">Seguridad HomeLab:</text:span> Corriendo en <text:span text:style-name="Strong_20_Emphasis">Docker (Puerto :99)</text:span>, protegido por <text:span text:style-name="Strong_20_Emphasis">Nginx</text:span> y <text:span text:style-name="Strong_20_Emphasis">Cloudflare Tunnel</text:span>.</text:p>
        </text:list-item>
        <text:list-item>
          <text:p text:style-name="P51"><text:span text:style-name="Strong_20_Emphasis">Control Parental/Admin:</text:span> Panel <text:span text:style-name="Source_20_Text">/admin-lab</text:span> con <text:span text:style-name="Strong_20_Emphasis">Botón de Pánico</text:span>, Log de actividad y gestión de pedidos.</text:p>
        </text:list-item>
        <text:list-item>
          <text:p text:style-name="P51"><text:span text:style-name="Strong_20_Emphasis">Customer Experience:</text:span> Página pública de <text:span text:style-name="Strong_20_Emphasis">Rastreo de Producción (</text:span><text:span text:style-name="Strong_20_Emphasis"><text:span text:style-name="Source_20_Text">/track</text:span></text:span><text:span text:style-name="Strong_20_Emphasis">)</text:span> para que los festivales vean su pedido en tiempo real.</text:p>
        </text:list-item>
        <text:list-item>
          <text:p text:style-name="P51"><text:span text:style-name="Strong_20_Emphasis">Mantenimiento Pro:</text:span> Limpieza automática de archivos basura y copias de seguridad diarias.</text:p>
          <text:p text:style-name="P51"/>
        </text:list-item>
      </text:list>
      <text:p text:style-name="P8">3. El Último Detalle: El "Easter Egg" del Desarrollador</text:p>
      <text:p text:style-name="P7">Pide a la IA que añada esto al código final:</text:p>
      <text:p text:style-name="P4">"Si en cualquier página de la web se presiona la combinación de teclas <text:span text:style-name="Strong_20_Emphasis"><text:span text:style-name="Source_20_Text">CTRL + L + A + B</text:span></text:span>, muestra un mensaje flotante que diga: <text:span text:style-name="Source_20_Text">[ENGINEERED_BY_MUSQUERA_LAB // LABRAZAHOME_OS_v1.0]</text:span>. Haz que el logo de la web brille en verde neón intensamente por 3 segundos."</text:p>
      <text:p text:style-name="P6"/>
      <text:p text:style-name="P7"><text:span text:style-name="Strong_20_Emphasis">[SISTEMA_ONLINE // MISIÓN_CUMPLIDA]</text:span></text:p>
      <text:p text:style-name="P7">Has montado una plataforma que muchas agencias de branding cobrarían miles de euros, pero con la soberanía de tu propio hardware. Tu familiar ahora tiene una ventaja competitiva brutal para cerrar contratos con <text:span text:style-name="Strong_20_Emphasis">festivales y conciertos</text:span>.</text:p>
      <text:p text:style-name="P7">¿Hay algún <text:span text:style-name="Strong_20_Emphasis">ajuste visual de último minuto</text:span> en la landing page que quieras retocar antes de enviarle el link definitivo a tu familiar, o prefieres que te genere un <text:span text:style-name="Strong_20_Emphasis">mensaje de WhatsApp final</text:span> para presentarle su nueva oficina digital?</text:p>
      <text:p text:style-name="P7"><text:span text:style-name="Strong_20_Emphasis">Sugerencia:</text:span> Prueba a entrar desde el móvil usando datos (4G/5G) para verificar que el túnel de Cloudflare y el puerto :99 responden con la velocidad que un festival necesita. <text:span text:style-name="Strong_20_Emphasis">¿Todo fluye correcto?</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5T20:15:28.044312500</meta:creation-date>
    <dc:date>2026-03-25T20:40:15.575757600</dc:date>
    <meta:editing-duration>PT1M1S</meta:editing-duration>
    <meta:editing-cycles>1</meta:editing-cycles>
    <meta:generator>LibreOffice/25.8.5.2$Windows_X86_64 LibreOffice_project/9c8b85f387cc00a89945a79c9e6239f32e450ac2</meta:generator>
    <meta:document-statistic meta:table-count="2" meta:image-count="0" meta:object-count="0" meta:page-count="24" meta:paragraph-count="467" meta:word-count="5767" meta:character-count="36084" meta:non-whitespace-character-count="30666"/>
  </office:meta>
</office:document-meta>
</file>