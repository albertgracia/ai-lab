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3.136cm" table:align="left"/>
    </style:style>
    <style:style style:name="Tabla1.A" style:family="table-column">
      <style:table-column-properties style:column-width="5.713cm"/>
    </style:style>
    <style:style style:name="Tabla1.B" style:family="table-column">
      <style:table-column-properties style:column-width="3.413cm"/>
    </style:style>
    <style:style style:name="Tabla1.C" style:family="table-column">
      <style:table-column-properties style:column-width="4.009cm"/>
    </style:style>
    <style:style style:name="Tabla1.A1" style:family="table-cell">
      <style:table-cell-properties style:vertical-align="middle" fo:padding-left="0cm" fo:padding-right="0cm" fo:padding-top="0cm" fo:padding-bottom="0.212cm" fo:border-left="none" fo:border-right="none" fo:border-top="none" fo:border-bottom="0.05pt solid #2d2f35"/>
    </style:style>
    <style:style style:name="Tabla1.A2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2d2f35"/>
    </style:style>
    <style:style style:name="Tabla1.A5" style:family="table-cell">
      <style:table-cell-properties style:vertical-align="middle" fo:padding="0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Standard">
      <style:text-properties officeooo:paragraph-rsid="0017bdff"/>
    </style:style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T1" style:family="text">
      <style:text-properties officeooo:rsid="0017bdff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túa como un Desarrollador Full-stack y Diseñador de Producto Senior. Crea una aplicación web de eCommerce premium llamada '[Nombre de tu marca]' especializada en ropa personalizada (camisetas, sudaderas, gorras y branding).</text:p>
      <text:p text:style-name="Standard"><text:span text:style-name="Strong_20_Emphasis"/></text:p>
      <text:p text:style-name="Standard"><text:span text:style-name="Strong_20_Emphasis">1. Estética y UX:</text:span></text:p>
      <text:list text:style-name="L1">
        <text:list-item>
          <text:p text:style-name="P1">Diseño 'High-End': Estilo minimalista moderno, tipografía audaz (bold), con mucho espacio en blanco y bordes redondeados suaves.</text:p>
        </text:list-item>
        <text:list-item>
          <text:p text:style-name="P1">Usa una paleta de colores [ej: Negro mate, Blanco y un color de acento Neón].</text:p>
        </text:list-item>
        <text:list-item>
          <text:p text:style-name="P1">Navegación fluida con transiciones suaves entre páginas.</text:p>
        </text:list-item>
      </text:list>
      <text:p text:style-name="Text_20_body"><text:span text:style-name="Strong_20_Emphasis">2. Funcionalidades Clave:</text:span></text:p>
      <text:list text:style-name="L2">
        <text:list-item>
          <text:p text:style-name="P2"><text:span text:style-name="Strong_20_Emphasis">Catálogo Dinámico:</text:span> Galería con filtros por categoría (Camisetas, Sudaderas, Gorras, Branding). Cada producto debe mostrar variantes de color y talla mediante selectores visuales.</text:p>
        </text:list-item>
        <text:list-item>
          <text:p text:style-name="P2"><text:span text:style-name="Strong_20_Emphasis">Estudio de Personalización (Interactive Mockup):</text:span> Crea una sección donde el usuario pueda:</text:p>
          <text:list>
            <text:list-item>
              <text:p text:style-name="P2">Seleccionar el color de la prenda.</text:p>
            </text:list-item>
            <text:list-item>
              <text:p text:style-name="P2">Elegir entre una galería de diseños preestablecidos o subir su propia imagen.</text:p>
            </text:list-item>
            <text:list-item>
              <text:p text:style-name="P2">Ver una vista previa en tiempo real del diseño aplicado sobre la prenda (usando capas/overlays).</text:p>
            </text:list-item>
          </text:list>
        </text:list-item>
        <text:list-item>
          <text:p text:style-name="P2"><text:span text:style-name="Strong_20_Emphasis">Carrito de Compras:</text:span> Sistema funcional para añadir productos personalizados, ver el resumen de tallas/colores y calcular el total.</text:p>
        </text:list-item>
        <text:list-item>
          <text:p text:style-name="P2"><text:span text:style-name="Strong_20_Emphasis">Checkout Flow:</text:span> Formulario de pedido intuitivo con campos para datos de envío y método de pago (simulado).</text:p>
        </text:list-item>
      </text:list>
      <text:p text:style-name="Text_20_body"><text:span text:style-name="Strong_20_Emphasis">3. Stack Técnico Requerido:</text:span></text:p>
      <text:list text:style-name="L3">
        <text:list-item>
          <text:p text:style-name="P3">Usa React con Tailwind CSS para el estilo.</text:p>
        </text:list-item>
        <text:list-item>
          <text:p text:style-name="P3">Implementa Framer Motion para animaciones interactivas.</text:p>
        </text:list-item>
        <text:list-item>
          <text:p text:style-name="P3">Asegúrate de que sea 100% responsive (perfecto en móviles).</text:p>
        </text:list-item>
      </text:list>
      <text:p text:style-name="Text_20_body">Genera primero la estructura de la landing page y el módulo interactivo del personalizador.</text:p>
      <text:p text:style-name="Standard"><text:span text:style-name="Emphasis">Mejora el área de personalización; haz que la prenda parezca un lienzo 3D y que los controles de color sean burbujas flotantes</text:span> </text:p>
      <text:p text:style-name="Standard"/>
      <text:list text:style-name="L4">
        <text:list-item>
          <text:p text:style-name="P4"><text:span text:style-name="Strong_20_Emphasis">Imágenes de alta calidad</text:span>: Para el catálogo, pide a la IA que use placeholders de alta calidad o conecta la app con la API de <text:span text:style-name="Strong_20_Emphasis">Unsplash</text:span> para que las fotos de las prendas se vean profesionales.</text:p>
        </text:list-item>
      </text:list>
      <text:list text:style-name="L5">
        <text:list-item>
          <text:p text:style-name="P5"><text:span text:style-name="Strong_20_Emphasis">Micro-interacciones</text:span>: Pide detalles como: <text:span text:style-name="Emphasis">"Haz que al añadir al carrito, el icono salte o brille"</text:span>. Eso es lo que da la sensación de "diseño espectacular"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Actúa como un Senior Creative Developer y experto en UX/UI de marcas de lujo. Crea una Single Page Application (SPA) para MUSQUERA RAW LABS utilizando React, Tailwind CSS y Framer Motion. La web debe tener una calidad visual HDR, estética Ultra-HD y una atmósfera inmersiva.</text:p>
      <text:p text:style-name="Standard"/>
      <text:p text:style-name="Standard">La marca es MUSQUERA RAW LABS</text:p>
      <text:p text:style-name="Standard"/>
      <text:p text:style-name="Standard">1. DIRECCIÓN DE ARTE Y ESTÉTICA (VISUAL IDENTITY):</text:p>
      <text:p text:style-name="Standard"/>
      <text:p text:style-name="P6">Paleta de Colores: Negro Absoluto (#000000) de fondo con texturas de grano de película sutil.</text:p>
      <text:p text:style-name="P6">Tipografía en Blanco Hueso (#EDEAE5).</text:p>
      <text:p text:style-name="P6"/>
      <text:p text:style-name="Standard">Atmósfera: Estética '<text:span text:style-name="T1">Zara y Mango</text:span>' y '<text:span text:style-name="T1">BlueHeaven</text:span> Minimalist'. Usa líneas de división ultra-finas (0.5px) que emulen circuitos.</text:p>
      <text:p text:style-name="Standard"/>
      <text:p text:style-name="Standard">Efectos Espectaculares: Implementa un 'Smooth Scroll', efectos de 'Parallax' en imágenes de campaña y un cursor personalizado que sea un círculo con un resplandor (glow) tenue.</text:p>
      <text:p text:style-name="Standard"/>
      <text:p text:style-name="Standard">2. ESTRUCTURA DE LA EXPERIENCIA (SECCIONES):</text:p>
      <text:p text:style-name="Standard"/>
      <text:p text:style-name="Standard">HERO SECTION (The Ritual): Centra el logo horizontal (<text:span text:style-name="T1">RAW LABS</text:span> + Texto). Headline: 'NOT FOR EVERYONE' en Monument Extended. Subheadline: 'Streetwear oscuro. Edición limitada.'. Botón tipo píldora: 'ENTRAR AL RITUAL' con efecto invertido al hover.</text:p>
      <text:p text:style-name="Standard">CAMPAIGN MANIFESTO (4 Columnas): Crea una sección editorial dividida en 4 paneles verticales interactivos que se expandan al pasar el ratón:</text:p>
      <text:p text:style-name="Standard">'NO TE COMPARES' (Imagen Modelo Frontal)</text:p>
      <text:p text:style-name="Standard">'CULTO URBANO' (Imagen Grupo)</text:p>
      <text:p text:style-name="Standard">'CALIDAD SUPREMA' (Macro de bordado/etiqueta)</text:p>
      <text:p text:style-name="Standard">'SÓLO PARA AUTÉNTICOS' (Imagen Editorial)</text:p>
      <text:p text:style-name="Standard">PRODUCT VAULT (The Artifacts): Grid de productos con mockups de alta definición:</text:p>
      <text:p text:style-name="Standard">'Ritual Core Tee': (Diseño frontal y espalda).</text:p>
      <text:p text:style-name="Standard">'Serpent Hoodie': (Diseño detallado de serpientes).</text:p>
      <text:p text:style-name="Standard">'Collector Pack': (Caja premium + Stickers + Parches).</text:p>
      <text:p text:style-name="Standard"/>
      <text:p text:style-name="Standard">Cada producto debe mostrar el precio y un botón 'ADQUIRIR' solo en el hover.</text:p>
      <text:p text:style-name="Standard">ANATOMY OF QUALITY: Sección de zoom a los detalles técnicos: Etiquetado 'OCCULT STREETWEAR', parches bordados y gramaje premium. Texto: 'INGENIERÍA OSCURA'.</text:p>
      <text:p text:style-name="Standard">UNBOXING EXPERIENCE: Bloque de ancho completo mostrando el packaging negro mate. Texto: 'ESTA NO ES ROPA. ES IDENTIDAD.'</text:p>
      <text:p text:style-name="Standard"/>
      <text:p text:style-name="Standard">3. FUNCIONALIDADES DE CONVERSIÓN (HIGH-CONVERSION):</text:p>
      <text:p text:style-name="Standard">Sticky Navbar: Logo a la izquierda, Carrito a la derecha. Aparece suavemente al hacer scroll.</text:p>
      <text:p text:style-name="Standard">Scarcity Signals: Etiquetas de 'STOCK BAJO' o 'DROP 01: LIMITADO' en cada producto.</text:p>
      <text:p text:style-name="Standard">Footer: Minimalista extremo con el sello circular 'Occult Streetwear' rotando lentamente.</text:p>
      <text:p text:style-name="Standard"/>
      <text:p text:style-name="Standard">4. ESPECIFICACIONES TÉCNICAS PARA ANTIGRAVITY:</text:p>
      <text:p text:style-name="Standard">Renderizado en Ultra Alta Definición (UHD).</text:p>
      <text:p text:style-name="Standard">Animaciones de entrada tipo 'Reveal' y 'Flicker' técnico.</text:p>
      <text:p text:style-name="Standard">Optimización Mobile-First manteniendo la experiencia de lujo.</text:p>
      <text:p text:style-name="Standard">Tipografía: Títulos en Sans Serif extendida, cuerpo en Monospace.</text:p>
      <text:p text:style-name="Standard"/>
      <text:p text:style-name="Standard"/>
      <text:p text:style-name="Standard"/>
      <text:list text:style-name="L6">
        <text:list-item>
          <text:p text:style-name="P7"><text:soft-page-break/><text:span text:style-name="Strong_20_Emphasis">El "Mockup" es la clave</text:span>: Si la IA te da algo muy plano, dile: <text:span text:style-name="Emphasis">"Mejora el área de personalización; haz que la prenda parezca un lienzo 3D y que los controles de color sean burbujas flotantes"</text:span>.</text:p>
        </text:list-item>
        <text:list-item>
          <text:p text:style-name="P7"><text:span text:style-name="Strong_20_Emphasis">Imágenes de alta calidad</text:span>: Para el catálogo, pide a la IA que use placeholders de alta calidad o conecta la app con la API de <text:span text:style-name="Strong_20_Emphasis">Unsplash</text:span> para que las fotos de las prendas se vean profesionales.</text:p>
        </text:list-item>
        <text:list-item>
          <text:p text:style-name="P7"><text:span text:style-name="Strong_20_Emphasis">Micro-interacciones</text:span>: Pide detalles como: <text:span text:style-name="Emphasis">"Haz que al añadir al carrito, el icono salte o brille"</text:span>. Eso es lo que da la sensación de "diseño espectacular".</text:p>
        </text:list-item>
      </text:list>
      <text:list text:style-name="L7">
        <text:list-item>
          <text:p text:style-name="P8"><text:span text:style-name="Emphasis">"Añade un efecto de 'vidrio esmerilado' (glassmorphism) oscuro a la barra de navegación para que se vea premium"</text:span>.</text:p>
        </text:list-item>
        <text:list-item>
          <text:p text:style-name="P8"><text:span text:style-name="Emphasis">"Mockups de camisetas arrugadas sobre fondo de cemento"</text:span> para que la IA entienda el contexto fotográfico.</text:p>
        </text:list-item>
        <text:list-item>
          <text:p text:style-name="P8"><text:span text:style-name="Emphasis">"Haz que los botones tengan un efecto de parpadeo (flicker) sutil como si fueran luces de neón </text:span><text:span text:style-name="Emphasis"><text:span text:style-name="T1">sutiles</text:span></text:span><text:span text:style-name="Emphasis">"</text:span>.</text:p>
        </text:list-item>
      </text:list>
      <text:p text:style-name="Standard">1. El Eslogan (Hero Section)</text:p>
      <text:p text:style-name="Standard"/>
      <text:p text:style-name="Standard">Para el banner principal (Hero), necesitamos algo corto que invite a la acción:</text:p>
      <text:p text:style-name="Standard"/>
      <text:p text:style-name="Quotations"><text:span text:style-name="Strong_20_Emphasis">"UNFILTERED CREATIVITY. YOUR DROP, YOUR RULES."</text:span><text:line-break/><text:span text:style-name="Emphasis">(Creatividad sin filtros. Tu lanzamiento, tus reglas).</text:span></text:p>
      <text:p text:style-name="Text_20_body"><text:span text:style-name="Emphasis">Opcional en español:</text:span> <text:span text:style-name="Strong_20_Emphasis">"DISEÑO CRUDO. ESTILO PROPIO."</text:span></text:p>
      <text:p text:style-name="Text_20_body">2. Estrategia de Precios (Pricing Table)</text:p>
      <text:p text:style-name="Text_20_body">En el <text:span text:style-name="Emphasis">streetwear</text:span>, el precio ayuda a posicionar la marca. Aquí tienes una escala sugerida para configurar en tu catálogo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Heading">Producto</text:p>
          </table:table-cell>
          <table:table-cell table:style-name="Tabla1.A1" office:value-type="string">
            <text:p text:style-name="Table_20_Heading">Precio Base (Liso)</text:p>
          </table:table-cell>
          <table:table-cell table:style-name="Tabla1.A1" office:value-type="string">
            <text:p text:style-name="Table_20_Heading">Precio Personalizado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Tee Oversize (Cotton 240g)</text:span></text:p>
          </table:table-cell>
          <table:table-cell table:style-name="Tabla1.A2" office:value-type="string">
            <text:p text:style-name="Table_20_Contents">35€</text:p>
          </table:table-cell>
          <table:table-cell table:style-name="Tabla1.A2" office:value-type="string">
            <text:p text:style-name="Table_20_Contents"><text:span text:style-name="Strong_20_Emphasis">45€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Heavy Hoodie (400g)</text:span></text:p>
          </table:table-cell>
          <table:table-cell table:style-name="Tabla1.A2" office:value-type="string">
            <text:p text:style-name="Table_20_Contents">65€</text:p>
          </table:table-cell>
          <table:table-cell table:style-name="Tabla1.A2" office:value-type="string">
            <text:p text:style-name="Table_20_Contents"><text:span text:style-name="Strong_20_Emphasis">80€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Trucker Hat / Beanie</text:span></text:p>
          </table:table-cell>
          <table:table-cell table:style-name="Tabla1.A2" office:value-type="string">
            <text:p text:style-name="Table_20_Contents">25€</text:p>
          </table:table-cell>
          <table:table-cell table:style-name="Tabla1.A2" office:value-type="string">
            <text:p text:style-name="Table_20_Contents"><text:span text:style-name="Strong_20_Emphasis">35€</text:span></text:p>
          </table:table-cell>
        </table:table-row>
        <table:table-row>
          <table:table-cell table:style-name="Tabla1.A5" office:value-type="string">
            <text:p text:style-name="Table_20_Contents"><text:span text:style-name="Strong_20_Emphasis">Branding Pack (Stickers + Bag)</text:span></text:p>
          </table:table-cell>
          <table:table-cell table:style-name="Tabla1.A5" office:value-type="string">
            <text:p text:style-name="Table_20_Contents">12€</text:p>
          </table:table-cell>
          <table:table-cell table:style-name="Tabla1.A5" office:value-type="string">
            <text:p text:style-name="Table_20_Contents"><text:span text:style-name="Strong_20_Emphasis">18€</text:span></text:p>
          </table:table-cell>
        </table:table-row>
      </table:table>
      <text:p text:style-name="Horizontal_20_Line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6:11:16.221120400</meta:creation-date>
    <dc:date>2026-03-25T20:14:57.500837600</dc:date>
    <meta:editing-duration>PT21M56S</meta:editing-duration>
    <meta:editing-cycles>2</meta:editing-cycles>
    <meta:generator>LibreOffice/25.8.5.2$Windows_X86_64 LibreOffice_project/9c8b85f387cc00a89945a79c9e6239f32e450ac2</meta:generator>
    <meta:document-statistic meta:table-count="1" meta:image-count="0" meta:object-count="0" meta:page-count="3" meta:paragraph-count="79" meta:word-count="937" meta:character-count="5991" meta:non-whitespace-character-count="5151"/>
  </office:meta>
</office:document-meta>
</file>