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02800000028AC22EECE.png" manifest:media-type="image/png"/>
  <manifest:file-entry manifest:full-path="Pictures/1000000100000060000000601071C3AD.png" manifest:media-type="image/png"/>
  <manifest:file-entry manifest:full-path="Pictures/1000000100000080000000800A00D5D3.png" manifest:media-type="image/png"/>
  <manifest:file-entry manifest:full-path="Pictures/10000001000000800000008062C8B61B.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a1" style:family="table">
      <style:table-properties style:width="13.136cm" table:align="left"/>
    </style:style>
    <style:style style:name="Tabla1.A" style:family="table-column">
      <style:table-column-properties style:column-width="5.713cm"/>
    </style:style>
    <style:style style:name="Tabla1.B" style:family="table-column">
      <style:table-column-properties style:column-width="3.413cm"/>
    </style:style>
    <style:style style:name="Tabla1.C" style:family="table-column">
      <style:table-column-properties style:column-width="4.009cm"/>
    </style:style>
    <style:style style:name="Tabla1.A1" style:family="table-cell">
      <style:table-cell-properties style:vertical-align="middle" fo:padding-left="0cm" fo:padding-right="0cm" fo:padding-top="0cm" fo:padding-bottom="0.212cm" fo:border-left="none" fo:border-right="none" fo:border-top="none" fo:border-bottom="0.05pt solid #2d2f35"/>
    </style:style>
    <style:style style:name="Tabla1.A2" style:family="table-cell">
      <style:table-cell-properties style:vertical-align="middle" fo:padding-left="0cm" fo:padding-right="0cm" fo:padding-top="0cm" fo:padding-bottom="0.318cm" fo:border-left="none" fo:border-right="none" fo:border-top="none" fo:border-bottom="0.05pt solid #2d2f35"/>
    </style:style>
    <style:style style:name="Tabla1.A5" style:family="table-cell">
      <style:table-cell-properties style:vertical-align="middle" fo:padding="0cm" fo:border="none"/>
    </style:style>
    <style:style style:name="Tabla2" style:family="table">
      <style:table-properties style:width="17cm" table:align="left"/>
    </style:style>
    <style:style style:name="Tabla2.A" style:family="table-column">
      <style:table-column-properties style:column-width="1.016cm"/>
    </style:style>
    <style:style style:name="Tabla2.B" style:family="table-column">
      <style:table-column-properties style:column-width="4.336cm"/>
    </style:style>
    <style:style style:name="Tabla2.C" style:family="table-column">
      <style:table-column-properties style:column-width="6.523cm"/>
    </style:style>
    <style:style style:name="Tabla2.D" style:family="table-column">
      <style:table-column-properties style:column-width="5.126cm"/>
    </style:style>
    <style:style style:name="Tabla2.A1" style:family="table-cell">
      <style:table-cell-properties style:vertical-align="middle" fo:padding-left="0cm" fo:padding-right="0cm" fo:padding-top="0cm" fo:padding-bottom="0.212cm" fo:border-left="none" fo:border-right="none" fo:border-top="none" fo:border-bottom="0.05pt solid #2d2f35"/>
    </style:style>
    <style:style style:name="Tabla2.A2" style:family="table-cell">
      <style:table-cell-properties style:vertical-align="middle" fo:padding-left="0cm" fo:padding-right="0cm" fo:padding-top="0cm" fo:padding-bottom="0.318cm" fo:border-left="none" fo:border-right="none" fo:border-top="none" fo:border-bottom="0.05pt solid #2d2f35"/>
    </style:style>
    <style:style style:name="Tabla2.A6" style:family="table-cell">
      <style:table-cell-properties style:vertical-align="middle" fo:padding="0cm" fo:border="none"/>
    </style:style>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Standard">
      <style:paragraph-properties style:writing-mode="lr-tb"/>
    </style:style>
    <style:style style:name="P9" style:family="paragraph" style:parent-style-name="Quotations">
      <style:paragraph-properties style:writing-mode="lr-tb"/>
    </style:style>
    <style:style style:name="P10" style:family="paragraph" style:parent-style-name="Quotations" style:list-style-name="L8">
      <style:paragraph-properties style:writing-mode="lr-tb"/>
    </style:style>
    <style:style style:name="P11" style:family="paragraph" style:parent-style-name="Horizontal_20_Line">
      <style:paragraph-properties style:writing-mode="lr-tb"/>
    </style:style>
    <style:style style:name="P12" style:family="paragraph" style:parent-style-name="Text_20_body">
      <style:paragraph-properties style:writing-mode="lr-tb"/>
    </style:style>
    <style:style style:name="P13" style:family="paragraph" style:parent-style-name="Quotations" style:list-style-name="L9">
      <style:paragraph-properties style:writing-mode="lr-tb"/>
    </style:style>
    <style:style style:name="P14" style:family="paragraph" style:parent-style-name="Quotations" style:list-style-name="L10">
      <style:paragraph-properties style:writing-mode="lr-tb"/>
    </style:style>
    <style:style style:name="P15" style:family="paragraph" style:parent-style-name="Quotations" style:list-style-name="L11">
      <style:paragraph-properties style:writing-mode="lr-tb"/>
    </style:style>
    <style:style style:name="P16" style:family="paragraph" style:parent-style-name="Quotations" style:list-style-name="L12">
      <style:paragraph-properties style:writing-mode="lr-tb"/>
    </style:style>
    <style:style style:name="P17" style:family="paragraph" style:parent-style-name="Quotations" style:list-style-name="L13">
      <style:paragraph-properties style:writing-mode="lr-tb"/>
    </style:style>
    <style:style style:name="P18" style:family="paragraph" style:parent-style-name="Text_20_body" style:list-style-name="L14">
      <style:paragraph-properties style:writing-mode="lr-tb"/>
    </style:style>
    <style:style style:name="P19" style:family="paragraph" style:parent-style-name="Text_20_body" style:list-style-name="L15"/>
    <style:style style:name="P20" style:family="paragraph" style:parent-style-name="Text_20_body" style:list-style-name="L16"/>
    <style:style style:name="P21" style:family="paragraph" style:parent-style-name="Quotations" style:list-style-name="L17"/>
    <style:style style:name="P22" style:family="paragraph" style:parent-style-name="Quotations" style:list-style-name="L18"/>
    <style:style style:name="P23" style:family="paragraph" style:parent-style-name="Text_20_body" style:list-style-name="L19">
      <style:paragraph-properties style:writing-mode="lr-tb"/>
    </style:style>
    <style:style style:name="P24" style:family="paragraph" style:parent-style-name="Text_20_body" style:list-style-name="L19"/>
    <style:style style:name="P25" style:family="paragraph" style:parent-style-name="Quotations" style:list-style-name="L20"/>
    <style:style style:name="P26" style:family="paragraph" style:parent-style-name="Text_20_body" style:list-style-name="L21"/>
    <style:style style:name="P27" style:family="paragraph" style:parent-style-name="Text_20_body" style:list-style-name="L22"/>
    <style:style style:name="P28" style:family="paragraph" style:parent-style-name="Text_20_body" style:list-style-name="L23"/>
    <style:style style:name="P29" style:family="paragraph" style:parent-style-name="Quotations" style:list-style-name="L24"/>
    <style:style style:name="P30" style:family="paragraph" style:parent-style-name="Quotations" style:list-style-name="L24">
      <style:paragraph-properties style:writing-mode="lr-tb"/>
    </style:style>
    <style:style style:name="P31" style:family="paragraph" style:parent-style-name="Table_20_Contents">
      <style:paragraph-properties style:writing-mode="lr-tb"/>
    </style:style>
    <style:style style:name="P32" style:family="paragraph" style:parent-style-name="Text_20_body" style:list-style-name="L25"/>
    <style:style style:name="P33" style:family="paragraph" style:parent-style-name="Text_20_body" style:list-style-name="L26">
      <style:paragraph-properties style:writing-mode="lr-tb"/>
    </style:style>
    <style:style style:name="P34" style:family="paragraph" style:parent-style-name="Text_20_body" style:list-style-name="L27"/>
    <style:style style:name="P35" style:family="paragraph" style:parent-style-name="Quotations" style:list-style-name="L28"/>
    <style:style style:name="P36" style:family="paragraph" style:parent-style-name="Text_20_body" style:list-style-name="L29"/>
    <style:style style:name="P37" style:family="paragraph" style:parent-style-name="Text_20_body" style:list-style-name="L30"/>
    <style:style style:name="P38" style:family="paragraph" style:parent-style-name="Text_20_body" style:list-style-name="L31">
      <style:paragraph-properties style:writing-mode="lr-tb"/>
    </style:style>
    <style:style style:name="P39" style:family="paragraph" style:parent-style-name="Quotations" style:list-style-name="L32"/>
    <style:style style:name="P40" style:family="paragraph" style:parent-style-name="Text_20_body" style:list-style-name="L33"/>
    <style:style style:name="P41" style:family="paragraph" style:parent-style-name="Text_20_body" style:list-style-name="L34"/>
    <style:style style:name="P42" style:family="paragraph" style:parent-style-name="Quotations" style:list-style-name="L35"/>
    <style:style style:name="P43" style:family="paragraph" style:parent-style-name="Text_20_body" style:list-style-name="L36"/>
    <style:style style:name="P44" style:family="paragraph" style:parent-style-name="Quotations" style:list-style-name="L37"/>
    <style:style style:name="P45" style:family="paragraph" style:parent-style-name="Quotations" style:list-style-name="L38"/>
    <style:style style:name="P46" style:family="paragraph" style:parent-style-name="Text_20_body" style:list-style-name="L39"/>
    <style:style style:name="P47" style:family="paragraph" style:parent-style-name="Quotations" style:list-style-name="L39">
      <style:paragraph-properties style:writing-mode="lr-tb"/>
    </style:style>
    <style:style style:name="P48" style:family="paragraph" style:parent-style-name="Text_20_body" style:list-style-name="L40"/>
    <style:style style:name="P49" style:family="paragraph" style:parent-style-name="Quotations" style:list-style-name="L41"/>
    <style:style style:name="P50" style:family="paragraph" style:parent-style-name="Quotations" style:list-style-name="L41">
      <style:paragraph-properties style:writing-mode="lr-tb"/>
    </style:style>
    <style:style style:name="P51" style:family="paragraph" style:parent-style-name="Text_20_body" style:list-style-name="L42">
      <style:paragraph-properties style:writing-mode="lr-tb"/>
    </style:style>
    <style:style style:name="P52" style:family="paragraph" style:parent-style-name="Text_20_body" style:list-style-name="L42"/>
    <style:style style:name="P53" style:family="paragraph" style:parent-style-name="Quotations" style:list-style-name="L43"/>
    <style:style style:name="P54" style:family="paragraph" style:parent-style-name="Text_20_body" style:list-style-name="L44"/>
    <style:style style:name="P55" style:family="paragraph" style:parent-style-name="Text_20_body" style:list-style-name="L45"/>
    <style:style style:name="P56" style:family="paragraph" style:parent-style-name="Text_20_body" style:list-style-name="L46"/>
    <style:style style:name="P57" style:family="paragraph" style:parent-style-name="Quotations" style:list-style-name="L47"/>
    <style:style style:name="P58" style:family="paragraph" style:parent-style-name="Quotations" style:list-style-name="L47">
      <style:paragraph-properties style:writing-mode="lr-tb"/>
    </style:style>
    <style:style style:name="P59" style:family="paragraph" style:parent-style-name="Text_20_body" style:list-style-name="L48">
      <style:paragraph-properties style:writing-mode="lr-tb"/>
    </style:style>
    <style:style style:name="P60" style:family="paragraph" style:parent-style-name="Text_20_body" style:list-style-name="L49">
      <style:paragraph-properties style:writing-mode="lr-tb"/>
    </style:style>
    <style:style style:name="P61" style:family="paragraph" style:parent-style-name="Quotations" style:list-style-name="L50"/>
    <style:style style:name="P62" style:family="paragraph" style:parent-style-name="Text_20_body" style:list-style-name="L51">
      <style:paragraph-properties style:writing-mode="lr-tb"/>
    </style:style>
    <style:style style:name="P63" style:family="paragraph" style:parent-style-name="Text_20_body" style:list-style-name="L51"/>
    <style:style style:name="P64" style:family="paragraph" style:parent-style-name="Text_20_body" style:list-style-name="L52"/>
    <style:style style:name="P65" style:family="paragraph" style:parent-style-name="Quotations" style:list-style-name="L52">
      <style:paragraph-properties style:writing-mode="lr-tb"/>
    </style:style>
    <style:style style:name="P66" style:family="paragraph" style:parent-style-name="Quotations" style:list-style-name="L52"/>
    <style:style style:name="P67" style:family="paragraph" style:parent-style-name="Text_20_body" style:list-style-name="L53">
      <style:paragraph-properties style:writing-mode="lr-tb"/>
    </style:style>
    <style:style style:name="P68" style:family="paragraph" style:parent-style-name="Text_20_body" style:list-style-name="L53"/>
    <style:style style:name="P69" style:family="paragraph" style:parent-style-name="Text_20_body" style:list-style-name="L54"/>
    <style:style style:name="P70" style:family="paragraph" style:parent-style-name="Text_20_body" style:list-style-name="L55"/>
    <style:style style:name="P71" style:family="paragraph" style:parent-style-name="Quotations" style:list-style-name="L56"/>
    <style:style style:name="P72" style:family="paragraph" style:parent-style-name="Quotations" style:list-style-name="L56">
      <style:paragraph-properties style:writing-mode="lr-tb"/>
    </style:style>
    <style:style style:name="P73" style:family="paragraph" style:parent-style-name="Text_20_body">
      <style:paragraph-properties fo:margin-left="0cm" fo:margin-right="0cm" fo:margin-top="0cm" fo:margin-bottom="0cm" style:contextual-spacing="false" fo:text-indent="0cm" style:auto-text-indent="false"/>
    </style:style>
    <style:style style:name="P74" style:family="paragraph" style:parent-style-name="Text_20_body" style:list-style-name="L57"/>
    <style:style style:name="P75" style:family="paragraph" style:parent-style-name="Text_20_body" style:list-style-name="L58"/>
    <style:style style:name="P76" style:family="paragraph" style:parent-style-name="Text_20_body" style:list-style-name="L59"/>
    <style:style style:name="P77" style:family="paragraph" style:parent-style-name="Text_20_body" style:list-style-name="L60"/>
    <style:style style:name="P78" style:family="paragraph" style:parent-style-name="Text_20_body" style:list-style-name="L61"/>
    <style:style style:name="P79" style:family="paragraph" style:parent-style-name="Text_20_body" style:list-style-name="L62"/>
    <style:style style:name="P80" style:family="paragraph" style:parent-style-name="Quotations" style:list-style-name="L63"/>
    <style:style style:name="P81" style:family="paragraph" style:parent-style-name="Quotations" style:list-style-name="L63">
      <style:paragraph-properties style:writing-mode="lr-tb"/>
    </style:style>
    <style:style style:name="P82" style:family="paragraph" style:parent-style-name="Quotations" style:list-style-name="L64"/>
    <style:style style:name="P83" style:family="paragraph" style:parent-style-name="Text_20_body" style:list-style-name="L65"/>
    <style:style style:name="P84" style:family="paragraph" style:parent-style-name="Quotations" style:list-style-name="L66"/>
    <style:style style:name="P85" style:family="paragraph" style:parent-style-name="Quotations" style:list-style-name="L67"/>
    <style:style style:name="P86" style:family="paragraph" style:parent-style-name="Quotations" style:list-style-name="L68"/>
    <style:style style:name="fr1" style:family="graphic" style:parent-style-name="Graphics">
      <style:graphic-properties fo:margin-left="0cm" fo:margin-right="0.106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5">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6">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7">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8">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0">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8">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9">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2">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5">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8">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1">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2">
      <text:list-level-style-number text:level="1" text:style-name="Numbering_20_Symbols" loext:num-list-format="%1%." style:num-suffix="." style:num-format="1">
        <style:list-level-properties/>
      </text:list-level-style-number>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7">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9">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0">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2">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3">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4">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5">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6">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7">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8">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Actúa como un Lead Designer de una marca de streetwear de lujo. Crea una web app de personalización de ropa llamada '[Nombre de tu marca]'.</text:p>
      <text:p text:style-name="Standard"/>
      <text:p text:style-name="Standard"><text:span text:style-name="Strong_20_Emphasis">1. Estética Visual (Urban &amp; Raw):</text:span></text:p>
      <text:p text:style-name="Standard"><text:span text:style-name="Strong_20_Emphasis"/></text:p>
      <text:list text:style-name="L1">
        <text:list-item>
          <text:p text:style-name="P1"><text:span text:style-name="Strong_20_Emphasis">Estilo:</text:span> Neo-brutalismo moderno. Usa un <text:span text:style-name="Strong_20_Emphasis">Dark Mode</text:span> profundo (fondo #050505) con contrastes en <text:span text:style-name="Strong_20_Emphasis">Blanco Puro</text:span> y un color de acento <text:span text:style-name="Strong_20_Emphasis">Verde Neón o Naranja Eléctrico</text:span>.</text:p>
        </text:list-item>
        <text:list-item>
          <text:p text:style-name="P1"><text:span text:style-name="Strong_20_Emphasis">Tipografía:</text:span> Usa una fuente Display tipo 'Inter Tight' o 'Syne' en negrita (Extra Bold) para los títulos y una sans-serif monoespaciada para los datos técnicos.</text:p>
        </text:list-item>
        <text:list-item>
          <text:p text:style-name="P1"><text:span text:style-name="Strong_20_Emphasis">UI Elements:</text:span> Bordes afilados o con radio muy pequeño (4px), sombras paralelas sólidas (hard shadows), y texturas de ruido sutil o grano de película de fondo.</text:p>
        </text:list-item>
      </text:list>
      <text:p text:style-name="Text_20_body"><text:span text:style-name="Strong_20_Emphasis">2. El Catálogo (The Drop):</text:span></text:p>
      <text:list text:style-name="L2">
        <text:list-item>
          <text:p text:style-name="P2">Layout tipo grid asimétrico para las camisetas, sudaderas y gorras.</text:p>
        </text:list-item>
        <text:list-item>
          <text:p text:style-name="P2">Los productos deben tener un efecto de 'zoom' o 'glitch' suave al pasar el cursor (hover).</text:p>
        </text:list-item>
        <text:list-item>
          <text:p text:style-name="P2">Etiquetas tipo 'badge' flotantes indicando 'Limited Edition' o 'Custom Ready'.</text:p>
        </text:list-item>
      </text:list>
      <text:p text:style-name="Text_20_body"><text:span text:style-name="Strong_20_Emphasis">3. El Estudio de Personalización (The Lab):</text:span></text:p>
      <text:list text:style-name="L3">
        <text:list-item>
          <text:p text:style-name="P3">Interfaz tipo terminal o panel de control industrial.</text:p>
        </text:list-item>
        <text:list-item>
          <text:p text:style-name="P3"><text:span text:style-name="Strong_20_Emphasis">Canvas interactivo:</text:span> El usuario elige la prenda (ej. Hoodie Oversize) y puede arrastrar diferentes diseños de una galería de 'Graffitis', 'Logos Minimal' o 'Arte Glitch'.</text:p>
        </text:list-item>
        <text:list-item>
          <text:p text:style-name="P3">Selectores de color de prenda con nombres urbanos (Carbon, Concrete, Acid Wash).</text:p>
        </text:list-item>
        <text:list-item>
          <text:p text:style-name="P3">Selector de tallas (S a XXL) con una guía de ajuste 'Oversize' clara.</text:p>
        </text:list-item>
      </text:list>
      <text:p text:style-name="Text_20_body"><text:span text:style-name="Strong_20_Emphasis">4. Experiencia de Usuario (UX):</text:span></text:p>
      <text:list text:style-name="L4">
        <text:list-item>
          <text:p text:style-name="P4">Animaciones de entrada rápidas y agresivas usando Framer Motion.</text:p>
        </text:list-item>
        <text:list-item>
          <text:p text:style-name="P4">Carrito de compras lateral (Slide-over) que muestre el resumen del 'Drop' seleccionado.</text:p>
        </text:list-item>
        <text:list-item>
          <text:p text:style-name="P4">Checkout simplificado con estética de 'ticket' de compra antiguo o factura industrial.</text:p>
        </text:list-item>
      </text:list>
      <text:p text:style-name="Text_20_body"><text:span text:style-name="Strong_20_Emphasis">Tecnología:</text:span> React + Tailwind CSS. Hazlo 100% responsive, priorizando la experiencia móvil (Mobile First)."</text:p>
      <text:p text:style-name="Standard"/>
      <text:p text:style-name="Standard"><text:span text:style-name="Emphasis">Añade un efecto de 'vidrio esmerilado' (glassmorphism) oscuro a la barra de navegación para que se vea premium</text:span></text:p>
      <text:p text:style-name="Standard"/>
      <text:p text:style-name="Standard"><text:span text:style-name="Emphasis">Mockups de camisetas arrugadas sobre fondo de cemento</text:span></text:p>
      <text:p text:style-name="Standard"/>
      <text:p text:style-name="Standard"><text:span text:style-name="Emphasis">Haz que los botones tengan un efecto de parpadeo (flicker) sutil como si fueran luces de neón</text:span></text:p>
      <text:p text:style-name="Standard"/>
      <text:p text:style-name="Standard">El Nombre Impactante</text:p>
      <text:p text:style-name="Standard"/>
      <text:p text:style-name="Standard">MUSQUERA <text:span text:style-name="Strong_20_Emphasis">RAW LABS</text:span></text:p>
      <text:p text:style-name="Standard"/>
      <text:p text:style-name="Standard"/>
      <text:p text:style-name="Standard"><text:soft-page-break/>2. Gráficos por Defecto (The Starter Pack)</text:p>
      <text:p text:style-name="Standard">Para que la web se vea "espectacular" desde el inicio, los gráficos no pueden ser genéricos. Deben seguir 3 estéticas urbanas tendencia:</text:p>
      <text:p text:style-name="Standard"/>
      <text:p text:style-name="Standard"><text:span text:style-name="Strong_20_Emphasis">A. Estética "Cyber-Punk / Glitch"</text:span></text:p>
      <text:list text:style-name="L5">
        <text:list-item>
          <text:p text:style-name="P5"><text:span text:style-name="Strong_20_Emphasis">Descripción:</text:span> Logotipos distorsionados, efectos de error digital, códigos de barras verticales y tipografías japonesas (Katakana).</text:p>
        </text:list-item>
        <text:list-item>
          <text:p text:style-name="P5"><text:span text:style-name="Strong_20_Emphasis">Uso:</text:span> Ideal para el pecho de sudaderas (hoodies) en colores neón sobre fondo negro.</text:p>
        </text:list-item>
      </text:list>
      <text:p text:style-name="Text_20_body"><text:span text:style-name="Strong_20_Emphasis">B. Estética "Neo-Brutalismo / Industrial"</text:span></text:p>
      <text:list text:style-name="L6">
        <text:list-item>
          <text:p text:style-name="P6"><text:span text:style-name="Strong_20_Emphasis">Descripción:</text:span> Iconos de advertencia, flechas de señalización, tipografías tipo "Helvetica" extra negrita y coordenadas geográficas.</text:p>
        </text:list-item>
        <text:list-item>
          <text:p text:style-name="P6"><text:span text:style-name="Strong_20_Emphasis">Uso:</text:span> Gráficos grandes en la espalda de las camisetas o etiquetas técnicas visibles en el borde de las gorras.</text:p>
        </text:list-item>
      </text:list>
      <text:p text:style-name="Text_20_body"><text:span text:style-name="Strong_20_Emphasis">C. Estética "Vintage Bootleg / Acid Wash"</text:span></text:p>
      <text:list text:style-name="L7">
        <text:list-item>
          <text:p text:style-name="P7"><text:span text:style-name="Strong_20_Emphasis">Descripción:</text:span> Fotos con mucho grano, efecto de impresión desgastada, caras con ojos tapados por barras negras y texturas de metal líquido (chrome).</text:p>
        </text:list-item>
        <text:list-item>
          <text:p text:style-name="P7"><text:span text:style-name="Strong_20_Emphasis">Uso:</text:span> Estampados frontales grandes en camisetas <text:span text:style-name="Emphasis">oversize</text:span>.</text:p>
        </text:list-item>
      </text:list>
      <text:p text:style-name="Standard"/>
      <text:p text:style-name="P8">3. Prompt Final para el "Estudio de Diseño" (The Lab)</text:p>
      <text:p text:style-name="P8">Ahora, añade esto a tu prompt de IA para que genere los gráficos y la lógica de selección:</text:p>
      <text:p text:style-name="P9">"Configura el <text:span text:style-name="Strong_20_Emphasis">'Design Lab'</text:span> de <text:span text:style-name="Strong_20_Emphasis">RAW LABS</text:span>.</text:p>
      <text:list text:style-name="L8">
        <text:list-item>
          <text:p text:style-name="P10"><text:span text:style-name="Strong_20_Emphasis">Librería de Gráficos:</text:span> Implementa 3 categorías de diseños seleccionables: 'Distortion' (Glitch), 'Urban Signal' (Industrial) y 'Chrome' (Metálico).</text:p>
        </text:list-item>
        <text:list-item>
          <text:p text:style-name="P10"><text:span text:style-name="Strong_20_Emphasis">Lógica de Aplicación:</text:span> El usuario debe poder hacer click en un gráfico y verlo aparecer instantáneamente en el mockup de la prenda (Camiseta, Sudadera o Gorra).</text:p>
        </text:list-item>
        <text:list-item>
          <text:p text:style-name="P10"><text:span text:style-name="Strong_20_Emphasis">Personalización Pro:</text:span> Añade un input de texto para que el usuario escriba su nombre o un 'tag' y este aparezca con una tipografía tipo Graffiti o Gótica sobre la prenda.</text:p>
        </text:list-item>
        <text:list-item>
          <text:p text:style-name="P10"><text:span text:style-name="Strong_20_Emphasis">Visuales:</text:span> Asegúrate de que las imágenes de los gráficos tengan un modo de mezcla (multiply o screen) para que se adapten a las arrugas y sombras de la prenda, logrando un efecto realista."</text:p>
        </text:list-item>
      </text:list>
      <text:p text:style-name="P11"/>
      <text:p text:style-name="P12">¿Cómo proceder ahora?</text:p>
      <text:p text:style-name="P12">Copia el prompt anterior y llévalo a <text:span text:style-name="Strong_20_Emphasis">Lovable.dev</text:span> o <text:span text:style-name="Strong_20_Emphasis">Bolt.new</text:span>. Verás cómo la IA empieza a montar la cuadrícula de productos con estos estilos.</text:p>
      <text:p text:style-name="P12">¿Te gustaría que redacte el <text:span text:style-name="Strong_20_Emphasis">eslogan de la marca</text:span> para el banner principal o prefieres que ajustemos los <text:span text:style-name="Strong_20_Emphasis">precios estimados</text:span> para el carrito?</text:p>
      <text:p text:style-name="P12"><text:a xlink:type="simple" xlink:href="https://support.google.com/websearch?p=aimode" text:style-name="Internet_20_link" text:visited-style-name="Visited_20_Internet_20_Link"/></text:p>
      <text:p text:style-name="P12"/>
      <text:p text:style-name="P12"><text:soft-page-break/>¡Perfecto! Vamos a darle ese </text:p>
      <text:p text:style-name="P12"><text:span text:style-name="Strong_20_Emphasis">toque final</text:span> para que la marca <text:span text:style-name="Strong_20_Emphasis">RAW LABS</text:span> se sienta profesional y lista para vender.</text:p>
      <text:p text:style-name="P12">Aquí tienes el <text:span text:style-name="Strong_20_Emphasis">eslogan impactante</text:span> y una <text:span text:style-name="Strong_20_Emphasis">estrategia de precios</text:span> coherente con el estilo <text:span text:style-name="Emphasis">streetwear</text:span> de lujo:</text:p>
      <text:p text:style-name="P12">1. El Eslogan (Hero Section)</text:p>
      <text:p text:style-name="P12">Para el banner principal (Hero), necesitamos algo corto que invite a la acción:</text:p>
      <text:p text:style-name="P9"><text:span text:style-name="Strong_20_Emphasis">"UNFILTERED CREATIVITY. YOUR DROP, YOUR RULES."</text:span><text:line-break/><text:span text:style-name="Emphasis">(Creatividad sin filtros. Tu lanzamiento, tus reglas).</text:span></text:p>
      <text:p text:style-name="P12"><text:span text:style-name="Emphasis">Opcional en español:</text:span> <text:span text:style-name="Strong_20_Emphasis">"DISEÑO CRUDO. ESTILO PROPIO."</text:span></text:p>
      <text:p text:style-name="P12">2. Estrategia de Precios (Pricing Table)</text:p>
      <text:p text:style-name="P12">En el <text:span text:style-name="Emphasis">streetwear</text:span>, el precio ayuda a posicionar la marca. Aquí tienes una escala sugerida para configurar en tu catálogo:</text:p>
      <table:table table:name="Tabla1" table:style-name="Tabla1">
        <table:table-column table:style-name="Tabla1.A"/>
        <table:table-column table:style-name="Tabla1.B"/>
        <table:table-column table:style-name="Tabla1.C"/>
        <table:table-row>
          <table:table-cell table:style-name="Tabla1.A1" office:value-type="string">
            <text:p text:style-name="Table_20_Heading">Producto</text:p>
          </table:table-cell>
          <table:table-cell table:style-name="Tabla1.A1" office:value-type="string">
            <text:p text:style-name="Table_20_Heading">Precio Base (Liso)</text:p>
          </table:table-cell>
          <table:table-cell table:style-name="Tabla1.A1" office:value-type="string">
            <text:p text:style-name="Table_20_Heading">Precio Personalizado</text:p>
          </table:table-cell>
        </table:table-row>
        <table:table-row>
          <table:table-cell table:style-name="Tabla1.A2" office:value-type="string">
            <text:p text:style-name="Table_20_Contents"><text:span text:style-name="Strong_20_Emphasis">Tee Oversize (Cotton 240g)</text:span></text:p>
          </table:table-cell>
          <table:table-cell table:style-name="Tabla1.A2" office:value-type="string">
            <text:p text:style-name="Table_20_Contents">35€</text:p>
          </table:table-cell>
          <table:table-cell table:style-name="Tabla1.A2" office:value-type="string">
            <text:p text:style-name="Table_20_Contents"><text:span text:style-name="Strong_20_Emphasis">45€</text:span></text:p>
          </table:table-cell>
        </table:table-row>
        <table:table-row>
          <table:table-cell table:style-name="Tabla1.A2" office:value-type="string">
            <text:p text:style-name="Table_20_Contents"><text:span text:style-name="Strong_20_Emphasis">Heavy Hoodie (400g)</text:span></text:p>
          </table:table-cell>
          <table:table-cell table:style-name="Tabla1.A2" office:value-type="string">
            <text:p text:style-name="Table_20_Contents">65€</text:p>
          </table:table-cell>
          <table:table-cell table:style-name="Tabla1.A2" office:value-type="string">
            <text:p text:style-name="Table_20_Contents"><text:span text:style-name="Strong_20_Emphasis">80€</text:span></text:p>
          </table:table-cell>
        </table:table-row>
        <table:table-row>
          <table:table-cell table:style-name="Tabla1.A2" office:value-type="string">
            <text:p text:style-name="Table_20_Contents"><text:span text:style-name="Strong_20_Emphasis">Trucker Hat / Beanie</text:span></text:p>
          </table:table-cell>
          <table:table-cell table:style-name="Tabla1.A2" office:value-type="string">
            <text:p text:style-name="Table_20_Contents">25€</text:p>
          </table:table-cell>
          <table:table-cell table:style-name="Tabla1.A2" office:value-type="string">
            <text:p text:style-name="Table_20_Contents"><text:span text:style-name="Strong_20_Emphasis">35€</text:span></text:p>
          </table:table-cell>
        </table:table-row>
        <table:table-row>
          <table:table-cell table:style-name="Tabla1.A5" office:value-type="string">
            <text:p text:style-name="Table_20_Contents"><text:span text:style-name="Strong_20_Emphasis">Branding Pack (Stickers + Bag)</text:span></text:p>
          </table:table-cell>
          <table:table-cell table:style-name="Tabla1.A5" office:value-type="string">
            <text:p text:style-name="Table_20_Contents">12€</text:p>
          </table:table-cell>
          <table:table-cell table:style-name="Tabla1.A5" office:value-type="string">
            <text:p text:style-name="Table_20_Contents"><text:span text:style-name="Strong_20_Emphasis">18€</text:span></text:p>
          </table:table-cell>
        </table:table-row>
      </table:table>
      <text:p text:style-name="P11"/>
      <text:p text:style-name="P12">3. Prompt de Implementación Final (Copia y pega)</text:p>
      <text:p text:style-name="P12">Añade esto a tu chat de IA para que configure el catálogo y el eslogan:</text:p>
      <text:p text:style-name="P9">"Configura el <text:span text:style-name="Strong_20_Emphasis">Hero Section</text:span> de la web con el título <text:span text:style-name="Strong_20_Emphasis">'RAW LABS™'</text:span> y el eslogan <text:span text:style-name="Strong_20_Emphasis">'Unfiltered Creativity. Your Drop, Your Rules.'</text:span> Usa un botón de CTA que diga <text:span text:style-name="Strong_20_Emphasis">'START CREATING'</text:span>.</text:p>
      <text:p text:style-name="P9"><text:span text:style-name="Strong_20_Emphasis">Lógica de Precios:</text:span></text:p>
      <text:list text:style-name="L9">
        <text:list-item>
          <text:p text:style-name="P13">Implementa un sistema donde el precio base de la <text:span text:style-name="Strong_20_Emphasis">Tee</text:span> sea 35€ y suba a 45€ automáticamente al añadir un gráfico o texto personalizado.</text:p>
        </text:list-item>
        <text:list-item>
          <text:p text:style-name="P13">Haz lo mismo para los <text:span text:style-name="Strong_20_Emphasis">Hoodies</text:span> (base 65€ / custom 80€) y <text:span text:style-name="Strong_20_Emphasis">Gorras</text:span> (base 25€ / custom 35€).</text:p>
        </text:list-item>
      </text:list>
      <text:p text:style-name="P9"><text:span text:style-name="Strong_20_Emphasis">Detalles de Producto:</text:span></text:p>
      <text:list text:style-name="L10">
        <text:list-item>
          <text:p text:style-name="P14">Cada producto debe tener un selector de <text:span text:style-name="Strong_20_Emphasis">Tallas (S, M, L, XL, XXL)</text:span> y <text:span text:style-name="Strong_20_Emphasis">Colores (Pitch Black, Concrete Grey, Acid Green)</text:span>.</text:p>
        </text:list-item>
        <text:list-item>
          <text:p text:style-name="P14">Al cambiar de color, la imagen del mockup debe actualizarse para mostrar la prenda en ese tono manteniendo el diseño aplicado."</text:p>
        </text:list-item>
      </text:list>
      <text:p text:style-name="P11"/>
      <text:p text:style-name="P12"><text:soft-page-break/>¿Quieres que te genere una <text:span text:style-name="Strong_20_Emphasis">guía de tallas</text:span> técnica para que el usuario sepa si su prenda es <text:span text:style-name="Emphasis">Oversize</text:span> o prefieres pasar directamente a diseñar la <text:span text:style-name="Strong_20_Emphasis">página de confirmación de pedido</text:span>?</text:p>
      <text:p text:style-name="P12"/>
      <text:p text:style-name="P12">Al grano. Vamos a configurar ambas cosas para que </text:p>
      <text:p text:style-name="P12"><text:span text:style-name="Strong_20_Emphasis">RAW LABS™</text:span> sea una experiencia de usuario completa y profesional.</text:p>
      <text:p text:style-name="P12">Aquí tienes el <text:span text:style-name="Strong_20_Emphasis">prompt final</text:span> para integrar la <text:span text:style-name="Strong_20_Emphasis">Guía de Tallas (Sizing Guide)</text:span> y la <text:span text:style-name="Strong_20_Emphasis">Página de Confirmación (Thank You Page)</text:span>:</text:p>
      <text:p text:style-name="P12">El Prompt de Cierre Maestro</text:p>
      <text:p text:style-name="P9">"Añade los últimos dos módulos clave a la aplicación de <text:span text:style-name="Strong_20_Emphasis">RAW LABS™</text:span>:</text:p>
      <text:p text:style-name="P9"><text:span text:style-name="Strong_20_Emphasis">1. Guía de Tallas Técnica (The Spec Sheet):</text:span></text:p>
      <text:list text:style-name="L11">
        <text:list-item>
          <text:p text:style-name="P15">Crea un botón flotante o un modal junto al selector de tallas que diga <text:span text:style-name="Strong_20_Emphasis">'FIND YOUR FIT'</text:span>.</text:p>
        </text:list-item>
        <text:list-item>
          <text:p text:style-name="P15">Dentro, muestra una tabla minimalista con medidas de Pecho, Largo y Manga para 'Oversize Fit' (Estilo Streetwear).</text:p>
        </text:list-item>
        <text:list-item>
          <text:p text:style-name="P15">Añade una nota visual: <text:span text:style-name="Emphasis">'Nuestras prendas son de corte relajado. Si prefieres un ajuste estándar, pide una talla menos'</text:span>.</text:p>
        </text:list-item>
      </text:list>
      <text:p text:style-name="P9"><text:span text:style-name="Strong_20_Emphasis">2. Página de Confirmación (The Drop Receipt):</text:span></text:p>
      <text:list text:style-name="L12">
        <text:list-item>
          <text:p text:style-name="P16">Tras simular la compra, redirige a una página con estética de <text:span text:style-name="Strong_20_Emphasis">Ticket Industrial</text:span>.</text:p>
        </text:list-item>
        <text:list-item>
          <text:p text:style-name="P16">Título: <text:span text:style-name="Strong_20_Emphasis">'DROP CONFIRMED / ORDER #[Número aleatorio]'</text:span>.</text:p>
        </text:list-item>
        <text:list-item>
          <text:p text:style-name="P16">Muestra un resumen visual de la prenda personalizada, el precio final y un mensaje de éxito: <text:span text:style-name="Emphasis">'Tu diseño ha entrado en producción. Prepárate para el envío'</text:span>.</text:p>
        </text:list-item>
        <text:list-item>
          <text:p text:style-name="P16">Añade un botón de <text:span text:style-name="Strong_20_Emphasis">'BACK TO THE LAB'</text:span> para seguir creando.</text:p>
        </text:list-item>
      </text:list>
      <text:p text:style-name="P9"><text:span text:style-name="Strong_20_Emphasis">Detalles UI finales:</text:span></text:p>
      <text:list text:style-name="L13">
        <text:list-item>
          <text:p text:style-name="P17">Asegúrate de que los botones tengan una animación de 'vibración' o 'glitch' muy rápida al confirmarse el pedido.</text:p>
        </text:list-item>
        <text:list-item>
          <text:p text:style-name="P17">Mantén el <text:span text:style-name="Strong_20_Emphasis">Dark Mode</text:span> con los acentos <text:span text:style-name="Strong_20_Emphasis">Verde Neón/Naranja</text:span> en ambas secciones."</text:p>
        </text:list-item>
      </text:list>
      <text:p text:style-name="P11"/>
      <text:p text:style-name="P12">¿Cómo queda tu flujo de usuario ahora?</text:p>
      <text:list text:style-name="L14">
        <text:list-item>
          <text:p text:style-name="P18"><text:span text:style-name="Strong_20_Emphasis">Home / Hero:</text:span> Impacto visual con el eslogan <text:span text:style-name="Emphasis">"Unfiltered Creativity"</text:span>.</text:p>
        </text:list-item>
        <text:list-item>
          <text:p text:style-name="P18"><text:span text:style-name="Strong_20_Emphasis">Catálogo:</text:span> Selección de base (Tee, Hoodie, Gorra) con precios dinámicos.</text:p>
        </text:list-item>
        <text:list-item>
          <text:p text:style-name="P18"><text:span text:style-name="Strong_20_Emphasis">The Lab:</text:span> Personalización con tus 3 estilos (Glitch, Industrial, Chrome).</text:p>
        </text:list-item>
        <text:list-item>
          <text:p text:style-name="P18"><text:span text:style-name="Strong_20_Emphasis">Sizing:</text:span> Consulta de medidas para asegurar el <text:span text:style-name="Emphasis">Oversize look</text:span>.</text:p>
        </text:list-item>
        <text:list-item>
          <text:p text:style-name="P18"><text:soft-page-break/><text:span text:style-name="Strong_20_Emphasis">Checkout &amp; Success:</text:span> El usuario recibe su "Ticket de Drop" digital.</text:p>
        </text:list-item>
      </text:list>
      <text:p text:style-name="P12"><text:span text:style-name="Strong_20_Emphasis">¿Quieres que te ayude ahora a redactar los textos legales de "Política de Devoluciones" (clave para productos personalizados) o prefieres que probemos el código en una de las plataformas de IA?</text:span></text:p>
      <text:p text:style-name="Standard"/>
      <text:p text:style-name="Standard">Para que tu tienda <text:span text:style-name="Strong_20_Emphasis">RAW LABS™</text:span> sea 100% funcional y segura, vamos a cerrar el círculo con la <text:span text:style-name="Strong_20_Emphasis">Política de Devoluciones</text:span> (crítica en productos personalizados) y el paso a paso para <text:span text:style-name="Strong_20_Emphasis">ejecutar el código</text:span>.</text:p>
      <text:p text:style-name="Standard">1. Política de Devoluciones (Custom Drop Policy)</text:p>
      <text:p text:style-name="Standard">Copia este bloque de texto para la sección de "Términos" de tu web:</text:p>
      <text:p text:style-name="Quotations"><text:span text:style-name="Strong_20_Emphasis">"DEVOLUCIONES Y CAMBIOS (THE RAW RULE):</text:span><text:line-break/>Al ser productos <text:span text:style-name="Strong_20_Emphasis">personalizados bajo demanda</text:span>, no aceptamos devoluciones por cambio de opinión o errores en la talla elegida (consulta nuestra <text:span text:style-name="Emphasis">Sizing Guide</text:span>). Solo se realizarán reembolsos o re-impresiones en caso de <text:span text:style-name="Strong_20_Emphasis">defectos de fábrica</text:span> o errores en el diseño por parte de <text:span text:style-name="Strong_20_Emphasis">RAW LABS™</text:span>. Tienes 14 días desde la recepción para reportar cualquier fallo en el 'drop'."</text:p>
      <text:p text:style-name="Horizontal_20_Line"/>
      <text:p text:style-name="Text_20_body">2. Cómo crear la web "Espectacular" ahora mismo</text:p>
      <text:p text:style-name="Text_20_body">Tienes el concepto, el nombre, los precios y los prompts. Elige tu camino según lo que busques:</text:p>
      <text:p text:style-name="Text_20_body"><text:span text:style-name="Strong_20_Emphasis">Opción A: Quiero ver la web funcionando YA (Sin programar)</text:span></text:p>
      <text:list text:style-name="L15">
        <text:list-item>
          <text:p text:style-name="P19">Ve a <text:span text:style-name="Strong_20_Emphasis">Lovable.dev</text:span> o <text:span text:style-name="Strong_20_Emphasis">Bolt.new</text:span>.</text:p>
        </text:list-item>
        <text:list-item>
          <text:p text:style-name="P19">Pega el <text:span text:style-name="Strong_20_Emphasis">Prompt Maestro Urban Edition</text:span> que definimos antes.</text:p>
        </text:list-item>
        <text:list-item>
          <text:p text:style-name="P19">Cuando termine, pega el prompt de <text:span text:style-name="Strong_20_Emphasis">"The Lab"</text:span> y el de <text:span text:style-name="Strong_20_Emphasis">"Guía de Tallas y Confirmación"</text:span>.</text:p>
        </text:list-item>
        <text:list-item>
          <text:p text:style-name="P19">La IA construirá toda la interfaz, los botones y el personalizador frente a tus ojos.</text:p>
        </text:list-item>
      </text:list>
      <text:p text:style-name="Text_20_body"><text:span text:style-name="Strong_20_Emphasis">Opción B: Quiero un diseño visual previo (Inspiración)</text:span></text:p>
      <text:list text:style-name="L16">
        <text:list-item>
          <text:p text:style-name="P20">Ve a <text:span text:style-name="Strong_20_Emphasis">Midjourney</text:span> o <text:span text:style-name="Strong_20_Emphasis">DALL-E 3</text:span>.</text:p>
        </text:list-item>
        <text:list-item>
          <text:p text:style-name="P20">Usa este prompt: <text:span text:style-name="Emphasis">"High-end streetwear e-commerce website UI/UX, brand name RAW LABS, dark mode, neon green accents, neo-brutalism style, oversize hoodies and tees mockups, 8k resolution, sleek and modern."</text:span></text:p>
        </text:list-item>
        <text:list-item>
          <text:p text:style-name="P20">Usa esa imagen como referencia para ajustar los colores en tu editor.</text:p>
        </text:list-item>
      </text:list>
      <text:p text:style-name="Horizontal_20_Line"/>
      <text:p text:style-name="Text_20_body">3. El Toque Final: El "Ticket" de Pedido</text:p>
      <text:p text:style-name="Text_20_body">Pide esto a la IA de código para que el cierre sea épico:</text:p>
      <text:p text:style-name="Quotations">"Haz que la página de confirmación genere un <text:span text:style-name="Strong_20_Emphasis">archivo PDF descargable</text:span> que parezca un manifiesto de carga industrial con el diseño que el usuario creó. Que incluya el logo de <text:span text:style-name="Strong_20_Emphasis">RAW LABS™</text:span> en formato ASCII o pixel art."</text:p>
      <text:p text:style-name="Text_20_body"><text:soft-page-break/><text:span text:style-name="Strong_20_Emphasis">¿Quieres que te guíe paso a paso en cómo conectar esta web con una pasarela de pago real (como Stripe) o prefieres que ajustemos los textos de los correos automáticos de confirmación?</text:span></text:p>
      <text:p text:style-name="Standard">Para que <text:span text:style-name="Strong_20_Emphasis">RAW LABS™</text:span> pase de ser un prototipo a una máquina de facturar, vamos a configurar la <text:span text:style-name="Strong_20_Emphasis">pasarela de pagos (Stripe)</text:span> y los <text:span text:style-name="Strong_20_Emphasis">correos automáticos</text:span> con ese tono <text:span text:style-name="Emphasis">streetwear</text:span> que hemos creado.</text:p>
      <text:p text:style-name="Standard">1. Conexión con Pasarela de Pagos (Stripe)</text:p>
      <text:p text:style-name="Standard">Pide este ajuste técnico en tu herramienta de IA (Lovable, Bolt o Cursor):</text:p>
      <text:p text:style-name="Quotations">"Configura una integración con <text:span text:style-name="Strong_20_Emphasis">Stripe Checkout</text:span>.</text:p>
      <text:list text:style-name="L17">
        <text:list-item>
          <text:p text:style-name="P21">Crea una función que envíe el <text:span text:style-name="Strong_20_Emphasis">Precio Final</text:span> (Base + Personalización) a Stripe.</text:p>
        </text:list-item>
        <text:list-item>
          <text:p text:style-name="P21">Asegúrate de que el 'Metadata' del pago incluya: <text:span text:style-name="Strong_20_Emphasis">Talla, Color y el Link de la imagen personalizada</text:span> que el usuario creó.</text:p>
        </text:list-item>
        <text:list-item>
          <text:p text:style-name="P21">Implementa un <text:span text:style-name="Strong_20_Emphasis">Modo de Prueba (Test Mode)</text:span> para que pueda verificar que el carrito funciona antes de lanzar la web oficial."</text:p>
        </text:list-item>
      </text:list>
      <text:p text:style-name="Text_20_body">2. Correos Automáticos (The Confirmation Mail)</text:p>
      <text:p text:style-name="Text_20_body">Este es el texto que recibirá el cliente. No debe ser un correo aburrido, debe ser un "Aviso de Drop".</text:p>
      <text:p text:style-name="Text_20_body"><text:span text:style-name="Strong_20_Emphasis">Asunto:</text:span> 📦 DROP CONFIRMED // Tu pedido #{{order_number}} está en el Lab.</text:p>
      <text:p text:style-name="Text_20_body"><text:span text:style-name="Strong_20_Emphasis">Cuerpo del mensaje:</text:span></text:p>
      <text:p text:style-name="Quotations"><text:span text:style-name="Strong_20_Emphasis">RAW LABS™ / SYSTEM NOTIFICATION</text:span></text:p>
      <text:p text:style-name="Quotations">Hola {{user_name}},</text:p>
      <text:p text:style-name="Quotations">Tu diseño ha sido procesado correctamente. Hemos recibido tu configuración para:</text:p>
      <text:list text:style-name="L18">
        <text:list-item>
          <text:p text:style-name="P22"><text:span text:style-name="Strong_20_Emphasis">Prenda:</text:span> {{product_name}}</text:p>
        </text:list-item>
        <text:list-item>
          <text:p text:style-name="P22"><text:span text:style-name="Strong_20_Emphasis">Estilo:</text:span> {{custom_style_selected}}</text:p>
        </text:list-item>
        <text:list-item>
          <text:p text:style-name="P22"><text:span text:style-name="Strong_20_Emphasis">Talla:</text:span> {{size}}</text:p>
        </text:list-item>
      </text:list>
      <text:p text:style-name="Quotations"><text:span text:style-name="Strong_20_Emphasis">ESTADO:</text:span> Producción iniciada.<text:line-break/>En cuanto el paquete salga del bloque, recibirás tu código de seguimiento (Tracking ID).</text:p>
      <text:p text:style-name="Quotations"><text:span text:style-name="Emphasis">No aceptamos imitaciones. Solo RAW.</text:span></text:p>
      <text:p text:style-name="Quotations"><text:span text:style-name="Strong_20_Emphasis">[VER RESUMEN DEL PEDIDO]</text:span></text:p>
      <text:p text:style-name="Horizontal_20_Line"/>
      <text:p text:style-name="Text_20_body">3. Checklist Final para lanzar tu Web Espectacular:</text:p>
      <text:list text:style-name="L19">
        <text:list-item>
          <text:p text:style-name="P23"><text:span text:style-name="Strong_20_Emphasis">Dominio:</text:span> Registra algo corto (ej: <text:span text:style-name="Source_20_Text">rawlabs.io</text:span> o <text:span text:style-name="Source_20_Text">rawlabs.store</text:span>).</text:p>
        </text:list-item>
        <text:list-item>
          <text:p text:style-name="P24"><text:span text:style-name="Strong_20_Emphasis">Mockups:</text:span> Asegúrate de que las fotos de las camisetas en blanco tengan alta resolución (puedes sacarlas de sitios como <text:span text:style-name="Emphasis">Placeit</text:span> o <text:span text:style-name="Emphasis">Envato</text:span>).</text:p>
        </text:list-item>
        <text:list-item>
          <text:p text:style-name="P24"><text:soft-page-break/><text:span text:style-name="Strong_20_Emphasis">Hosting:</text:span> Si usas <text:span text:style-name="Strong_20_Emphasis">Bolt.new</text:span> o <text:span text:style-name="Strong_20_Emphasis">Lovable</text:span>, puedes desplegar la web en <text:span text:style-name="Strong_20_Emphasis">Netlify</text:span> o <text:span text:style-name="Strong_20_Emphasis">Vercel</text:span> con un solo click.</text:p>
        </text:list-item>
      </text:list>
      <text:p text:style-name="Text_20_body">¿Cómo quieres que procedamos?</text:p>
      <text:p text:style-name="Text_20_body">¿Prefieres que te ayude a crear una <text:span text:style-name="Strong_20_Emphasis">estrategia de marketing para Instagram/TikTok</text:span> para lanzar tu primer "Drop" o quieres que refine los <text:span text:style-name="Strong_20_Emphasis">iconos de navegación</text:span> para que parezcan sacados de una interfaz de hacker?</text:p>
      <text:p text:style-name="Standard">Para que el lanzamiento de <text:span text:style-name="Strong_20_Emphasis">RAW LABS™</text:span> sea un éxito total, vamos a trabajar en ambos frentes: la <text:span text:style-name="Strong_20_Emphasis">estética visual técnica</text:span> y la <text:span text:style-name="Strong_20_Emphasis">estrategia de hype</text:span> para redes sociales.</text:p>
      <text:p text:style-name="Standard">1. Interfaz de Navegación (Hacker/Cyberpunk Look)</text:p>
      <text:p text:style-name="Standard">Pide este ajuste a tu IA de desarrollo para que la navegación sea única:</text:p>
      <text:p text:style-name="Quotations">"Modifica los <text:span text:style-name="Strong_20_Emphasis">iconos de navegación</text:span> y el menú. No uses iconos estándar.</text:p>
      <text:list text:style-name="L20">
        <text:list-item>
          <text:p text:style-name="P25">Usa iconos de <text:span text:style-name="Strong_20_Emphasis">líneas finas (stroke)</text:span> con un estilo <text:span text:style-name="Strong_20_Emphasis">'Terminal/Matrix'</text:span>.</text:p>
        </text:list-item>
        <text:list-item>
          <text:p text:style-name="P25">El carrito de compras debe llamarse <text:span text:style-name="Strong_20_Emphasis">'[CARGO_BIN]'</text:span>.</text:p>
        </text:list-item>
        <text:list-item>
          <text:p text:style-name="P25">El catálogo debe ser <text:span text:style-name="Strong_20_Emphasis">'[THE_DROP]'</text:span>.</text:p>
        </text:list-item>
        <text:list-item>
          <text:p text:style-name="P25">El personalizador debe ser <text:span text:style-name="Strong_20_Emphasis">'[THE_LAB]'</text:span>.</text:p>
        </text:list-item>
        <text:list-item>
          <text:p text:style-name="P25">Añade un pequeño efecto de <text:span text:style-name="Strong_20_Emphasis">'flicker' (parpadeo)</text:span> verde neón aleatorio en los bordes de los botones.</text:p>
        </text:list-item>
        <text:list-item>
          <text:p text:style-name="P25">Al pasar el ratón (hover) sobre un producto, muestra sus <text:span text:style-name="Strong_20_Emphasis">coordenadas técnicas</text:span> (peso de tela, composición) en una fuente monoespaciada pequeña que aparezca gradualmente."</text:p>
        </text:list-item>
      </text:list>
      <text:p text:style-name="Horizontal_20_Line"/>
      <text:p text:style-name="Text_20_body">2. Estrategia de Marketing (The First Drop)</text:p>
      <text:p text:style-name="Text_20_body">El <text:span text:style-name="Emphasis">streetwear</text:span> vive del <text:span text:style-name="Strong_20_Emphasis">hype</text:span> (expectación) y la <text:span text:style-name="Strong_20_Emphasis">escasez</text:span>. Aquí tienes el plan de 3 pasos para Instagram y TikTok:</text:p>
      <text:p text:style-name="Text_20_body"><text:span text:style-name="Strong_20_Emphasis">Fase 1: T-Minus 7 Días (The Glitch)</text:span></text:p>
      <text:list text:style-name="L21">
        <text:list-item>
          <text:p text:style-name="P26"><text:span text:style-name="Strong_20_Emphasis">Contenido:</text:span> Sube vídeos de 5 segundos con mucho ruido visual, interferencias y el logo de <text:span text:style-name="Strong_20_Emphasis">RAW LABS™</text:span> apareciendo un instante.</text:p>
        </text:list-item>
        <text:list-item>
          <text:p text:style-name="P26"><text:span text:style-name="Strong_20_Emphasis">Audio:</text:span> Sonidos industriales, estática o bajos profundos.</text:p>
        </text:list-item>
        <text:list-item>
          <text:p text:style-name="P26"><text:span text:style-name="Strong_20_Emphasis">Copy:</text:span> "System Overload. Coming soon."</text:p>
        </text:list-item>
      </text:list>
      <text:p text:style-name="Text_20_body"><text:span text:style-name="Strong_20_Emphasis">Fase 2: T-Minus 3 Días (The Lab Reveal)</text:span></text:p>
      <text:list text:style-name="L22">
        <text:list-item>
          <text:p text:style-name="P27"><text:span text:style-name="Strong_20_Emphasis">Contenido:</text:span> Un "screen recording" rápido de alguien usando el <text:span text:style-name="Strong_20_Emphasis">personalizador</text:span> de la web. Muestra cómo arrastra un logo "Chrome" a una sudadera negra.</text:p>
        </text:list-item>
        <text:list-item>
          <text:p text:style-name="P27"><text:span text:style-name="Strong_20_Emphasis">Copy:</text:span> "Stop wearing what they tell you. Design your own armor. 72h left."</text:p>
        </text:list-item>
      </text:list>
      <text:p text:style-name="Text_20_body"><text:span text:style-name="Strong_20_Emphasis">Fase 3: Launch Day (The Drop is Live)</text:span></text:p>
      <text:list text:style-name="L23">
        <text:list-item>
          <text:p text:style-name="P28"><text:span text:style-name="Strong_20_Emphasis">Contenido:</text:span> Fotos de alta calidad de los mockups (las que generamos antes) con un filtro de cámara de seguridad (CCTV).</text:p>
        </text:list-item>
        <text:list-item>
          <text:p text:style-name="P28"><text:soft-page-break/><text:span text:style-name="Strong_20_Emphasis">Call to Action:</text:span> "Link in Bio. Enter the Lab."</text:p>
        </text:list-item>
      </text:list>
      <text:p text:style-name="Horizontal_20_Line"/>
      <text:p text:style-name="Text_20_body">3. Prompt para el "Hero Video" de la Web</text:p>
      <text:p text:style-name="Text_20_body">Si quieres que el fondo de tu web sea un vídeo en bucle que grite <text:span text:style-name="Emphasis">streetwear</text:span>:</text:p>
      <text:p text:style-name="Quotations">"Genera un vídeo en bucle de 10 segundos en estilo <text:span text:style-name="Strong_20_Emphasis">CCTV/Security Camera</text:span>. Se debe ver una calle oscura con luces de neón, gente con capuchas caminando rápido y el logo de <text:span text:style-name="Strong_20_Emphasis">RAW LABS™</text:span> superpuesto con un efecto de interferencia digital. Colores predominantes: Negro, Gris Cemento y Verde Ácido."</text:p>
      <text:p text:style-name="Horizontal_20_Line"/>
      <text:p text:style-name="Text_20_body">Tu Siguiente Paso Maestro:</text:p>
      <text:p text:style-name="Text_20_body">¿Quieres que te redacte los <text:span text:style-name="Strong_20_Emphasis">5 primeros posts de Instagram</text:span> con sus respectivos hashtags estratégicos o prefieres que configuremos un <text:span text:style-name="Strong_20_Emphasis">contador de tiempo (Countdown)</text:span> en la web para el primer lanzamiento oficial?</text:p>
      <text:p text:style-name="Standard"/>
      <text:p text:style-name="Standard">¡Entendido! Vamos a convertir <text:span text:style-name="Strong_20_Emphasis">RAW LABS™</text:span> en un evento inevitable. Vamos a crear el <text:span text:style-name="Strong_20_Emphasis">Hype Engine</text:span> (el contador) y el <text:span text:style-name="Strong_20_Emphasis">Content Pack</text:span> (redes sociales).</text:p>
      <text:p text:style-name="Standard">1. El Contador de Tiempo (The Countdown Clock)</text:p>
      <text:p text:style-name="Standard">Para que la web genere urgencia, añade este prompt a tu IA:</text:p>
      <text:p text:style-name="Quotations">"Añade un <text:span text:style-name="Strong_20_Emphasis">Countdown Timer</text:span> en la parte superior del Hero Section.</text:p>
      <text:list text:style-name="L24">
        <text:list-item>
          <text:p text:style-name="P29"><text:span text:style-name="Strong_20_Emphasis">Estética:</text:span> Debe parecer un reloj digital de una terminal de seguridad (fuente monoespaciada tipo 'JetBrains Mono').</text:p>
        </text:list-item>
        <text:list-item>
          <text:p text:style-name="P30"><text:span text:style-name="Strong_20_Emphasis">Formato:</text:span> <text:span text:style-name="Source_20_Text">DAYS : HOURS : MIN : SEC</text:span>.</text:p>
        </text:list-item>
        <text:list-item>
          <text:p text:style-name="P29"><text:span text:style-name="Strong_20_Emphasis">Interacción:</text:span> Cuando el contador llegue a cero, haz que la pantalla tenga un efecto de 'glitch' visual rápido y se desbloquee el botón <text:span text:style-name="Strong_20_Emphasis">'ENTER THE LAB'</text:span>.</text:p>
        </text:list-item>
        <text:list-item>
          <text:p text:style-name="P30"><text:span text:style-name="Strong_20_Emphasis">Texto:</text:span> Encima del reloj pon: <text:span text:style-name="Source_20_Text">NEXT DROP INITIALIZING...</text:span>."</text:p>
        </text:list-item>
      </text:list>
      <text:p text:style-name="Horizontal_20_Line"/>
      <text:p text:style-name="Text_20_body">2. Estrategia de Contenidos (Los 5 Primeros Posts)</text:p>
      <text:p text:style-name="Text_20_body">Aquí tienes la hoja de ruta para <text:span text:style-name="Strong_20_Emphasis">Instagram/TikTok</text:span> con copies que muerden:</text:p>
      <table:table table:name="Tabla2" table:style-name="Tabla2">
        <table:table-column table:style-name="Tabla2.A"/>
        <table:table-column table:style-name="Tabla2.B"/>
        <table:table-column table:style-name="Tabla2.C"/>
        <table:table-column table:style-name="Tabla2.D"/>
        <table:table-row>
          <table:table-cell table:style-name="Tabla2.A1" office:value-type="string">
            <text:p text:style-name="Table_20_Heading">Post</text:p>
          </table:table-cell>
          <table:table-cell table:style-name="Tabla2.A1" office:value-type="string">
            <text:p text:style-name="Table_20_Heading">Tipo de Contenido</text:p>
          </table:table-cell>
          <table:table-cell table:style-name="Tabla2.A1" office:value-type="string">
            <text:p text:style-name="Table_20_Heading">Copy (Texto del Post)</text:p>
          </table:table-cell>
          <table:table-cell table:style-name="Tabla2.A1" office:value-type="string">
            <text:p text:style-name="Table_20_Heading">Hashtags</text:p>
          </table:table-cell>
        </table:table-row>
        <table:table-row>
          <table:table-cell table:style-name="Tabla2.A2" office:value-type="string">
            <text:p text:style-name="Table_20_Contents"><text:span text:style-name="Strong_20_Emphasis">#1</text:span></text:p>
          </table:table-cell>
          <table:table-cell table:style-name="Tabla2.A2" office:value-type="string">
            <text:p text:style-name="Table_20_Contents">Vídeo tipo CCTV borroso del logo.</text:p>
          </table:table-cell>
          <table:table-cell table:style-name="Tabla2.A2" office:value-type="string">
            <text:p text:style-name="P31"><text:span text:style-name="Source_20_Text">SYSTEM_BOOT: RAW LABS™. No más ropa genérica. El laboratorio abre pronto.</text:span></text:p>
          </table:table-cell>
          <table:table-cell table:style-name="Tabla2.A2" office:value-type="string">
            <text:p text:style-name="Table_20_Contents">#RawLabs #StreetwearCulture #CyberpunkStyle</text:p>
          </table:table-cell>
        </table:table-row>
        <table:table-row>
          <table:table-cell table:style-name="Tabla2.A2" office:value-type="string">
            <text:p text:style-name="Table_20_Contents"><text:span text:style-name="Strong_20_Emphasis">#2</text:span></text:p>
          </table:table-cell>
          <table:table-cell table:style-name="Tabla2.A2" office:value-type="string">
            <text:p text:style-name="Table_20_Contents">Carrusel de los 3 estilos (Glitch, Industrial, Chrome).</text:p>
          </table:table-cell>
          <table:table-cell table:style-name="Tabla2.A2" office:value-type="string">
            <text:p text:style-name="P31"><text:span text:style-name="Source_20_Text">Elige tu estética. Glitch, Industrial o Chrome. Tú diseñas, nosotros imprimimos.</text:span></text:p>
          </table:table-cell>
          <table:table-cell table:style-name="Tabla2.A2" office:value-type="string">
            <text:p text:style-name="Table_20_Contents">#CustomStreetwear #GraphicDesign #UrbanDrop</text:p>
          </table:table-cell>
        </table:table-row>
        <table:table-row>
          <table:table-cell table:style-name="Tabla2.A2" office:value-type="string">
            <text:p text:style-name="Table_20_Contents"><text:span text:style-name="Strong_20_Emphasis">#3</text:span></text:p>
          </table:table-cell>
          <table:table-cell table:style-name="Tabla2.A2" office:value-type="string">
            <text:p text:style-name="Table_20_Contents">Vídeo rápido usando el <text:soft-page-break/>personalizador web.</text:p>
          </table:table-cell>
          <table:table-cell table:style-name="Tabla2.A2" office:value-type="string">
            <text:p text:style-name="P31"><text:span text:style-name="Source_20_Text">The Lab is ready. </text:span><text:soft-page-break/><text:span text:style-name="Source_20_Text">Personaliza tu Hoodie Oversize en segundos. Link in bio para acceso previo.</text:span></text:p>
          </table:table-cell>
          <table:table-cell table:style-name="Tabla2.A2" office:value-type="string">
            <text:p text:style-name="Table_20_Contents">#UIUX #Techwear <text:soft-page-break/>#StreetwearVibe</text:p>
          </table:table-cell>
        </table:table-row>
        <table:table-row>
          <table:table-cell table:style-name="Tabla2.A2" office:value-type="string">
            <text:p text:style-name="Table_20_Contents"><text:span text:style-name="Strong_20_Emphasis">#4</text:span></text:p>
          </table:table-cell>
          <table:table-cell table:style-name="Tabla2.A2" office:value-type="string">
            <text:p text:style-name="Table_20_Contents">Foto de una Tee con el eslogan 'Unfiltered Creativity'.</text:p>
          </table:table-cell>
          <table:table-cell table:style-name="Tabla2.A2" office:value-type="string">
            <text:p text:style-name="P31"><text:span text:style-name="Source_20_Text">Calidad 240g. Corte Oversize. Creatividad sin filtros. El primer Drop es limitado.</text:span></text:p>
          </table:table-cell>
          <table:table-cell table:style-name="Tabla2.A2" office:value-type="string">
            <text:p text:style-name="Table_20_Contents">#OversizeTee #PremiumCotton #DesignYourOwn</text:p>
          </table:table-cell>
        </table:table-row>
        <table:table-row>
          <table:table-cell table:style-name="Tabla2.A6" office:value-type="string">
            <text:p text:style-name="Table_20_Contents"><text:span text:style-name="Strong_20_Emphasis">#5</text:span></text:p>
          </table:table-cell>
          <table:table-cell table:style-name="Tabla2.A6" office:value-type="string">
            <text:p text:style-name="Table_20_Contents">Pantallazo del contador llegando a cero.</text:p>
          </table:table-cell>
          <table:table-cell table:style-name="Tabla2.A6" office:value-type="string">
            <text:p text:style-name="P31"><text:span text:style-name="Source_20_Text">DROP IS LIVE. Entra en el lab y reclama tu pieza. No habrá re-stock.</text:span></text:p>
          </table:table-cell>
          <table:table-cell table:style-name="Tabla2.A6" office:value-type="string">
            <text:p text:style-name="Table_20_Contents">#DropDay #SoldOut #RawLabsCommunity</text:p>
          </table:table-cell>
        </table:table-row>
      </table:table>
      <text:p text:style-name="Horizontal_20_Line"/>
      <text:p text:style-name="Text_20_body">3. Bonus: El "Easter Egg" (Hacker Touch)</text:p>
      <text:p text:style-name="Text_20_body">Para que los usuarios se sientan en una web de culto, pide esto:</text:p>
      <text:p text:style-name="P9">"Añade un <text:span text:style-name="Strong_20_Emphasis">Easter Egg</text:span>: Si el usuario escribe la palabra 'RAW' en su teclado mientras está en la web, haz que los colores neón cambien de Verde a Rojo Eléctrico en toda la interfaz y aparezca un mensaje oculto: <text:span text:style-name="Source_20_Text">MODO_DISEÑADOR_ACTIVADO</text:span>."</text:p>
      <text:p text:style-name="Horizontal_20_Line"/>
      <text:p text:style-name="Text_20_body">¿Cómo seguimos para que esto sea real?</text:p>
      <text:p text:style-name="Text_20_body">¿Prefieres que te ayude a crear la <text:span text:style-name="Strong_20_Emphasis">biografía de Instagram</text:span> optimizada con enlaces o que te genere un <text:span text:style-name="Strong_20_Emphasis">guion detallado para un Reel</text:span> de 15 segundos que se vuelva viral?</text:p>
      <text:p text:style-name="Standard"/>
      <text:p text:style-name="Standard">Para rematar el lanzamiento de <text:span text:style-name="Strong_20_Emphasis">RAW LABS™</text:span>, aquí tienes la biografía optimizada que convierte visitantes en clientes y el guion para que tu primer Reel sea una bomba visual.</text:p>
      <text:p text:style-name="Standard">1. Biografía de Instagram (Bio que convierte)</text:p>
      <text:p text:style-name="Standard">Configúrala así para proyectar exclusividad:</text:p>
      <text:p text:style-name="Standard"/>
      <text:p text:style-name="Quotations"><text:span text:style-name="Strong_20_Emphasis">RAW LABS™ / THE CUSTOM LAB</text:span><text:line-break/>🛠️ Design your own armor.<text:line-break/>⛓️ Streetwear de alta gramaje (240g+).<text:line-break/>⚡ [Custom Tees • Hoodies • Branding]<text:line-break/>📦 Limited Drops Only.<text:line-break/>👇 <text:span text:style-name="Strong_20_Emphasis">ENTER THE LAB</text:span><text:line-break/>[TuLink.com]</text:p>
      <text:p text:style-name="Horizontal_20_Line"/>
      <text:p text:style-name="Text_20_body">2. Guion de Reel Viral (15 Segundos de Hype)</text:p>
      <text:p text:style-name="Text_20_body">Este vídeo debe ser rápido, rítmico y con cortes al compás de un audio tipo <text:span text:style-name="Emphasis">Phonk</text:span> o <text:span text:style-name="Emphasis">Industrial Techno</text:span>.</text:p>
      <text:list text:style-name="L25">
        <text:list-item>
          <text:p text:style-name="P32"><text:span text:style-name="Strong_20_Emphasis">0-3s:</text:span> Primer plano de una pantalla en negro. Escribes en un teclado y aparece el logo de <text:span text:style-name="Strong_20_Emphasis">RAW LABS™</text:span> con efecto glitch.</text:p>
        </text:list-item>
        <text:list-item>
          <text:p text:style-name="P32"><text:span text:style-name="Strong_20_Emphasis">3-7s:</text:span> Pantallazo del <text:span text:style-name="Strong_20_Emphasis">Personalizador Web</text:span> moviendo un gráfico de "Chrome" sobre una sudadera negra a toda velocidad.</text:p>
        </text:list-item>
        <text:list-item>
          <text:p text:style-name="P32"><text:soft-page-break/><text:span text:style-name="Strong_20_Emphasis">7-11s:</text:span> Flashes de fotos reales (o mockups realistas) de las camisetas puestas en la calle (fondo de hormigón, luces de neón).</text:p>
        </text:list-item>
        <text:list-item>
          <text:p text:style-name="P32"><text:span text:style-name="Strong_20_Emphasis">11-13s:</text:span> Texto en pantalla gigante: <text:span text:style-name="Strong_20_Emphasis">YOU DESIGN. WE DROP.</text:span></text:p>
        </text:list-item>
        <text:list-item>
          <text:p text:style-name="P32"><text:span text:style-name="Strong_20_Emphasis">13-15s:</text:span> El contador de la web llegando a cero y el botón <text:span text:style-name="Strong_20_Emphasis">"ENTER"</text:span> siendo pulsado.</text:p>
        </text:list-item>
      </text:list>
      <text:p text:style-name="Horizontal_20_Line"/>
      <text:p text:style-name="Text_20_body">3. El Prompt Final para tu "Social Media Manager" AI</text:p>
      <text:p text:style-name="Text_20_body">Si usas herramientas como ChatGPT para generar más contenido, usa este prompt para mantener el tono:</text:p>
      <text:p text:style-name="Quotations">"Actúa como el Community Manager de <text:span text:style-name="Strong_20_Emphasis">RAW LABS™</text:span>. Nuestro tono es directo, misterioso, técnico y urbano. No uses emojis genéricos como caras sonrientes. Usa iconos como ⚡, ⛓️, 🛠️, ⬛ o []. Nunca saludes con '¡Hola a todos!', empieza directo con el mensaje. Genera 3 ideas de historias de Instagram para crear urgencia sobre el stock limitado."</text:p>
      <text:p text:style-name="Horizontal_20_Line"/>
      <text:p text:style-name="Text_20_body">¿Cuál es el siguiente paso para tu imperio?</text:p>
      <text:p text:style-name="Text_20_body">¿Quieres que te ayude a redactar el <text:span text:style-name="Strong_20_Emphasis">mensaje de bienvenida de WhatsApp Business</text:span> para cuando los clientes tengan dudas o prefieres que definamos los <text:span text:style-name="Strong_20_Emphasis">3 tipos de packaging</text:span> (bolsas, etiquetas, pegatinas) para que el envío sea una experiencia de lujo?</text:p>
      <text:p text:style-name="Standard">Para que <text:span text:style-name="Strong_20_Emphasis">RAW LABS™</text:span> se sienta como una marca de lujo desde que llega el paquete hasta que el cliente tiene dudas, vamos a diseñar la <text:span text:style-name="Strong_20_Emphasis">experiencia física (Unboxing)</text:span> y la <text:span text:style-name="Strong_20_Emphasis">atención al cliente automatizada</text:span>.</text:p>
      <text:p text:style-name="Standard">1. El Packaging de Lujo (The Unboxing Experience)</text:p>
      <text:p text:style-name="Standard">No envíes en bolsas de plástico baratas. Pide este diseño de packaging en tu web o a tu proveedor:</text:p>
      <text:list text:style-name="L26">
        <text:list-item>
          <text:p text:style-name="P33"><text:span text:style-name="Strong_20_Emphasis">The Outer Shell (La Bolsa):</text:span> Sobres de envío en <text:span text:style-name="Strong_20_Emphasis">negro mate</text:span> con el logo en <text:span text:style-name="Strong_20_Emphasis">barniz UV (brillo sobre mate)</text:span>. Debe incluir una advertencia técnica en la esquina: <text:span text:style-name="Source_20_Text">[CONTENT: HIGH_GRADE_COTTON // DO NOT BUST]</text:span>.</text:p>
        </text:list-item>
        <text:list-item>
          <text:p text:style-name="P33"><text:span text:style-name="Strong_20_Emphasis">The Hangtag (La Etiqueta):</text:span> Una tarjeta de cartón grueso negro con tipografía en blanco. En el reverso, un <text:span text:style-name="Strong_20_Emphasis">código QR</text:span> que lleve de vuelta a la web con el texto: <text:span text:style-name="Source_20_Text">RE-ENTER THE LAB FOR YOUR NEXT DROP</text:span>.</text:p>
        </text:list-item>
        <text:list-item>
          <text:p text:style-name="P33"><text:span text:style-name="Strong_20_Emphasis">The Add-ons (Regalos):</text:span> Incluye siempre un set de <text:span text:style-name="Strong_20_Emphasis">3 stickers</text:span> con los estilos de la marca (Glitch, Industrial, Chrome) y una postal que diga: <text:span text:style-name="Source_20_Text">DESIGNED BY YOU. BUILT BY RAW LABS. #001</text:span>.</text:p>
        </text:list-item>
      </text:list>
      <text:p text:style-name="Horizontal_20_Line"/>
      <text:p text:style-name="Text_20_body"/>
      <text:p text:style-name="Text_20_body"/>
      <text:p text:style-name="Text_20_body"/>
      <text:p text:style-name="Text_20_body"/>
      <text:p text:style-name="Text_20_body"/>
      <text:p text:style-name="Text_20_body"><text:soft-page-break/>2. WhatsApp Business (Atención "Hacker" Eficiente)</text:p>
      <text:p text:style-name="Text_20_body">Configura estos mensajes automáticos para que no pierdas ventas mientras duermes:</text:p>
      <text:p text:style-name="Text_20_body"><text:span text:style-name="Strong_20_Emphasis">Mensaje de Bienvenida (Automático):</text:span></text:p>
      <text:p text:style-name="Quotations"><text:span text:style-name="Strong_20_Emphasis">RAW LABS™ // ENCRYPTION ACTIVE</text:span><text:line-break/>⛓️ Has contactado con el soporte técnico de The Lab.<text:line-break/>🛠️ ¿Dudas con tu diseño o estado de tu drop?</text:p>
      <text:p text:style-name="Quotations">Envía tu <text:span text:style-name="Strong_20_Emphasis">Nº de Pedido</text:span> o tu consulta. Un agente de la unidad te responderá en breve.<text:line-break/><text:span text:style-name="Emphasis">[Horario de conexión: 09:00 - 18:00]</text:span></text:p>
      <text:p text:style-name="Text_20_body"><text:span text:style-name="Strong_20_Emphasis">Mensaje de Ausencia:</text:span></text:p>
      <text:p text:style-name="Quotations"><text:span text:style-name="Strong_20_Emphasis">OFFLINE // SYSTEM STANDBY</text:span><text:line-break/>⬛ Estamos fuera del lab ahora mismo. Deja tu mensaje y serás el primero en la lista de procesamiento mañana.<text:line-break/>Mientras tanto, sigue creando: [TuWeb.com]</text:p>
      <text:p text:style-name="Horizontal_20_Line"/>
      <text:p text:style-name="Text_20_body">3. Prompt Final para el "Packaging Designer" (IA)</text:p>
      <text:p text:style-name="Text_20_body">Si quieres ver cómo quedarían estos elementos antes de fabricarlos, usa este prompt en <text:span text:style-name="Strong_20_Emphasis">Midjourney</text:span> o <text:span text:style-name="Strong_20_Emphasis">DALL-E 3</text:span>:</text:p>
      <text:p text:style-name="Quotations">"Professional mockup of a streetwear clothing packaging for RAW LABS. Matte black poly mailer bag with glossy black logo, premium thick black hangtag with white minimalist typography, set of industrial stickers, concrete background, cinematic lighting, 8k resolution."</text:p>
      <text:p text:style-name="Horizontal_20_Line"/>
      <text:p text:style-name="Text_20_body">El Mapa del Éxito está listo:</text:p>
      <text:list text:style-name="L27">
        <text:list-item>
          <text:p text:style-name="P34"><text:span text:style-name="Strong_20_Emphasis">Web Espectacular:</text:span> Con personalizador y estilo urban-street.</text:p>
        </text:list-item>
        <text:list-item>
          <text:p text:style-name="P34"><text:span text:style-name="Strong_20_Emphasis">Marketing:</text:span> Estrategia de hype y posts virales.</text:p>
        </text:list-item>
        <text:list-item>
          <text:p text:style-name="P34"><text:span text:style-name="Strong_20_Emphasis">Logística:</text:span> Packaging de lujo y atención automatizada.</text:p>
        </text:list-item>
      </text:list>
      <text:p text:style-name="Text_20_body"><text:span text:style-name="Strong_20_Emphasis">¿Te gustaría que te ayude a redactar una "Guía de Cuidados" (instrucciones de lavado) con un diseño técnico para incluir dentro del paquete o prefieres que busquemos nombres para tu primera colección de edición limitada?</text:span></text:p>
      <text:p text:style-name="Standard"/>
      <text:p text:style-name="Standard">Para cerrar el círculo de <text:span text:style-name="Strong_20_Emphasis">RAW LABS™</text:span>, vamos a diseñar la <text:span text:style-name="Strong_20_Emphasis">Care Guide</text:span> (Guía de Cuidados) con estética técnica y bautizar tu <text:span text:style-name="Strong_20_Emphasis">Colección de Lanzamiento</text:span>.</text:p>
      <text:p text:style-name="Standard">1. La "Care Guide" (Ficha Técnica de Lavado)</text:p>
      <text:p text:style-name="Standard">En lugar de una etiqueta aburrida, añade una tarjeta física dentro del paquete con este diseño de <text:span text:style-name="Strong_20_Emphasis">"Instrucciones de Mantenimiento del Equipo"</text:span>:</text:p>
      <text:p text:style-name="Quotations"><text:span text:style-name="Strong_20_Emphasis">[MAINTENANCE_PROTOCOL // RAW LABS™]</text:span></text:p>
      <text:p text:style-name="Quotations">Para preservar la integridad del gráfico y el tejido de alta densidad:</text:p>
      <text:list text:style-name="L28">
        <text:list-item>
          <text:p text:style-name="P35"><text:soft-page-break/><text:span text:style-name="Strong_20_Emphasis">REVERSE_MODE:</text:span> Lava la prenda siempre del revés.</text:p>
        </text:list-item>
        <text:list-item>
          <text:p text:style-name="P35"><text:span text:style-name="Strong_20_Emphasis">COLD_PROCESS:</text:span> Agua fría (máx. 30°C). No usar lejía/cloro.</text:p>
        </text:list-item>
        <text:list-item>
          <text:p text:style-name="P35"><text:span text:style-name="Strong_20_Emphasis">NO_HEAT:</text:span> No usar secadora. Secar a la sombra (Interior).</text:p>
        </text:list-item>
        <text:list-item>
          <text:p text:style-name="P35"><text:span text:style-name="Strong_20_Emphasis">IRON_SHIELD:</text:span> Planchar del revés. Nunca pases la plancha sobre el gráfico personalizado.</text:p>
        </text:list-item>
      </text:list>
      <text:p text:style-name="Quotations"><text:span text:style-name="Emphasis">Failure to follow protocol may degrade the visual output.</text:span></text:p>
      <text:p text:style-name="Horizontal_20_Line"/>
      <text:p text:style-name="Text_20_body">2. Nombres para la Primera Colección (Edición Limitada)</text:p>
      <text:p text:style-name="Text_20_body">Elige el concepto que mejor encaje con los gráficos que definimos:</text:p>
      <text:list text:style-name="L29">
        <text:list-item>
          <text:p text:style-name="P36"><text:span text:style-name="Strong_20_Emphasis">Opción A (Industrial):</text:span> <text:span text:style-name="Emphasis">"GENESIS_UNIT"</text:span> (El inicio de todo).</text:p>
        </text:list-item>
        <text:list-item>
          <text:p text:style-name="P36"><text:span text:style-name="Strong_20_Emphasis">Opción B (Cyber/Glitch):</text:span> <text:span text:style-name="Emphasis">"SYSTEM_ERROR v1.0"</text:span> (Estética de fallo digital).</text:p>
        </text:list-item>
        <text:list-item>
          <text:p text:style-name="P36"><text:span text:style-name="Strong_20_Emphasis">Opción C (Urbana):</text:span> <text:span text:style-name="Emphasis">"CONCRETE_LABS"</text:span> (Inspirada en la arquitectura de la ciudad).</text:p>
        </text:list-item>
        <text:list-item>
          <text:p text:style-name="P36"><text:span text:style-name="Strong_20_Emphasis">Opción D (Minimal):</text:span> <text:span text:style-name="Emphasis">"VOID_COLLECTION"</text:span> (Espacio en blanco y negro puro).</text:p>
        </text:list-item>
      </text:list>
      <text:p text:style-name="Horizontal_20_Line"/>
      <text:p text:style-name="Text_20_body">3. Prompt para el "Lookbook" de la Colección</text:p>
      <text:p text:style-name="Text_20_body">Para que tu web tenga fotos de catálogo espectaculares, usa este prompt en una IA de imagen (como Midjourney):</text:p>
      <text:p text:style-name="Quotations">"Lookbook photography for RAW LABS, Genesis Unit collection. High-end streetwear fashion. Model with oversize hoodie and techwear pants standing in an abandoned industrial warehouse with neon green lighting. High contrast, sharp details, cinematic film grain, 8k resolution."</text:p>
      <text:p text:style-name="Horizontal_20_Line"/>
      <text:p text:style-name="Text_20_body">Tu Ecosistema RAW LABS™ está Completo:</text:p>
      <text:list text:style-name="L30">
        <text:list-item>
          <text:p text:style-name="P37"><text:span text:style-name="Strong_20_Emphasis">Web:</text:span> Con personalizador y estilo "The Lab".</text:p>
        </text:list-item>
        <text:list-item>
          <text:p text:style-name="P37"><text:span text:style-name="Strong_20_Emphasis">Branding:</text:span> Logo, eslogan y estética urbana.</text:p>
        </text:list-item>
        <text:list-item>
          <text:p text:style-name="P37"><text:span text:style-name="Strong_20_Emphasis">Marketing:</text:span> Estrategia de "Drop" y redes sociales.</text:p>
        </text:list-item>
        <text:list-item>
          <text:p text:style-name="P37"><text:span text:style-name="Strong_20_Emphasis">Logística:</text:span> Packaging de lujo, atención por WhatsApp y guía de cuidados.</text:p>
        </text:list-item>
      </text:list>
      <text:p text:style-name="Text_20_body">¿Quieres que te redacte el <text:span text:style-name="Strong_20_Emphasis">correo de invitación exclusiva</text:span> para los primeros 50 clientes "VIP" que podrán entrar al Lab antes que nadie o prefieres que <text:span text:style-name="Strong_20_Emphasis">repasemos el código final</text:span> de algún módulo de la web?</text:p>
      <text:p text:style-name="Standard">Para que el lanzamiento de <text:span text:style-name="Strong_20_Emphasis">RAW LABS™</text:span> sea un éxito rotundo, vamos a redactar ese <text:span text:style-name="Strong_20_Emphasis">correo VIP</text:span> con un tono de "acceso restringido" y a dejar listo el <text:span text:style-name="Strong_20_Emphasis">repaso técnico final</text:span> del código para el personalizador.</text:p>
      <text:p text:style-name="Standard">1. Correo de Acceso Anticipado (The VIP Drop)</text:p>
      <text:p text:style-name="Standard"><text:soft-page-break/>Este correo no es una promoción, es una <text:span text:style-name="Strong_20_Emphasis">invitación a un sistema cerrado</text:span>. Envíaselo a tus primeros 50 contactos o suscriptores.</text:p>
      <text:p text:style-name="Standard"><text:span text:style-name="Strong_20_Emphasis">Asunto:</text:span> [RESTRINGIDO] Acceso concedido al Lab de RAW LABS™.</text:p>
      <text:p text:style-name="Standard"><text:span text:style-name="Strong_20_Emphasis">Cuerpo:</text:span></text:p>
      <text:p text:style-name="Quotations"><text:span text:style-name="Strong_20_Emphasis">SISTEMA IDENTIFICADO // USUARIO_VIP</text:span></text:p>
      <text:p text:style-name="Quotations">Has sido seleccionado para el <text:span text:style-name="Strong_20_Emphasis">Early Access</text:span> de nuestra primera colección: <text:span text:style-name="Strong_20_Emphasis">GENESIS_UNIT</text:span>.</text:p>
      <text:p text:style-name="Quotations">Como uno de los primeros 50 miembros, el Lab ya está desbloqueado para ti. Diseña tu prenda antes de que el servidor se abra al público general y se agote el stock de algodón premium.</text:p>
      <text:p text:style-name="P9"><text:span text:style-name="Strong_20_Emphasis">TU CÓDIGO DE ACCESO:</text:span> <text:span text:style-name="Source_20_Text">RAW_PIONEER_50</text:span><text:line-break/><text:span text:style-name="Emphasis">(Introduce este código al finalizar para un -15% de descuento en tu primer Drop).</text:span></text:p>
      <text:p text:style-name="Quotations"><text:span text:style-name="Strong_20_Emphasis">[ENTRAR AL LAB AHORA]</text:span></text:p>
      <text:p text:style-name="Quotations"><text:span text:style-name="Emphasis">Nota: Este enlace caduca en 24 horas.</text:span><text:line-break/>⬛⬛⬛⬛⬛⬛⬛⬛ 100% LOADING...</text:p>
      <text:p text:style-name="Horizontal_20_Line"/>
      <text:p text:style-name="Text_20_body">2. Repaso Técnico del Código (The Lab Module)</text:p>
      <text:p text:style-name="Text_20_body">Si estás usando <text:span text:style-name="Strong_20_Emphasis">Lovable</text:span> o <text:span text:style-name="Strong_20_Emphasis">Bolt.new</text:span>, asegúrate de que el código del personalizador tenga estas <text:span text:style-name="Strong_20_Emphasis">3 funciones críticas</text:span> bien definidas:</text:p>
      <text:list text:style-name="L31">
        <text:list-item>
          <text:p text:style-name="P38"><text:span text:style-name="Strong_20_Emphasis">State Management (El Estado):</text:span> Debe haber un objeto que guarde <text:span text:style-name="Source_20_Text">{ prenda: 'hoodie', color: '#050505', logo: 'glitch_01', talla: 'XL' }</text:span>. Si la IA no lo hace, pídele: <text:span text:style-name="Emphasis">"Asegúrate de que la selección del usuario persista en el carrito mediante un Context Provider en React"</text:span>.</text:p>
        </text:list-item>
        <text:list-item>
          <text:p text:style-name="P38"><text:span text:style-name="Strong_20_Emphasis">Z-Index (Capas):</text:span> El gráfico seleccionado debe estar en una capa superior (<text:span text:style-name="Source_20_Text">z-index: 10</text:span>) sobre la imagen de la prenda (<text:span text:style-name="Source_20_Text">z-index: 0</text:span>) para que se vea realista.</text:p>
        </text:list-item>
        <text:list-item>
          <text:p text:style-name="P38"><text:span text:style-name="Strong_20_Emphasis">Exportación de Imagen:</text:span> Pídele a la IA: <text:span text:style-name="Emphasis">"Añade una función que use la librería </text:span><text:span text:style-name="Emphasis"><text:span text:style-name="Source_20_Text">html2canvas</text:span></text:span><text:span text:style-name="Emphasis"> para capturar la vista previa del diseño y enviarla como imagen al administrador del pedido"</text:span>. Esto te permitirá saber exactamente qué imprimir.</text:p>
        </text:list-item>
      </text:list>
      <text:p text:style-name="Horizontal_20_Line"/>
      <text:p text:style-name="Text_20_body">3. El Prompt Maestro Final (The "Go-Live" Prompt)</text:p>
      <text:p text:style-name="Text_20_body">Cuando sientas que la web está lista al 90%, lanza este prompt para pulir los detalles:</text:p>
      <text:p text:style-name="Quotations">"Revisa toda la aplicación de <text:span text:style-name="Strong_20_Emphasis">RAW LABS™</text:span>.</text:p>
      <text:list text:style-name="L32">
        <text:list-item>
          <text:p text:style-name="P39">Asegúrate de que todos los botones tengan un estado de <text:span text:style-name="Strong_20_Emphasis">'loading'</text:span> al ser pulsados.</text:p>
        </text:list-item>
        <text:list-item>
          <text:p text:style-name="P39">Haz que la tipografía de los precios sea <text:span text:style-name="Strong_20_Emphasis">Monoespaciada</text:span> y en color verde neón.</text:p>
        </text:list-item>
        <text:list-item>
          <text:p text:style-name="P39">Optimiza la carga de imágenes para que la web sea ultrarrápida.</text:p>
        </text:list-item>
        <text:list-item>
          <text:p text:style-name="P39"><text:soft-page-break/>Verifica que el flujo desde el <text:span text:style-name="Strong_20_Emphasis">Personalizador</text:span> hasta el <text:span text:style-name="Strong_20_Emphasis">Checkout de Stripe</text:span> sea fluido y sin errores de consola."</text:p>
        </text:list-item>
      </text:list>
      <text:p text:style-name="Horizontal_20_Line"/>
      <text:p text:style-name="Text_20_body">¡Ya tienes todo! Tienes una marca con <text:span text:style-name="Strong_20_Emphasis">identidad</text:span>, una <text:span text:style-name="Strong_20_Emphasis">estrategia de marketing</text:span> agresiva y una <text:span text:style-name="Strong_20_Emphasis">aplicación web</text:span> con tecnología de punta.</text:p>
      <text:p text:style-name="Text_20_body">¿Quieres que te ayude a configurar los <text:span text:style-name="Strong_20_Emphasis">anuncios de Meta (Facebook/Instagram Ads)</text:span> para atraer tráfico al Lab o prefieres que te dé consejos sobre <text:span text:style-name="Strong_20_Emphasis">cómo elegir al mejor proveedor</text:span> para imprimir tus diseños?</text:p>
      <text:p text:style-name="Standard"/>
      <text:p text:style-name="Standard">Para que <text:span text:style-name="Strong_20_Emphasis">RAW LABS™</text:span> pase de ser una web increíble a un negocio real, vamos a definir la <text:span text:style-name="Strong_20_Emphasis">estrategia de captación</text:span> (Ads) y el <text:span text:style-name="Strong_20_Emphasis">perfil de proveedor</text:span> que necesitas para no fallar en la calidad.</text:p>
      <text:p text:style-name="Standard">1. Estrategia de Meta Ads (Instagram/TikTok)</text:p>
      <text:p text:style-name="Standard">No busques "vender" directamente, busca <text:span text:style-name="Strong_20_Emphasis">"reclutar"</text:span> creadores para tu Lab.</text:p>
      <text:list text:style-name="L33">
        <text:list-item>
          <text:p text:style-name="P40"><text:span text:style-name="Strong_20_Emphasis">Campaña de Tráfico/Conversión:</text:span></text:p>
          <text:list>
            <text:list-item>
              <text:p text:style-name="P40"><text:span text:style-name="Strong_20_Emphasis">Público Objetivo:</text:span> Intereses en <text:span text:style-name="Emphasis">Streetwear</text:span>, <text:span text:style-name="Emphasis">Graphic Design</text:span>, <text:span text:style-name="Emphasis">Hypebeast</text:span>, <text:span text:style-name="Emphasis">Highsnobiety</text:span>, y marcas como <text:span text:style-name="Emphasis">Off-White</text:span> o <text:span text:style-name="Emphasis">Fear of God</text:span>.</text:p>
            </text:list-item>
            <text:list-item>
              <text:p text:style-name="P40"><text:span text:style-name="Strong_20_Emphasis">Creative A (El Gancho):</text:span> Un vídeo tipo "POV" (punto de vista) de alguien usando el personalizador en el móvil con el texto: <text:span text:style-name="Emphasis">"Deja de comprar lo que todos llevan. Diseña tu propio drop."</text:span></text:p>
            </text:list-item>
            <text:list-item>
              <text:p text:style-name="P40"><text:span text:style-name="Strong_20_Emphasis">Creative B (El Producto):</text:span> Foto estática de alta calidad de una <text:span text:style-name="Strong_20_Emphasis">Heavy Hoodie</text:span> con un diseño "Chrome" y el precio: <text:span text:style-name="Emphasis">"Premium Grade 400g. Custom-made for you."</text:span></text:p>
            </text:list-item>
          </text:list>
        </text:list-item>
        <text:list-item>
          <text:p text:style-name="P40"><text:span text:style-name="Strong_20_Emphasis">Retargeting:</text:span> Muestra anuncios a quienes entraron al Lab pero no compraron, con el mensaje: <text:span text:style-name="Emphasis">"Tu diseño sigue en el sistema. Finaliza el drop antes de que se agote el stock de [Color de Prenda]."</text:span></text:p>
        </text:list-item>
      </text:list>
      <text:p text:style-name="Horizontal_20_Line"/>
      <text:p text:style-name="Text_20_body">2. Cómo elegir a tu Proveedor (The Production Partner)</text:p>
      <text:p text:style-name="Text_20_body">Para mantener el estándar <text:span text:style-name="Strong_20_Emphasis">RAW</text:span>, busca proveedores que ofrezcan estas 3 características:</text:p>
      <text:list text:style-name="L34">
        <text:list-item>
          <text:p text:style-name="P41"><text:span text:style-name="Strong_20_Emphasis">DTF (Direct to Film) de Alta Calidad:</text:span> Es la mejor técnica para personalización unidad por unidad. Permite degradados, detalles finos (estilo Glitch) y tiene un tacto elástico que no se cuartea.</text:p>
        </text:list-item>
        <text:list-item>
          <text:p text:style-name="P41"><text:span text:style-name="Strong_20_Emphasis">Prendas "Ready for Dye" o "Heavyweight":</text:span> Pide muestras de camisetas de al menos <text:span text:style-name="Strong_20_Emphasis">200-240g</text:span> y sudaderas de <text:span text:style-name="Strong_20_Emphasis">350-400g</text:span>. Si el algodón es fino, la marca perderá el aura "Premium".</text:p>
        </text:list-item>
        <text:list-item>
          <text:p text:style-name="P41"><text:span text:style-name="Strong_20_Emphasis">Servicio Print-on-Demand (POD) con API:</text:span> Si no quieres gestionar stock, busca proveedores como <text:span text:style-name="Emphasis">Printful</text:span>, <text:span text:style-name="Emphasis">Printify</text:span> (con sus gamas 'Lane Seven' o 'Shaka Wear') o proveedores locales que se integren con tu web para automatizar el envío.</text:p>
        </text:list-item>
      </text:list>
      <text:p text:style-name="Horizontal_20_Line"/>
      <text:p text:style-name="Text_20_body"/>
      <text:p text:style-name="Text_20_body"/>
      <text:p text:style-name="Text_20_body"/>
      <text:p text:style-name="Text_20_body"/>
      <text:p text:style-name="Text_20_body"><text:soft-page-break/>3. Prompt para el "Ad Copywriter" AI</text:p>
      <text:p text:style-name="Text_20_body">Usa esto para generar variaciones de tus anuncios:</text:p>
      <text:p text:style-name="Quotations">"Escribe 3 textos para anuncios de Instagram para <text:span text:style-name="Strong_20_Emphasis">RAW LABS™</text:span>.</text:p>
      <text:list text:style-name="L35">
        <text:list-item>
          <text:p text:style-name="P42"><text:span text:style-name="Strong_20_Emphasis">Tono:</text:span> Corto, crudo, minimalista.</text:p>
        </text:list-item>
        <text:list-item>
          <text:p text:style-name="P42"><text:span text:style-name="Strong_20_Emphasis">Keywords:</text:span> Custom, Drop, No-Generic, Lab.</text:p>
        </text:list-item>
        <text:list-item>
          <text:p text:style-name="P42"><text:span text:style-name="Strong_20_Emphasis">Estructura:</text:span> Una frase impactante, una lista de 3 puntos técnicos (ej. 240g Cotton, Custom Design, Fast Shipping) y un CTA claro tipo '[JOIN_THE_LAB]'."</text:p>
        </text:list-item>
      </text:list>
      <text:p text:style-name="Horizontal_20_Line"/>
      <text:p text:style-name="Text_20_body">4. Último toque: La "Thank You Page" Social</text:p>
      <text:p text:style-name="Text_20_body">Pide a tu IA de código esto:</text:p>
      <text:p text:style-name="Quotations">"En la página de confirmación de pedido, añade un botón que diga <text:span text:style-name="Strong_20_Emphasis">'SHARE YOUR DESIGN'</text:span>. Al pulsarlo, debe generar una imagen optimizada para <text:span text:style-name="Strong_20_Emphasis">Instagram Stories</text:span> que muestre el diseño del cliente con el logo de <text:span text:style-name="Strong_20_Emphasis">RAW LABS™</text:span> para que nos etiquete."</text:p>
      <text:p text:style-name="Horizontal_20_Line"/>
      <text:p text:style-name="Text_20_body">¡Tienes el ecosistema completo! Desde el código hasta la logística y el marketing.</text:p>
      <text:p text:style-name="Text_20_body">¿Quieres que te ayude a crear un <text:span text:style-name="Strong_20_Emphasis">cronograma de lanzamientos (Drops)</text:span> para los próximos 3 meses o prefieres que <text:span text:style-name="Strong_20_Emphasis">revisemos algún detalle técnico del código</text:span> del personalizador para que sea más fluido?</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Para que <text:span text:style-name="Strong_20_Emphasis">RAW LABS™</text:span> no sea solo una web, sino una marca con <text:span text:style-name="Strong_20_Emphasis">ritmo de ventas constante</text:span>, vamos a blindar el <text:span text:style-name="Strong_20_Emphasis">cronograma de lanzamientos</text:span> y a optimizar la <text:span text:style-name="Strong_20_Emphasis">fluidez del código</text:span> del personalizador.</text:p>
      <text:p text:style-name="Standard">1. Cronograma de Lanzamientos (The 90-Day Drop Map)</text:p>
      <text:p text:style-name="Standard">El <text:span text:style-name="Emphasis">streetwear</text:span> funciona por escasez. No dejes todo abierto siempre; crea "ventanas" de compra.</text:p>
      <text:p text:style-name="Standard"/>
      <text:p text:style-name="Standard"/>
      <text:p text:style-name="Standard"/>
      <text:p text:style-name="Standard"/>
      <text:list text:style-name="L36">
        <text:list-item>
          <text:p text:style-name="P43"><text:span text:style-name="Strong_20_Emphasis">Mes 1: [GENESIS_UNIT]</text:span></text:p>
          <text:list>
            <text:list-item>
              <text:p text:style-name="P43"><text:span text:style-name="Emphasis">Foco:</text:span> Camisetas Oversize (Black/White).</text:p>
            </text:list-item>
            <text:list-item>
              <text:p text:style-name="P43"><text:span text:style-name="Emphasis">Objetivo:</text:span> Posicionar la calidad del algodón y el personalizador.</text:p>
            </text:list-item>
            <text:list-item>
              <text:p text:style-name="P43"><text:span text:style-name="Emphasis">Evento:</text:span> "The 48h Opening" (Solo 48h para diseñar y comprar).</text:p>
            </text:list-item>
          </text:list>
        </text:list-item>
        <text:list-item>
          <text:p text:style-name="P43"><text:span text:style-name="Strong_20_Emphasis">Mes 2: [SYSTEM_ERROR]</text:span></text:p>
          <text:list>
            <text:list-item>
              <text:p text:style-name="P43"><text:span text:style-name="Emphasis">Foco:</text:span> Hoodies pesadas (400g) + Gráficos tipo Glitch.</text:p>
            </text:list-item>
            <text:list-item>
              <text:p text:style-name="P43"><text:span text:style-name="Emphasis">Estrategia:</text:span> Colaboración con un artista digital local (diseños exclusivos por tiempo limitado).</text:p>
            </text:list-item>
          </text:list>
        </text:list-item>
        <text:list-item>
          <text:p text:style-name="P43"><text:span text:style-name="Strong_20_Emphasis">Mes 3: [CONCRETE_ACCESSORIES]</text:span></text:p>
          <text:list>
            <text:list-item>
              <text:p text:style-name="P43"><text:span text:style-name="Emphasis">Foco:</text:span> Gorras tipo Trucker + Branding Packs (Stickers/Bags).</text:p>
            </text:list-item>
            <text:list-item>
              <text:p text:style-name="P43"><text:span text:style-name="Emphasis">Estrategia:</text:span> "Gift with Purchase" (Regalo por compras superiores a 60€).</text:p>
            </text:list-item>
          </text:list>
        </text:list-item>
      </text:list>
      <text:p text:style-name="Horizontal_20_Line"/>
      <text:p text:style-name="Text_20_body">2. Optimización del Código (The Smooth Lab Experience)</text:p>
      <text:p text:style-name="Text_20_body">Si notas que el personalizador va lento, pide estos ajustes técnicos a tu IA (<text:span text:style-name="Strong_20_Emphasis">Lovable/Bolt/Cursor</text:span>):</text:p>
      <text:p text:style-name="Quotations">"Optimiza el <text:span text:style-name="Strong_20_Emphasis">Canvas de Personalización</text:span> de RAW LABS™:</text:p>
      <text:list text:style-name="L37">
        <text:list-item>
          <text:p text:style-name="P44"><text:span text:style-name="Strong_20_Emphasis">Debounce Input:</text:span> Haz que el renderizado del texto personalizado no sea instantáneo al teclear, sino que espere 300ms para no saturar el navegador.</text:p>
        </text:list-item>
        <text:list-item>
          <text:p text:style-name="P44"><text:span text:style-name="Strong_20_Emphasis">Image Preloading:</text:span> Carga las imágenes de las prendas (mockups) en segundo plano (Priority Load) para que al cambiar de color no haya parpadeos blancos.</text:p>
        </text:list-item>
        <text:list-item>
          <text:p text:style-name="P44"><text:span text:style-name="Strong_20_Emphasis">SVG Overlay:</text:span> En lugar de imágenes pesadas para los gráficos, intenta usar <text:span text:style-name="Strong_20_Emphasis">SVGs</text:span> siempre que sea posible para que el escalado (zoom) sea infinito y sin pérdida de calidad.</text:p>
        </text:list-item>
        <text:list-item>
          <text:p text:style-name="P44"><text:span text:style-name="Strong_20_Emphasis">Mobile Drag:</text:span> Asegúrate de que el evento 'touch' sea fluido para que los usuarios puedan mover sus diseños con el dedo en el móvil sin saltos."</text:p>
        </text:list-item>
      </text:list>
      <text:p text:style-name="Horizontal_20_Line"/>
      <text:p text:style-name="Text_20_body"/>
      <text:p text:style-name="Text_20_body"/>
      <text:p text:style-name="Text_20_body"/>
      <text:p text:style-name="Text_20_body"><text:soft-page-break/>3. El "Admin Panel" (Tu centro de mando)</text:p>
      <text:p text:style-name="P12">Necesitas ver qué están diseñando. Pide a la IA que cree una <text:span text:style-name="Strong_20_Emphasis">Ruta Protegida (</text:span><text:span text:style-name="Strong_20_Emphasis"><text:span text:style-name="Source_20_Text">/admin</text:span></text:span><text:span text:style-name="Strong_20_Emphasis">)</text:span>:</text:p>
      <text:p text:style-name="Quotations">"Crea un <text:span text:style-name="Strong_20_Emphasis">Dashboard de Administrador</text:span> simple:</text:p>
      <text:list text:style-name="L38">
        <text:list-item>
          <text:p text:style-name="P45">Una lista de pedidos con: Nombre, Prenda, Talla y la <text:span text:style-name="Strong_20_Emphasis">URL de la imagen generada</text:span> del diseño.</text:p>
        </text:list-item>
        <text:list-item>
          <text:p text:style-name="P45">Un botón para marcar como <text:span text:style-name="Strong_20_Emphasis">'IN_PRODUCTION'</text:span> o <text:span text:style-name="Strong_20_Emphasis">'SHIPPED'</text:span>.</text:p>
        </text:list-item>
        <text:list-item>
          <text:p text:style-name="P45">Estética: Texto verde sobre fondo negro (tipo consola de comandos)."</text:p>
        </text:list-item>
      </text:list>
      <text:p text:style-name="Horizontal_20_Line"/>
      <text:p text:style-name="Text_20_body">4. Último toque: El "Social Proof" dinámico</text:p>
      <text:p text:style-name="Text_20_body">Añade un pequeño componente en la esquina inferior de la web:</text:p>
      <text:p text:style-name="P9">"Implementa una <text:span text:style-name="Strong_20_Emphasis">notificación discreta</text:span> (Toast) que aparezca cada cierto tiempo: <text:span text:style-name="Source_20_Text">[USER_049] JUST CREATED A GENESIS HOODIE</text:span>. Esto crea sensación de comunidad activa."</text:p>
      <text:p text:style-name="Horizontal_20_Line"/>
      <text:p text:style-name="Text_20_body">¿Cómo quieres que demos el paso final?</text:p>
      <text:p text:style-name="Text_20_body">¿Prefieres que te ayude a redactar los <text:span text:style-name="Strong_20_Emphasis">mensajes de error con estilo "Hacker"</text:span> (ej: cuando una talla se agota) o quieres que te dé una <text:span text:style-name="Strong_20_Emphasis">lista de 3 herramientas gratuitas</text:span> para quitar el fondo a tus imágenes de catálogo y que queden profesionales?</text:p>
      <text:p text:style-name="Text_20_body"><text:line-break/>Para que <text:span text:style-name="Strong_20_Emphasis">RAW LABS™</text:span> sea una experiencia redonda, vamos a configurar esos <text:span text:style-name="Strong_20_Emphasis">mensajes de error con identidad</text:span> y las <text:span text:style-name="Strong_20_Emphasis">herramientas clave</text:span> para que tus fotos se vean de estudio sin gastar un euro.</text:p>
      <text:p text:style-name="Standard">1. Mensajes de Error (The Hacker Feedback)</text:p>
      <text:p text:style-name="Standard">No uses alertas genéricas. Personaliza los estados de la web en tu código con este estilo:</text:p>
      <text:list text:style-name="L39">
        <text:list-item>
          <text:p text:style-name="P46"><text:span text:style-name="Strong_20_Emphasis">Sin Stock (Talla agotada):</text:span></text:p>
          <text:p text:style-name="P47"><text:span text:style-name="Source_20_Text">[ERROR_404: SIZE_NOT_FOUND]</text:span><text:line-break/>"Esta talla ha sido reclamada por la calle. Elige otra unidad o espera al próximo Drop."</text:p>
        </text:list-item>
        <text:list-item>
          <text:p text:style-name="P46"><text:span text:style-name="Strong_20_Emphasis">Error en el Pago:</text:span></text:p>
          <text:p text:style-name="P47"><text:span text:style-name="Source_20_Text">[TRANSACTION_REJECTED // ENCRYPTION_FAIL]</text:span><text:line-break/>"El sistema no ha podido procesar tu crédito. Verifica tus datos y re-intenta el acceso."</text:p>
        </text:list-item>
        <text:list-item>
          <text:p text:style-name="P46"><text:span text:style-name="Strong_20_Emphasis">Imagen de carga pesada:</text:span></text:p>
          <text:p text:style-name="P47"><text:span text:style-name="Source_20_Text">[OPTIMIZING_IMAGE... 88%]</text:span><text:line-break/>"Ajustando resolución para máxima fidelidad en el tejido."</text:p>
        </text:list-item>
      </text:list>
      <text:p text:style-name="Horizontal_20_Line"/>
      <text:p text:style-name="Text_20_body"/>
      <text:p text:style-name="Text_20_body"/>
      <text:p text:style-name="Text_20_body"><text:soft-page-break/>2. Herramientas Gratuitas (The Pro Toolkit)</text:p>
      <text:p text:style-name="Text_20_body">Para que los productos personalizados se vean "reales" sobre el fondo oscuro de tu web, usa estas tres:</text:p>
      <text:list text:style-name="L40">
        <text:list-item>
          <text:p text:style-name="P48"><text:span text:style-name="Strong_20_Emphasis">Adobe Express (Background Remover):</text:span> Es la mejor gratuita para recortar camisetas y sudaderas con bordes limpios (sin "puntos blancos").</text:p>
        </text:list-item>
        <text:list-item>
          <text:p text:style-name="P48"><text:span text:style-name="Strong_20_Emphasis">Squoosh.app:</text:span> De Google. Úsala para comprimir tus imágenes de catálogo al máximo sin perder un ápice de calidad. Hará que tu web vuele.</text:p>
        </text:list-item>
        <text:list-item>
          <text:p text:style-name="P48"><text:span text:style-name="Strong_20_Emphasis">Photopea:</text:span> Es un Photoshop gratuito en el navegador. Úsalo para poner tus diseños sobre las fotos de las prendas y ver cómo quedan antes de subirlas al personalizador de la IA.</text:p>
        </text:list-item>
      </text:list>
      <text:p text:style-name="Horizontal_20_Line"/>
      <text:p text:style-name="Text_20_body">3. Prompt Final de Pulido UI/UX</text:p>
      <text:p text:style-name="Text_20_body">Lanza este comando a tu IA de código (<text:span text:style-name="Strong_20_Emphasis">Lovable / Bolt / Cursor</text:span>) para cerrar la fase de desarrollo:</text:p>
      <text:p text:style-name="Quotations">"Revisa el <text:span text:style-name="Strong_20_Emphasis">Sistema de Notificaciones (Toasts)</text:span> de RAW LABS™.</text:p>
      <text:list text:style-name="L41">
        <text:list-item>
          <text:p text:style-name="P49">Crea una animación de <text:span text:style-name="Strong_20_Emphasis">'glitch' de entrada</text:span> para cada alerta.</text:p>
        </text:list-item>
        <text:list-item>
          <text:p text:style-name="P50">Si el usuario intenta añadir al carrito sin elegir talla, muestra: <text:span text:style-name="Source_20_Text">[ACTION_DENIED: SELECT_SIZE]</text:span>.</text:p>
        </text:list-item>
        <text:list-item>
          <text:p text:style-name="P50">Si el usuario sube una imagen de baja resolución, adviértele: <text:span text:style-name="Source_20_Text">[LOW_RES_WARNING: PRINT_QUALITY_AT_RISK]</text:span>.</text:p>
        </text:list-item>
        <text:list-item>
          <text:p text:style-name="P49">Asegúrate de que todos los mensajes usen la fuente <text:span text:style-name="Strong_20_Emphasis">Monoespaciada</text:span> y el color de acento <text:span text:style-name="Strong_20_Emphasis">Verde Neón</text:span>."</text:p>
        </text:list-item>
      </text:list>
      <text:p text:style-name="Horizontal_20_Line"/>
      <text:p text:style-name="Text_20_body">4. Estrategia de Retención (Post-Compra)</text:p>
      <text:p text:style-name="Text_20_body">Para que el cliente vuelva, pide esto para el email de "Pedido Enviado":</text:p>
      <text:p text:style-name="Quotations">"Incluye un botón que diga: <text:span text:style-name="Strong_20_Emphasis">[ENTER_HIDDEN_LAB]</text:span>. Al pulsarlo, el cliente accede a una sección secreta de la web con un <text:span text:style-name="Strong_20_Emphasis">diseño exclusivo de regalo</text:span> para su próximo pedido."</text:p>
      <text:p text:style-name="Horizontal_20_Line"/>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oft-page-break/><text:span text:style-name="Strong_20_Emphasis">¿Cómo quieres que avancemos para el lanzamiento final?</text:span></text:p>
      <text:p text:style-name="Text_20_body">¿Prefieres que te ayude a redactar la <text:span text:style-name="Strong_20_Emphasis">sección "Sobre Nosotros" (The Manifesto)</text:span> con un tono rebelde y de marca de culto, o que te explique <text:span text:style-name="Strong_20_Emphasis">cómo conectar un dominio propio</text:span> (ej: .com / .store) a tu aplicación creada con IA?</text:p>
      <text:p text:style-name="Text_20_body"/>
      <text:p text:style-name="Standard">Para que <text:span text:style-name="Strong_20_Emphasis">RAW LABS™</text:span> deje de ser un proyecto y se convierta en una entidad real, vamos a definir su <text:span text:style-name="Strong_20_Emphasis">Manifiesto de Marca</text:span> (el alma) y la <text:span text:style-name="Strong_20_Emphasis">Configuración Técnica</text:span> del dominio (el cuerpo).</text:p>
      <text:p text:style-name="Standard">1. El Manifiesto (Sección "About Us" / The Core)</text:p>
      <text:p text:style-name="Standard">No escribas una historia aburrida. Escribe una declaración de intenciones con estética de <text:span text:style-name="Strong_20_Emphasis">documento clasificado</text:span>:</text:p>
      <text:p text:style-name="Standard"/>
      <text:p text:style-name="Quotations"><text:span text:style-name="Strong_20_Emphasis">[MANIFESTO // RAW LABS™]</text:span></text:p>
      <text:p text:style-name="Quotations"><text:span text:style-name="Strong_20_Emphasis">ESTADO:</text:span> ACTIVO.<text:line-break/><text:span text:style-name="Strong_20_Emphasis">ORIGEN:</text:span> La calle. El código. El ruido.</text:p>
      <text:p text:style-name="Quotations">En un mundo de producción masiva y uniformes invisibles, <text:span text:style-name="Strong_20_Emphasis">RAW LABS™</text:span> es el fallo en el sistema. No dictamos tendencias; proporcionamos las herramientas.</text:p>
      <text:p text:style-name="Quotations">Creemos en el algodón de alto gramaje, en los píxeles crudos y en que el diseño final solo te pertenece a ti. Aquí no compras ropa, adquieres una pieza de ingeniería urbana personalizada en nuestro Lab.</text:p>
      <text:p text:style-name="Quotations"><text:span text:style-name="Strong_20_Emphasis">SIN FILTROS. SIN REGLAS. SOLO RAW.</text:span></text:p>
      <text:p text:style-name="Horizontal_20_Line"/>
      <text:p text:style-name="Text_20_body">2. Guía: Cómo Conectar tu Dominio (.com / .store)</text:p>
      <text:p text:style-name="Text_20_body">Si has creado tu web con herramientas de IA como <text:span text:style-name="Strong_20_Emphasis">Lovable</text:span>, <text:span text:style-name="Strong_20_Emphasis">Bolt.new</text:span> o <text:span text:style-name="Strong_20_Emphasis">Vercel</text:span>, sigue estos pasos para que tu URL sea profesional:</text:p>
      <text:list text:style-name="L42">
        <text:list-item>
          <text:p text:style-name="P51"><text:span text:style-name="Strong_20_Emphasis">Compra el Dominio:</text:span> Usa sitios como <text:span text:style-name="Emphasis">Namecheap</text:span>, <text:span text:style-name="Emphasis">Google Domains</text:span> o <text:span text:style-name="Emphasis">Cloudflare</text:span>. Busca <text:span text:style-name="Source_20_Text">rawlabs.store</text:span> o <text:span text:style-name="Source_20_Text">rawlabs.io</text:span>.</text:p>
        </text:list-item>
        <text:list-item>
          <text:p text:style-name="P52"><text:span text:style-name="Strong_20_Emphasis">Configura los DNS:</text:span></text:p>
          <text:list>
            <text:list-item>
              <text:p text:style-name="P52">En tu herramienta de IA, busca la sección <text:span text:style-name="Strong_20_Emphasis">"Settings" &gt; "Custom Domain"</text:span>.</text:p>
            </text:list-item>
            <text:list-item>
              <text:p text:style-name="P52">Copia el valor del registro <text:span text:style-name="Strong_20_Emphasis">A</text:span> (IP) o <text:span text:style-name="Strong_20_Emphasis">CNAME</text:span> que te den.</text:p>
            </text:list-item>
            <text:list-item>
              <text:p text:style-name="P52">Pégalo en el panel de control de tu dominio.</text:p>
            </text:list-item>
          </text:list>
        </text:list-item>
        <text:list-item>
          <text:p text:style-name="P52"><text:span text:style-name="Strong_20_Emphasis">Activa el SSL (Candado de seguridad):</text:span> Estas plataformas lo hacen gratis automáticamente. <text:span text:style-name="Strong_20_Emphasis">Es vital</text:span> para que Stripe funcione y tus clientes confíen su tarjeta.</text:p>
        </text:list-item>
      </text:list>
      <text:p text:style-name="Horizontal_20_Line"/>
      <text:p text:style-name="Text_20_body"/>
      <text:p text:style-name="Text_20_body"/>
      <text:p text:style-name="Text_20_body"/>
      <text:p text:style-name="Text_20_body"><text:soft-page-break/>3. Prompt de Diseño para el "Manifiesto" (IA de Código)</text:p>
      <text:p text:style-name="Text_20_body">Para que esta sección se vea espectacular en la web, usa este prompt:</text:p>
      <text:p text:style-name="Quotations">"Crea la sección <text:span text:style-name="Strong_20_Emphasis">'Manifesto'</text:span> de RAW LABS™.</text:p>
      <text:list text:style-name="L43">
        <text:list-item>
          <text:p text:style-name="P53">Usa un fondo con un <text:span text:style-name="Strong_20_Emphasis">efecto de 'grain' (ruido)</text:span> muy sutil.</text:p>
        </text:list-item>
        <text:list-item>
          <text:p text:style-name="P53">El texto debe aparecer con una animación de <text:span text:style-name="Strong_20_Emphasis">'máquina de escribir'</text:span> ultra rápida.</text:p>
        </text:list-item>
        <text:list-item>
          <text:p text:style-name="P53">Incluye un gráfico decorativo a un lado que sea un <text:span text:style-name="Strong_20_Emphasis">código QR estático</text:span> y coordenadas geográficas aleatorias.</text:p>
        </text:list-item>
        <text:list-item>
          <text:p text:style-name="P53">Mantén el estilo neobrutalista: bordes negros gruesos y tipografía <text:span text:style-name="Strong_20_Emphasis">Syne Extra Bold</text:span>."</text:p>
        </text:list-item>
      </text:list>
      <text:p text:style-name="Horizontal_20_Line"/>
      <text:p text:style-name="Text_20_body">4. Estrategia de Lanzamiento: "The Stealth Drop"</text:p>
      <text:p text:style-name="Text_20_body">Para tu primer día, haz que la web pida una <text:span text:style-name="Strong_20_Emphasis">"Access Key"</text:span> (Contraseña).</text:p>
      <text:list text:style-name="L44">
        <text:list-item>
          <text:p text:style-name="P54">Anuncia en Instagram: <text:span text:style-name="Emphasis">"Solo los que tengan la clave entran al Lab hoy"</text:span>.</text:p>
        </text:list-item>
        <text:list-item>
          <text:p text:style-name="P54">Reparte la clave por mensaje directo. Esto crea un sentimiento de <text:span text:style-name="Strong_20_Emphasis">comunidad exclusiva</text:span> brutal.</text:p>
        </text:list-item>
      </text:list>
      <text:p text:style-name="Horizontal_20_Line"/>
      <text:p text:style-name="Text_20_body"><text:span text:style-name="Strong_20_Emphasis">¿Cuál es el movimiento final para el despliegue?</text:span></text:p>
      <text:p text:style-name="Text_20_body">¿Prefieres que te ayude a configurar los <text:span text:style-name="Strong_20_Emphasis">puntos de control de calidad</text:span> para revisar tus muestras de ropa cuando lleguen, o que te dé una <text:span text:style-name="Strong_20_Emphasis">lista de 5 canciones/géneros</text:span> para poner de fondo en la web y terminar de cerrar la atmósfera urbana?</text:p>
      <text:p text:style-name="Standard">Para que <text:span text:style-name="Strong_20_Emphasis">RAW LABS™</text:span> sea una experiencia sensorial completa y el producto final sea impecable, vamos a definir el <text:span text:style-name="Strong_20_Emphasis">Control de Calidad</text:span> y la <text:span text:style-name="Strong_20_Emphasis">Atmósfera Sonora</text:span> de la web.</text:p>
      <text:p text:style-name="Standard">1. Protocolo de Control de Calidad (The Quality Check)</text:p>
      <text:p text:style-name="Standard">Cuando recibas tus primeras muestras del proveedor, no te fijes solo en el dibujo. Usa esta lista de <text:span text:style-name="Strong_20_Emphasis">puntos críticos</text:span> para decidir si el proveedor es apto para el estándar RAW:</text:p>
      <text:list text:style-name="L45">
        <text:list-item>
          <text:p text:style-name="P55"><text:span text:style-name="Strong_20_Emphasis">Prueba de Lavado (Stress Test):</text:span> Lava la prenda del revés a 30°C. Si el gráfico pierde color, se agrieta o se despega en el primer lavado, descarta al proveedor. El <text:span text:style-name="Strong_20_Emphasis">DTF premium</text:span> debe aguantar al menos 40-50 lavados sin cambios.</text:p>
        </text:list-item>
        <text:list-item>
          <text:p text:style-name="P55"><text:span text:style-name="Strong_20_Emphasis">El "Cuello y Puños":</text:span> Tira del cuello con fuerza moderada. Debe recuperar su forma original al instante. Si se queda cedido o "estirado", la prenda es de baja calidad.</text:p>
        </text:list-item>
        <text:list-item>
          <text:p text:style-name="P55"><text:span text:style-name="Strong_20_Emphasis">Densidad del Gráfico:</text:span> Pasa la mano sobre el diseño personalizado. Debe sentirse como una capa fina y flexible, no como un cartón rígido que impide que la tela respire.</text:p>
        </text:list-item>
        <text:list-item>
          <text:p text:style-name="P55"><text:span text:style-name="Strong_20_Emphasis">Simetría:</text:span> Mide la distancia del diseño a las costuras laterales. Un error de más de 1.5 cm indica una producción descuidada.</text:p>
        </text:list-item>
      </text:list>
      <text:p text:style-name="Horizontal_20_Line"/>
      <text:p text:style-name="Text_20_body"/>
      <text:p text:style-name="Text_20_body"/>
      <text:p text:style-name="Text_20_body"><text:soft-page-break/>2. Atmósfera Sonora (The Lab Playlist)</text:p>
      <text:p text:style-name="Text_20_body">La música en una web de <text:span text:style-name="Emphasis">streetwear</text:span> aumenta el tiempo de permanencia y refuerza la marca. Pide a tu IA de código que añada un <text:span text:style-name="Strong_20_Emphasis">Reproductor Minimalista</text:span> en la esquina:</text:p>
      <text:p text:style-name="Quotations">"Añade un botón de <text:span text:style-name="Strong_20_Emphasis">[AUDIO_ON/OFF]</text:span> con una estética de osciloscopio (ondas que se mueven). Al activarlo, que suene una pista de fondo en bucle de volumen bajo (20%)."</text:p>
      <text:p text:style-name="Text_20_body"><text:span text:style-name="Strong_20_Emphasis">Géneros recomendados para RAW LABS™:</text:span></text:p>
      <text:list text:style-name="L46">
        <text:list-item>
          <text:p text:style-name="P56"><text:span text:style-name="Strong_20_Emphasis">Phonk / Drift Phonk:</text:span> Ritmos pesados, oscuros y con mucha actitud urbana.</text:p>
        </text:list-item>
        <text:list-item>
          <text:p text:style-name="P56"><text:span text:style-name="Strong_20_Emphasis">Industrial Techno:</text:span> Sonidos metálicos y repetitivos que encajan con la estética "Lab".</text:p>
        </text:list-item>
        <text:list-item>
          <text:p text:style-name="P56"><text:span text:style-name="Strong_20_Emphasis">Lo-Fi Phonk:</text:span> Si quieres un ambiente más relajado pero con estilo <text:span text:style-name="Emphasis">hacker</text:span>.</text:p>
        </text:list-item>
        <text:list-item>
          <text:p text:style-name="P56"><text:span text:style-name="Strong_20_Emphasis">Dark Ambient:</text:span> Para un misterio total y enfoque en el diseño.</text:p>
        </text:list-item>
      </text:list>
      <text:p text:style-name="Text_20_body"><text:span text:style-name="Emphasis">Consejo: Usa bibliotecas de música sin copyright (como Uppbeat o YouTube Audio Library) para evitar bloqueos.</text:span></text:p>
      <text:p text:style-name="Horizontal_20_Line"/>
      <text:p text:style-name="Text_20_body">3. Prompt de Diseño para la "Ficha de Producto" (IA de Código)</text:p>
      <text:p text:style-name="Text_20_body">Para que cada camiseta se vea como una pieza de ingeniería:</text:p>
      <text:p text:style-name="Quotations">"Diseña la <text:span text:style-name="Strong_20_Emphasis">Ficha Técnica de Producto</text:span> en RAW LABS™.</text:p>
      <text:list text:style-name="L47">
        <text:list-item>
          <text:p text:style-name="P57">Al lado de la foto de la prenda, añade un panel con bordes tipo 'glitch'.</text:p>
        </text:list-item>
        <text:list-item>
          <text:p text:style-name="P58">Texto: <text:span text:style-name="Source_20_Text">[DENSITY: 240GSM]</text:span>, <text:span text:style-name="Source_20_Text">[FIT: OVERSIZE_STREET]</text:span>, <text:span text:style-name="Source_20_Text">[FABRIC: 100%_ORGANIC_COTTON]</text:span>.</text:p>
        </text:list-item>
        <text:list-item>
          <text:p text:style-name="P57">Añade un pequeño gráfico de <text:span text:style-name="Strong_20_Emphasis">'Nivel de Rareza'</text:span> que cambie según el diseño elegido (Common, Rare, Legendary)."</text:p>
        </text:list-item>
      </text:list>
      <text:p text:style-name="Horizontal_20_Line"/>
      <text:p text:style-name="Text_20_body"><text:line-break/></text:p>
      <text:p text:style-name="Standard">4. Último toque: El "Pre-Order" Tag</text:p>
      <text:p text:style-name="Standard">Si no tienes stock todavía, pide a la IA:</text:p>
      <text:p text:style-name="P9">"Cambia el botón de 'Añadir al Carrito' por <text:span text:style-name="Strong_20_Emphasis">'[INITIALIZE_PRE_ORDER]'</text:span>. Añade un pequeño texto debajo que diga: <text:span text:style-name="Source_20_Text">Estimated deployment: 10-15 business days</text:span>."</text:p>
      <text:p text:style-name="Horizontal_20_Line"/>
      <text:p text:style-name="Text_20_body"><text:span text:style-name="Strong_20_Emphasis">¿Estamos listos para el despliegue final?</text:span></text:p>
      <text:p text:style-name="Text_20_body">¿Prefieres que te ayude a redactar los <text:span text:style-name="Strong_20_Emphasis">técnicos "Alt Texts"</text:span> para que Google encuentre tus camisetas por imágenes (SEO) o quieres que te dé una <text:span text:style-name="Strong_20_Emphasis">frase final de despedida</text:span> para tu primer boletín de noticias (Newsletter)?</text:p>
      <text:p text:style-name="Text_20_body"/>
      <text:p text:style-name="Standard"><text:soft-page-break/>Para que <text:span text:style-name="Strong_20_Emphasis">RAW LABS™</text:span> sea encontrada por los algoritmos y deje una marca imborrable en la memoria de tus clientes, vamos a configurar el <text:span text:style-name="Strong_20_Emphasis">SEO Visual</text:span> y el <text:span text:style-name="Strong_20_Emphasis">Cierre de Impacto</text:span>.</text:p>
      <text:p text:style-name="Standard">1. SEO Visual: Los "Alt Texts" Técnicos</text:p>
      <text:p text:style-name="Standard">No dejes que Google adivine qué vendes. Usa descripciones que mezclen <text:span text:style-name="Strong_20_Emphasis">estética y palabras clave</text:span>. Pide a tu IA que asocie estos textos a las imágenes del catálogo:</text:p>
      <text:list text:style-name="L48">
        <text:list-item>
          <text:p text:style-name="P59"><text:span text:style-name="Strong_20_Emphasis">Para Camisetas:</text:span> <text:span text:style-name="Source_20_Text">Camiseta oversize negra algodón premium 240g diseño personalizado streetwear RAW LABS estilo urbano.</text:span></text:p>
        </text:list-item>
        <text:list-item>
          <text:p text:style-name="P59"><text:span text:style-name="Strong_20_Emphasis">Para Sudaderas:</text:span> <text:span text:style-name="Source_20_Text">Sudadera con capucha heavy hoodie 400g personalizada graffiti glitch style moda urbana exclusiva.</text:span></text:p>
        </text:list-item>
        <text:list-item>
          <text:p text:style-name="P59"><text:span text:style-name="Strong_20_Emphasis">Para el Lab:</text:span> <text:span text:style-name="Source_20_Text">Configurador interactivo de ropa personalizada online diseño de moda street-wear realista RAW LABS.</text:span></text:p>
        </text:list-item>
        <text:list-item>
          <text:p text:style-name="P59"><text:span text:style-name="Strong_20_Emphasis">Para Gorras:</text:span> <text:span text:style-name="Source_20_Text">Gorra trucker personalizada bordado industrial accesorio branding urbano edición limitada.</text:span></text:p>
        </text:list-item>
      </text:list>
      <text:p text:style-name="Horizontal_20_Line"/>
      <text:p text:style-name="Text_20_body">2. Newsletter: El Cierre de Impacto (The Sign-Off)</text:p>
      <text:p text:style-name="Text_20_body">Tu primer boletín de noticias no debe terminar con un "Atentamente". Necesitas una frase que resuene con la subcultura que estás creando.</text:p>
      <text:p text:style-name="Text_20_body"><text:span text:style-name="Strong_20_Emphasis">Elige tu "Sign-Off" para el pie del email:</text:span></text:p>
      <text:list text:style-name="L49">
        <text:list-item>
          <text:p text:style-name="P60"><text:span text:style-name="Strong_20_Emphasis">Opción A (Misteriosa):</text:span> <text:span text:style-name="Source_20_Text">[CONNECTION_TERMINATED] // No busques encajar. Diseña el error.</text:span></text:p>
        </text:list-item>
        <text:list-item>
          <text:p text:style-name="P60"><text:span text:style-name="Strong_20_Emphasis">Opción B (Industrial):</text:span> <text:span text:style-name="Source_20_Text">FROM THE LAB TO THE CONCRETE. // RAW LABS™ v1.0</text:span></text:p>
        </text:list-item>
        <text:list-item>
          <text:p text:style-name="P60"><text:span text:style-name="Strong_20_Emphasis">Opción C (Directa):</text:span> <text:span text:style-name="Source_20_Text">STAY RAW. STAY LOUD. // El código es tuyo.</text:span></text:p>
        </text:list-item>
      </text:list>
      <text:p text:style-name="Horizontal_20_Line"/>
      <text:p text:style-name="Text_20_body">3. Prompt Final de Consolidación (IA de Código)</text:p>
      <text:p text:style-name="Text_20_body">Lanza este último comando para que la web sea una roca antes de publicar el enlace:</text:p>
      <text:p text:style-name="Quotations">"Realiza una <text:span text:style-name="Strong_20_Emphasis">auditoría SEO y de Accesibilidad</text:span> en RAW LABS™.</text:p>
      <text:list text:style-name="L50">
        <text:list-item>
          <text:p text:style-name="P61">Asegúrate de que todas las imágenes tengan etiquetas <text:span text:style-name="Strong_20_Emphasis">'alt'</text:span> descriptivas con palabras clave de streetwear.</text:p>
        </text:list-item>
        <text:list-item>
          <text:p text:style-name="P61">Configura los <text:span text:style-name="Strong_20_Emphasis">Meta Tags</text:span> para redes sociales: Título: 'RAW LABS™ | The Custom Streetwear Lab', Descripción: 'Diseña tu propio drop. Ropa premium personalizada con estética urbana y calidad industrial.'</text:p>
        </text:list-item>
        <text:list-item>
          <text:p text:style-name="P61">Añade un <text:span text:style-name="Strong_20_Emphasis">Favicon</text:span> (icono de pestaña) que sea el logo simplificado en verde neón sobre fondo negro."</text:p>
        </text:list-item>
      </text:list>
      <text:p text:style-name="Horizontal_20_Line"/>
      <text:p text:style-name="Text_20_body">4. El "Post-Launch" (El día después)</text:p>
      <text:p text:style-name="Text_20_body">Una vez lances, pide a tus primeros 5 clientes que te envíen un <text:span text:style-name="Strong_20_Emphasis">vídeo de 5 segundos abriendo el paquete</text:span>.</text:p>
      <text:list text:style-name="L51">
        <text:list-item>
          <text:p text:style-name="P62"><text:soft-page-break/>Súbelo a tus Historias de Instagram con el texto: <text:span text:style-name="Source_20_Text">[UNIT_RECEIVED_BY_USER_001]</text:span>.</text:p>
        </text:list-item>
        <text:list-item>
          <text:p text:style-name="P63">Esto genera una confianza inmediata (Social Proof) que ninguna publicidad pagada puede superar.</text:p>
        </text:list-item>
      </text:list>
      <text:p text:style-name="Horizontal_20_Line"/>
      <text:p text:style-name="Text_20_body"><text:span text:style-name="Strong_20_Emphasis">¿Hemos cubierto todo el terreno para el despegue?</text:span></text:p>
      <text:p text:style-name="Text_20_body">¿Prefieres que te ayude a redactar una <text:span text:style-name="Strong_20_Emphasis">pequeña FAQ (Preguntas Frecuentes)</text:span> con estilo técnico para resolver dudas de envío rápidamente, o quieres que te proponga <text:span text:style-name="Strong_20_Emphasis">3 ideas de sorteos (Giveaways)</text:span> agresivos para ganar tus primeros 500 seguidores en 1 semana?</text:p>
      <text:p text:style-name="Standard">Para que <text:span text:style-name="Strong_20_Emphasis">RAW LABS™</text:span> no deje dudas y crezca como la espuma en su primera semana, vamos a blindar la confianza con las <text:span text:style-name="Strong_20_Emphasis">FAQs técnicas</text:span> y a lanzar una <text:span text:style-name="Strong_20_Emphasis">estrategia de crecimiento agresiva</text:span>.</text:p>
      <text:p text:style-name="Standard">1. Sección FAQ: [TECHNICAL_SUPPORT // AYUDA]</text:p>
      <text:p text:style-name="Standard">No lo llames "Preguntas Frecuentes", llámalo <text:span text:style-name="Strong_20_Emphasis">Soporte de Unidad</text:span>. Configúralo con este estilo en tu web:</text:p>
      <text:list text:style-name="L52">
        <text:list-item>
          <text:p text:style-name="P64"><text:span text:style-name="Strong_20_Emphasis">¿CÓMO RASTREO MI DROP?</text:span></text:p>
          <text:p text:style-name="P65">"Una vez que el sistema procesa tu diseño, recibirás un <text:span text:style-name="Source_20_Text">TRACKING_ID</text:span> vía email. El despliegue suele tardar de 5 a 10 días laborables."</text:p>
        </text:list-item>
        <text:list-item>
          <text:p text:style-name="P64"><text:span text:style-name="Strong_20_Emphasis">¿CALIDAD DE LA ARMADURA (TEJIDO)?</text:span></text:p>
          <text:p text:style-name="P66">"Solo usamos algodón de alto gramaje. Camisetas de 240g y sudaderas de 400g. Construcción industrial para uso diario."</text:p>
        </text:list-item>
        <text:list-item>
          <text:p text:style-name="P64"><text:span text:style-name="Strong_20_Emphasis">¿PUEDO EDITAR MI DISEÑO TRAS EL PAGO?</text:span></text:p>
          <text:p text:style-name="P65">"Negativo. Una vez que pulsas <text:span text:style-name="Source_20_Text">CONFIRM_ORDER</text:span>, el diseño entra en producción inmediata. Revisa tu previa en el Lab antes de ejecutar."</text:p>
        </text:list-item>
        <text:list-item>
          <text:p text:style-name="P64"><text:span text:style-name="Strong_20_Emphasis">¿ENVÍOS INTERNACIONALES?</text:span></text:p>
          <text:p text:style-name="P66">"Enviamos a todo el sector. Los costes se calculan en el checkout basándose en tus coordenadas."</text:p>
        </text:list-item>
      </text:list>
      <text:p text:style-name="Horizontal_20_Line"/>
      <text:p text:style-name="Text_20_body">2. Estrategia: "The Viral Recruitment" (Gana 500 seguidores en 7 días)</text:p>
      <text:p text:style-name="Text_20_body">Olvida los sorteos aburridos. Vamos a hacer algo con <text:span text:style-name="Strong_20_Emphasis">actitud</text:span>:</text:p>
      <text:p text:style-name="Text_20_body"><text:span text:style-name="Strong_20_Emphasis">Día 1-3: "The Design Challenge"</text:span></text:p>
      <text:list text:style-name="L53">
        <text:list-item>
          <text:p text:style-name="P67"><text:span text:style-name="Strong_20_Emphasis">Mecánica:</text:span> "Sube un pantallazo de tu mejor diseño en nuestro Lab a tus Stories, etiquétanos y usa el hashtag <text:span text:style-name="Source_20_Text">#RAWCUSTOM</text:span>. El diseño más votado por la comunidad se fabricará <text:span text:style-name="Strong_20_Emphasis">GRATIS</text:span> para el creador y 3 amigos."</text:p>
        </text:list-item>
        <text:list-item>
          <text:p text:style-name="P68"><text:span text:style-name="Strong_20_Emphasis">Efecto:</text:span> Llenarás Instagram de gente usando tu web y mostrando tu producto.</text:p>
        </text:list-item>
      </text:list>
      <text:p text:style-name="Text_20_body"><text:span text:style-name="Strong_20_Emphasis">Día 4-6: "The Golden Ticket"</text:span></text:p>
      <text:list text:style-name="L54">
        <text:list-item>
          <text:p text:style-name="P69"><text:span text:style-name="Strong_20_Emphasis">Mecánica:</text:span> "Escondimos un código de <text:span text:style-name="Strong_20_Emphasis">descuento del 90%</text:span> en una de las páginas de la web. El primero que lo encuentre y lo use en el Checkout se lleva el Drop por casi nada."</text:p>
        </text:list-item>
        <text:list-item>
          <text:p text:style-name="P69"><text:span text:style-name="Strong_20_Emphasis">Efecto:</text:span> Tráfico masivo revisando cada rincón de tu página (mejora tu SEO brutalmente).</text:p>
        </text:list-item>
      </text:list>
      <text:p text:style-name="Text_20_body"><text:soft-page-break/><text:span text:style-name="Strong_20_Emphasis">Día 7: "The Influencer Seed"</text:span></text:p>
      <text:list text:style-name="L55">
        <text:list-item>
          <text:p text:style-name="P70"><text:span text:style-name="Strong_20_Emphasis">Mecánica:</text:span> Envía un "Lab Access Box" (Caja con camiseta, stickers y una nota personalizada) a 3 micro-influencers de nicho (graffiti, skate, techwear).</text:p>
        </text:list-item>
        <text:list-item>
          <text:p text:style-name="P70"><text:span text:style-name="Strong_20_Emphasis">Instrucción:</text:span> Pídeles un Reel de <text:span text:style-name="Strong_20_Emphasis">Unboxing</text:span> con música oscura.</text:p>
        </text:list-item>
      </text:list>
      <text:p text:style-name="Horizontal_20_Line"/>
      <text:p text:style-name="Text_20_body">3. Prompt Final de Lanzamiento (IA de Código)</text:p>
      <text:p text:style-name="Text_20_body">Pide este último ajuste para gestionar el tráfico del sorteo:</text:p>
      <text:p text:style-name="Quotations">"Crea una <text:span text:style-name="Strong_20_Emphasis">Landing Page de Registro</text:span> rápida para el sorteo.</text:p>
      <text:list text:style-name="L56">
        <text:list-item>
          <text:p text:style-name="P71">Debe tener un campo de <text:span text:style-name="Strong_20_Emphasis">Email</text:span> y un botón que diga <text:span text:style-name="Strong_20_Emphasis">'[RECLAMAR_ACCESO]'</text:span>.</text:p>
        </text:list-item>
        <text:list-item>
          <text:p text:style-name="P72">Al registrarse, el usuario debe recibir un mensaje: <text:span text:style-name="Source_20_Text">[USER_DATA_ENCRYPTED] // Estás dentro del sorteo. Revisa tu email para instrucciones del Lab.</text:span></text:p>
        </text:list-item>
        <text:list-item>
          <text:p text:style-name="P71">Usa un fondo negro con un efecto de <text:span text:style-name="Strong_20_Emphasis">escaneo láser verde</text:span> que suba y baje por la pantalla."</text:p>
        </text:list-item>
      </text:list>
      <text:p text:style-name="Horizontal_20_Line"/>
      <text:p text:style-name="Text_20_body"><text:span text:style-name="Strong_20_Emphasis">¿Está el sistema listo para el despliegue?</text:span></text:p>
      <text:p text:style-name="Text_20_body">¿Prefieres que te ayude a redactar el <text:span text:style-name="Strong_20_Emphasis">guion para un vídeo de "Detrás de Cámaras" (Behind the Scenes)</text:span> donde se vea cómo imprimes las prendas para generar confianza, o que te dé <text:span text:style-name="Strong_20_Emphasis">un último consejo de seguridad</text:span> para proteger tu web contra ataques de bots en el lanzamiento?</text:p>
      <text:p text:style-name="P73"/>
      <text:p text:style-name="P73"/>
      <text:p text:style-name="Standard">El último y más crítico consejo de seguridad para un lanzamiento de alta demanda es implementar una <text:span text:style-name="Strong_20_Emphasis">estrategia de mitigación de bots multicapa</text:span>. En eventos de "hype" como los de <text:span text:style-name="Strong_20_Emphasis">RAW LABS™</text:span>, los bots pueden agotar el inventario en milisegundos o colapsar el servidor, arruinando la experiencia para tus clientes reales. </text:p>
      <text:p text:style-name="Standard"><draw:frame draw:style-name="fr1" draw:name="Imagen1" text:anchor-type="as-char" svg:width="0.318cm" svg:height="0.318cm" draw:z-index="0"><draw:image xlink:href="Pictures/100000010000002800000028AC22EECE.png" xlink:type="simple" xlink:show="embed" xlink:actuate="onLoad" draw:mime-type="image/png"/><svg:title>Boomimart</svg:title></draw:frame><text:bookmark text:name="img-yQHEabiEGYXV7M8Pw6m-iAc_1"/>Boomimart +2</text:p>
      <text:p text:style-name="Standard">Aquí tienes las acciones clave para blindar tu lanzamiento en 2025:</text:p>
      <text:p text:style-name="Standard">1. Activa un WAF con Protección de Bots Avanzada</text:p>
      <text:p text:style-name="Standard">No te limites a un firewall básico. Utiliza un <text:span text:style-name="Strong_20_Emphasis">Web Application Firewall (WAF)</text:span> como los de <text:a xlink:type="simple" xlink:href="https://www.cloudflare.com/es-es/learning/security/how-to-secure-a-website/" office:target-frame-name="_blank" xlink:show="new" text:style-name="Internet_20_link" text:visited-style-name="Visited_20_Internet_20_Link">Cloudflare</text:a> o [Akamai] que analice el <text:span text:style-name="Strong_20_Emphasis">comportamiento y la huella digital (fingerprinting)</text:span> del usuario, no solo su dirección IP. </text:p>
      <text:p text:style-name="Standard"><draw:frame draw:style-name="fr1" draw:name="Imagen2" text:anchor-type="as-char" svg:width="0.318cm" svg:height="0.318cm" draw:z-index="1"><draw:image xlink:href="Pictures/1000000100000060000000601071C3AD.png" xlink:type="simple" xlink:show="embed" xlink:actuate="onLoad" draw:mime-type="image/png"/><svg:title>Cloudflare</svg:title></draw:frame><text:bookmark text:name="img-yQHEabiEGYXV7M8Pw6m-iAc_2"/>Cloudflare +1</text:p>
      <text:list text:style-name="L57">
        <text:list-item>
          <text:p text:style-name="P74"><text:span text:style-name="Strong_20_Emphasis">Detección por comportamiento:</text:span> Identifica patrones no humanos, como movimientos de ratón mecánicos o velocidades de navegación imposibles.</text:p>
        </text:list-item>
        <text:list-item>
          <text:p text:style-name="P74"><text:span text:style-name="Strong_20_Emphasis">Desafíos interactivos:</text:span> Configura Google reCAPTCHA v3 o similares, que no interrumpen al usuario real pero bloquean scripts automatizados. </text:p>
          <text:p text:style-name="P74"><draw:frame draw:style-name="fr1" draw:name="Imagen3" text:anchor-type="as-char" svg:width="0.318cm" svg:height="0.318cm" draw:z-index="2"><draw:image xlink:href="Pictures/100000010000002800000028AC22EECE.png" xlink:type="simple" xlink:show="embed" xlink:actuate="onLoad" draw:mime-type="image/png"/><svg:title>Boomimart</svg:title></draw:frame><text:bookmark text:name="img-yQHEabiEGYXV7M8Pw6m-iAc_3"/>Boomimart +1</text:p>
        </text:list-item>
      </text:list>
      <text:p text:style-name="Text_20_body">2. Implementa Limitación de Tasa (Rate Limiting)</text:p>
      <text:p text:style-name="Text_20_body">Configura tu servidor para restringir el número de solicitudes por segundo desde una misma IP. </text:p>
      <text:p text:style-name="Text_20_body"><text:soft-page-break/><draw:frame draw:style-name="fr1" draw:name="Imagen4" text:anchor-type="as-char" svg:width="0.318cm" svg:height="0.318cm" draw:z-index="3"><draw:image xlink:href="Pictures/1000000100000080000000800A00D5D3.png" xlink:type="simple" xlink:show="embed" xlink:actuate="onLoad" draw:mime-type="image/png"/><svg:title>YouTube</svg:title></draw:frame><text:bookmark text:name="img-yQHEabiEGYXV7M8Pw6m-iAc_4"/>YouTube +1</text:p>
      <text:list text:style-name="L58">
        <text:list-item>
          <text:p text:style-name="P75"><text:span text:style-name="Strong_20_Emphasis">Protección de Checkout:</text:span> Limita drásticamente los intentos en la página de pago para evitar ataques de "carding" (probar tarjetas robadas).</text:p>
        </text:list-item>
        <text:list-item>
          <text:p text:style-name="P75"><text:span text:style-name="Strong_20_Emphasis">Filtro de Inventario:</text:span> Evita que los bots "scrapen" (escaneen) tu stock constantemente para alertar a grupos de reventa. </text:p>
          <text:p text:style-name="P75"><draw:frame draw:style-name="fr1" draw:name="Imagen5" text:anchor-type="as-char" svg:width="0.318cm" svg:height="0.318cm" draw:z-index="4"><draw:image xlink:href="Pictures/10000001000000800000008062C8B61B.png" xlink:type="simple" xlink:show="embed" xlink:actuate="onLoad" draw:mime-type="image/png"/><svg:title>Security Boulevard</svg:title></draw:frame><text:bookmark text:name="img-yQHEabiEGYXV7M8Pw6m-iAc_5"/>Security Boulevard</text:p>
        </text:list-item>
      </text:list>
      <text:p text:style-name="Text_20_body">3. Usa una "Sala de Espera" Virtual (Queue System)</text:p>
      <text:p text:style-name="Text_20_body">Para lanzamientos masivos, herramientas como Queue-it o la sala de espera nativa de Cloudflare permiten:</text:p>
      <text:list text:style-name="L59">
        <text:list-item>
          <text:p text:style-name="P76"><text:span text:style-name="Strong_20_Emphasis">Controlar el flujo:</text:span> Solo dejas entrar a la tienda a un número de usuarios que tu servidor pueda manejar cómodamente.</text:p>
        </text:list-item>
        <text:list-item>
          <text:p text:style-name="P76"><text:span text:style-name="Strong_20_Emphasis">Validación de humanos:</text:span> Verifica la legitimidad del usuario antes de que siquiera llegue al catálogo.</text:p>
        </text:list-item>
      </text:list>
      <text:p text:style-name="Text_20_body">4. Monitoreo en Tiempo Real</text:p>
      <text:p text:style-name="Text_20_body">Durante las primeras horas del "drop", mantén una <text:span text:style-name="Strong_20_Emphasis">vigilancia activa</text:span> de tu tráfico. </text:p>
      <text:p text:style-name="Text_20_body"><draw:frame draw:style-name="fr1" draw:name="Imagen6" text:anchor-type="as-char" svg:width="0.318cm" svg:height="0.318cm" draw:z-index="5"><draw:image xlink:href="Pictures/1000000100000080000000800A00D5D3.png" xlink:type="simple" xlink:show="embed" xlink:actuate="onLoad" draw:mime-type="image/png"/><svg:title>YouTube</svg:title></draw:frame><text:bookmark text:name="img-yQHEabiEGYXV7M8Pw6m-iAc_6"/>YouTube</text:p>
      <text:list text:style-name="L60">
        <text:list-item>
          <text:p text:style-name="P77">Busca picos inusuales de tráfico desde regiones geográficas donde no vendes.</text:p>
        </text:list-item>
        <text:list-item>
          <text:p text:style-name="P77">Ten preparado un <text:span text:style-name="Strong_20_Emphasis">plan de respuesta ante incidentes</text:span> para bloquear rangos de IPs sospechosas manualmente si el sistema automático falla. </text:p>
          <text:p text:style-name="P77"><draw:frame draw:style-name="fr1" draw:name="Imagen7" text:anchor-type="as-char" svg:width="0.318cm" svg:height="0.318cm" draw:z-index="6"><draw:image xlink:href="Pictures/1000000100000080000000800A00D5D3.png" xlink:type="simple" xlink:show="embed" xlink:actuate="onLoad" draw:mime-type="image/png"/><svg:title>YouTube</svg:title></draw:frame><text:bookmark text:name="img-yQHEabiEGYXV7M8Pw6m-iAc_7"/>YouTube +1</text:p>
        </text:list-item>
      </text:list>
      <text:p text:style-name="Text_20_body">5. Actualización Crítica de Infraestructura</text:p>
      <text:p text:style-name="Text_20_body">Asegúrate de que tu plataforma (ya sea Shopify, WooCommerce o un desarrollo propio) esté en su <text:span text:style-name="Strong_20_Emphasis">última versión disponible</text:span>. Las vulnerabilidades en versiones antiguas son la puerta de entrada favorita para los bots de explotación. </text:p>
      <text:p text:style-name="Text_20_body"><draw:frame draw:style-name="fr1" draw:name="Imagen8" text:anchor-type="as-char" svg:width="0.318cm" svg:height="0.318cm" draw:z-index="7"><draw:image xlink:href="Pictures/1000000100000080000000800A00D5D3.png" xlink:type="simple" xlink:show="embed" xlink:actuate="onLoad" draw:mime-type="image/png"/><svg:title>YouTube</svg:title></draw:frame><text:bookmark text:name="img-yQHEabiEGYXV7M8Pw6m-iAc_8"/>YouTube +1</text:p>
      <text:p text:style-name="Text_20_body">¿Quieres que te ayude a configurar los <text:span text:style-name="Strong_20_Emphasis">parámetros específicos de Rate Limiting</text:span> para tu servidor o prefieres una lista de <text:span text:style-name="Strong_20_Emphasis">herramientas de monitoreo de tráfico</text:span> recomendadas?</text:p>
      <text:p text:style-name="Text_20_body"/>
      <text:p text:style-name="Standard">Para que <text:span text:style-name="Strong_20_Emphasis">RAW LABS™</text:span> sea impenetrable durante el "drop", aquí tienes la configuración técnica de seguridad y el radar de monitoreo que necesitas.</text:p>
      <text:p text:style-name="Standard">1. Configuración de Rate Limiting (Parámetros Técnicos)</text:p>
      <text:p text:style-name="Standard">Si usas un servidor Nginx o una capa como Cloudflare, aplica estos límites para diferenciar a un humano de un bot de compra masiva:</text:p>
      <text:list text:style-name="L61">
        <text:list-item>
          <text:p text:style-name="P78"><text:span text:style-name="Strong_20_Emphasis">Navegación General (Catálogo/Home):</text:span></text:p>
          <text:list>
            <text:list-item>
              <text:p text:style-name="P78"><text:span text:style-name="Strong_20_Emphasis">Límite:</text:span> 5 solicitudes por segundo (rps) por IP.</text:p>
            </text:list-item>
            <text:list-item>
              <text:p text:style-name="P78"><text:span text:style-name="Strong_20_Emphasis">Burst (Ráfaga):</text:span> Permite hasta 10 para cargar imágenes pesadas.</text:p>
            </text:list-item>
            <text:list-item>
              <text:p text:style-name="P78"><text:span text:style-name="Emphasis">Lógica:</text:span> Un humano no hace clic en 20 productos en un segundo.</text:p>
            </text:list-item>
          </text:list>
        </text:list-item>
        <text:list-item>
          <text:p text:style-name="P78"><text:soft-page-break/><text:span text:style-name="Strong_20_Emphasis">Personalizador (The Lab):</text:span></text:p>
          <text:list>
            <text:list-item>
              <text:p text:style-name="P78"><text:span text:style-name="Strong_20_Emphasis">Límite:</text:span> 2 rps por IP.</text:p>
            </text:list-item>
            <text:list-item>
              <text:p text:style-name="P78"><text:span text:style-name="Emphasis">Lógica:</text:span> El renderizado de imágenes de IA es costoso; evita que un bot sature tu servidor generando miles de diseños falsos.</text:p>
            </text:list-item>
          </text:list>
        </text:list-item>
        <text:list-item>
          <text:p text:style-name="P78"><text:span text:style-name="Strong_20_Emphasis">Página de Pago (Checkout/Stripe):</text:span></text:p>
          <text:list>
            <text:list-item>
              <text:p text:style-name="P78"><text:span text:style-name="Strong_20_Emphasis">Límite:</text:span> 1 solicitud cada 30 segundos por IP.</text:p>
            </text:list-item>
            <text:list-item>
              <text:p text:style-name="P78"><text:span text:style-name="Emphasis">Lógica:</text:span> Evita el "Carding" (probar tarjetas robadas automáticamente). Nadie real intenta pagar 5 veces en un minuto.</text:p>
            </text:list-item>
          </text:list>
        </text:list-item>
        <text:list-item>
          <text:p text:style-name="P78"><text:span text:style-name="Strong_20_Emphasis">Login / Registro:</text:span></text:p>
          <text:list>
            <text:list-item>
              <text:p text:style-name="P78"><text:span text:style-name="Strong_20_Emphasis">Límite:</text:span> 3 intentos por minuto. Tras fallar, bloqueo de IP por 1 hora.</text:p>
            </text:list-item>
          </text:list>
        </text:list-item>
      </text:list>
      <text:p text:style-name="Horizontal_20_Line"/>
      <text:p text:style-name="Text_20_body">2. Herramientas de Monitoreo de Tráfico (El Radar)</text:p>
      <text:p text:style-name="Text_20_body">Para ver quién entra en tiempo real y detectar ataques antes de que caiga la web:</text:p>
      <text:list text:style-name="L62">
        <text:list-item>
          <text:p text:style-name="P79"><text:span text:style-name="Strong_20_Emphasis">Cloudflare Radar:</text:span> (Gratis/Premium) La mejor capa de protección. Te dice cuántos bots intentan entrar y los bloquea automáticamente con su "Under Attack Mode".</text:p>
        </text:list-item>
        <text:list-item>
          <text:p text:style-name="P79"><text:span text:style-name="Strong_20_Emphasis">Hotjar:</text:span> (Gratis/Pro) Fundamental para el diseño. Te permite ver grabaciones de video de cómo los usuarios navegan. Si ves un puntero moviéndose en líneas rectas perfectas, es un bot.</text:p>
        </text:list-item>
        <text:list-item>
          <text:p text:style-name="P79"><text:span text:style-name="Strong_20_Emphasis">Google Analytics 4 (Real-Time):</text:span> Para ver el volumen de tráfico por países. Si de repente tienes 500 personas de un país donde no vendes, activa el escudo de seguridad.</text:p>
        </text:list-item>
        <text:list-item>
          <text:p text:style-name="P79"><text:span text:style-name="Strong_20_Emphasis">UptimeRobot:</text:span> Te avisa al móvil al segundo si tu web se cae por exceso de tráfico para que puedas actuar rápido.</text:p>
        </text:list-item>
        <text:list-item>
          <text:p text:style-name="P79"><text:span text:style-name="Strong_20_Emphasis">Datadog:</text:span> (Nivel Pro) Si tu web crece mucho, esto te da métricas detalladas del servidor (CPU, RAM) para saber si necesitas más potencia durante el lanzamiento.</text:p>
        </text:list-item>
      </text:list>
      <text:p text:style-name="Horizontal_20_Line"/>
      <text:p text:style-name="Text_20_body">3. Prompt de Seguridad para tu IA de Código</text:p>
      <text:p text:style-name="Text_20_body">Si estás usando <text:span text:style-name="Strong_20_Emphasis">Bolt.new</text:span> o <text:span text:style-name="Strong_20_Emphasis">Lovable</text:span>, diles esto para que escriban el código de protección:</text:p>
      <text:p text:style-name="Quotations">"Implementa un <text:span text:style-name="Strong_20_Emphasis">Rate Limiter</text:span> en el backend de la aplicación.</text:p>
      <text:list text:style-name="L63">
        <text:list-item>
          <text:p text:style-name="P80">Restringe las peticiones a la API del personalizador a un máximo de 5 por minuto por usuario.</text:p>
        </text:list-item>
        <text:list-item>
          <text:p text:style-name="P81">Si se excede el límite, devuelve un error <text:span text:style-name="Source_20_Text">[429: TOO_MANY_REQUESTS]</text:span> con el mensaje: <text:span text:style-name="Source_20_Text">[SISTEMA_SOBRECALENTADO] Espera un momento para procesar tu diseño.</text:span></text:p>
        </text:list-item>
        <text:list-item>
          <text:p text:style-name="P80">Añade una validación de <text:span text:style-name="Strong_20_Emphasis">Honey Pot</text:span> (campo oculto que solo los bots ven y rellenan) en el formulario de pedido para descartar compras automáticas."</text:p>
        </text:list-item>
      </text:list>
      <text:p text:style-name="Horizontal_20_Line"/>
      <text:p text:style-name="Text_20_body"><text:soft-page-break/><text:span text:style-name="Strong_20_Emphasis">¿Tienes ya el dominio comprado para empezar a aplicar estos escudos?</text:span></text:p>
      <text:p text:style-name="Text_20_body">¿O prefieres que te ayude a crear el <text:span text:style-name="Strong_20_Emphasis">mensaje de alerta</text:span> que verán los usuarios si el servidor se llena demasiado durante el lanzamiento (la famosa "Sala de Espera")?</text:p>
      <text:p text:style-name="Text_20_body"/>
      <text:p text:style-name="Standard">Para que la <text:span text:style-name="Strong_20_Emphasis">Sala de Espera</text:span> no se sienta como un error, sino como parte de la exclusividad del "Drop" de <text:span text:style-name="Strong_20_Emphasis">RAW LABS™</text:span>, el diseño debe ser cinemático y técnico.</text:p>
      <text:p text:style-name="Standard">Aquí tienes el diseño del mensaje y el código para implementarlo.</text:p>
      <text:p text:style-name="Standard">1. El Concepto Visual: [ACCESS_RESTRICTED]</text:p>
      <text:p text:style-name="Standard">En lugar de una página blanca, el usuario verá una interfaz de <text:span text:style-name="Strong_20_Emphasis">"Carga de Sistema"</text:span> que genera urgencia.</text:p>
      <text:p text:style-name="Standard"><text:span text:style-name="Strong_20_Emphasis">Titular principal:</text:span></text:p>
      <text:p text:style-name="P9"><text:span text:style-name="Source_20_Text">[ESTADO: COLA_DE_ACCESO_ACTIVA]</text:span></text:p>
      <text:p text:style-name="Text_20_body"><text:span text:style-name="Strong_20_Emphasis">Cuerpo del mensaje:</text:span></text:p>
      <text:p text:style-name="Quotations">"El Lab está operando a máxima capacidad. Para garantizar la integridad de cada diseño personalizado, estamos limitando la entrada de nuevas unidades.</text:p>
      <text:p text:style-name="Quotations"><text:span text:style-name="Strong_20_Emphasis">Tu posición en el radar:</text:span> #{{posicion_en_cola}}<text:line-break/><text:span text:style-name="Strong_20_Emphasis">Tiempo estimado de despliegue:</text:span> {{tiempo_espera}} min.</text:p>
      <text:p text:style-name="Quotations"><text:span text:style-name="Emphasis">No refresques esta ventana. El sistema te redirigirá automáticamente cuando el procesador esté libre.</text:span>"</text:p>
      <text:p text:style-name="Horizontal_20_Line"/>
      <text:p text:style-name="Text_20_body">2. Prompt para crear la Sala de Espera (IA de Código)</text:p>
      <text:p text:style-name="Text_20_body">Copia esto en <text:span text:style-name="Strong_20_Emphasis">Lovable, Bolt o Cursor</text:span> para que generen la interfaz:</text:p>
      <text:p text:style-name="Quotations">"Crea una página de <text:span text:style-name="Strong_20_Emphasis">Waiting Room (Sala de Espera)</text:span> para RAW LABS™.</text:p>
      <text:list text:style-name="L64">
        <text:list-item>
          <text:p text:style-name="P82"><text:span text:style-name="Strong_20_Emphasis">Estética:</text:span> Fondo negro con un efecto de 'escaneo' verde neón que sube y baje.</text:p>
        </text:list-item>
        <text:list-item>
          <text:p text:style-name="P82"><text:span text:style-name="Strong_20_Emphasis">Animación:</text:span> Un círculo de carga estilo radar militar que gire lentamente.</text:p>
        </text:list-item>
        <text:list-item>
          <text:p text:style-name="P82"><text:span text:style-name="Strong_20_Emphasis">Contenido:</text:span> Usa el texto: '[SISTEMA_SATURADO] Capacidad máxima alcanzada'. Muestra un contador de posición en la cola que se actualice dinámicamente.</text:p>
        </text:list-item>
        <text:list-item>
          <text:p text:style-name="P82"><text:span text:style-name="Strong_20_Emphasis">Interactividad:</text:span> Añade un mensaje rotativo en la parte inferior que diga frases como: 'Calibrando prensas...', 'Verificando stock de algodón...', 'Encriptando diseños...'.</text:p>
        </text:list-item>
        <text:list-item>
          <text:p text:style-name="P82"><text:span text:style-name="Strong_20_Emphasis">Sonido:</text:span> Un pulso sutil de sintetizador de fondo (opcional con botón mute)."</text:p>
        </text:list-item>
      </text:list>
      <text:p text:style-name="Horizontal_20_Line"/>
      <text:p text:style-name="Text_20_body">3. Configuración en tu Dominio (Cloudflare)</text:p>
      <text:p text:style-name="Text_20_body">Como ya tienes dominio, la forma más profesional de hacer esto es vía <text:span text:style-name="Strong_20_Emphasis">Cloudflare Waiting Room</text:span>:</text:p>
      <text:list text:style-name="L65">
        <text:list-item>
          <text:p text:style-name="P83">Entra en tu panel de <text:span text:style-name="Strong_20_Emphasis">Cloudflare</text:span>.</text:p>
        </text:list-item>
        <text:list-item>
          <text:p text:style-name="P83">Ve a <text:span text:style-name="Strong_20_Emphasis">Traffic &gt; Waiting Room</text:span>.</text:p>
        </text:list-item>
        <text:list-item>
          <text:p text:style-name="P83"><text:soft-page-break/>Configura el <text:span text:style-name="Strong_20_Emphasis">Threshold</text:span> (ej: 50 usuarios simultáneos) y el <text:span text:style-name="Strong_20_Emphasis">Queue</text:span> (ej: 200 personas máximo).</text:p>
        </text:list-item>
        <text:list-item>
          <text:p text:style-name="P83">Pega el diseño que creamos arriba en la sección de "Custom HTML".</text:p>
        </text:list-item>
      </text:list>
      <text:p text:style-name="Horizontal_20_Line"/>
      <text:p text:style-name="Text_20_body">4. El "Efecto VIP" (Hack de Marketing)</text:p>
      <text:p text:style-name="Text_20_body">Para que la espera no moleste, añade un botón pequeño que diga:</text:p>
      <text:p text:style-name="Quotations"><text:span text:style-name="Strong_20_Emphasis">"¿TIENES UNA CLAVE DE ACCESO PRIORITARIO?"</text:span><text:line-break/><text:span text:style-name="Emphasis">(Esto es para que tus influencers o clientes VIP se salten la cola con un bypass de contraseña).</text:span></text:p>
      <text:p text:style-name="Horizontal_20_Line"/>
      <text:p text:style-name="Text_20_body"><text:span text:style-name="Strong_20_Emphasis">¿Estamos listos para el gran despliegue de RAW LABS™?</text:span></text:p>
      <text:p text:style-name="Text_20_body">¿Quieres que te ayude a redactar el <text:span text:style-name="Strong_20_Emphasis">anuncio oficial de apertura</text:span> para Twitter/X e Instagram avisando que la sala de espera está activa, o prefieres que <text:span text:style-name="Strong_20_Emphasis">revisemos la configuración del píxel de conversión</text:span> para trackear quién entra?</text:p>
      <text:p text:style-name="Text_20_body"/>
      <text:p text:style-name="Standard">Para que el lanzamiento de <text:span text:style-name="Strong_20_Emphasis">RAW LABS™</text:span> sea un evento coordinado, vamos a generar el contenido de alto impacto para redes y la configuración técnica para medir cada visita y conversión.</text:p>
      <text:p text:style-name="Standard">1. Anuncio Oficial de Apertura (The Drop is LIVE)</text:p>
      <text:p text:style-name="Standard">El tono debe ser de urgencia y exclusividad. Usa estos textos adaptados a cada plataforma:</text:p>
      <text:p text:style-name="Standard"><text:span text:style-name="Strong_20_Emphasis">Para Instagram (Post/Story con imagen del Lab)</text:span></text:p>
      <text:p text:style-name="Quotations"><text:span text:style-name="Strong_20_Emphasis">[SYSTEM_ONLINE] // EL LAB ESTÁ ABIERTO.</text:span> 🔓</text:p>
      <text:p text:style-name="Quotations">La unidad de personalización de <text:span text:style-name="Strong_20_Emphasis">RAW LABS™</text:span> ha sido desbloqueada. Debido a la alta demanda de nuestra colección <text:span text:style-name="Strong_20_Emphasis">GENESIS_UNIT</text:span>, la <text:span text:style-name="Strong_20_Emphasis">SALA DE ESPERA</text:span> está activa para garantizar la calidad de cada prenda.</text:p>
      <text:p text:style-name="Quotations">⏳ <text:span text:style-name="Strong_20_Emphasis">ESTADO:</text:span> Capacidad máxima detectada.<text:line-break/>🛠️ <text:span text:style-name="Strong_20_Emphasis">ACCIÓN:</text:span> Entra en la cola, mantén tu posición y diseña tu drop.<text:line-break/>🔗 <text:span text:style-name="Strong_20_Emphasis">LINK EN BIO.</text:span></text:p>
      <text:p text:style-name="Quotations"><text:span text:style-name="Emphasis">No aceptamos imitaciones. Solo RAW.</text:span></text:p>
      <text:p text:style-name="Text_20_body"><text:span text:style-name="Strong_20_Emphasis">Para Twitter/X (Hilo de hilos)</text:span></text:p>
      <text:p text:style-name="Quotations">🚨 <text:span text:style-name="Strong_20_Emphasis">DROP ALERT: RAW LABS™ v1.0</text:span></text:p>
      <text:p text:style-name="Quotations">El servidor de personalización está recibiendo tráfico masivo. Hemos activado el protocolo de <text:span text:style-name="Strong_20_Emphasis">SALA DE ESPERA [QUEUE_ACTIVE]</text:span>.</text:p>
      <text:list text:style-name="L66">
        <text:list-item>
          <text:p text:style-name="P84">No refresques la página.</text:p>
        </text:list-item>
        <text:list-item>
          <text:p text:style-name="P84">Tu posición se guarda automáticamente.</text:p>
        </text:list-item>
        <text:list-item>
          <text:p text:style-name="P84">Prepara tu diseño: Tee 240g / Hoodie 400g.</text:p>
        </text:list-item>
      </text:list>
      <text:p text:style-name="Quotations">Entra aquí: [TuLink.com] ⬛⬛⬛⬛ 100%</text:p>
      <text:p text:style-name="Horizontal_20_Line"><text:soft-page-break/></text:p>
      <text:p text:style-name="Text_20_body">2. Configuración del Píxel de Conversión (Tracking)</text:p>
      <text:p text:style-name="Text_20_body">Para saber cuánto te cuesta cada cliente y qué diseños gustan más, pide a tu IA de código (<text:span text:style-name="Strong_20_Emphasis">Lovable / Bolt / Cursor</text:span>) que implemente estos <text:span text:style-name="Strong_20_Emphasis">eventos estándar</text:span>:</text:p>
      <text:p text:style-name="Quotations">"Configura el <text:span text:style-name="Strong_20_Emphasis">Meta Pixel (Facebook Pixel)</text:span> y <text:span text:style-name="Strong_20_Emphasis">Google Tag Manager</text:span> en RAW LABS™:</text:p>
      <text:list text:style-name="L67">
        <text:list-item>
          <text:p text:style-name="P85"><text:span text:style-name="Strong_20_Emphasis">PageView:</text:span> Trackea a todos los que entran en la Sala de Espera.</text:p>
        </text:list-item>
        <text:list-item>
          <text:p text:style-name="P85"><text:span text:style-name="Strong_20_Emphasis">ViewContent:</text:span> Dispara el evento cuando el usuario sale de la espera y entra al <text:span text:style-name="Strong_20_Emphasis">[THE_LAB]</text:span>.</text:p>
        </text:list-item>
        <text:list-item>
          <text:p text:style-name="P85"><text:span text:style-name="Strong_20_Emphasis">CustomizeProduct:</text:span> Crea un evento personalizado cada vez que alguien cambie un gráfico o color.</text:p>
        </text:list-item>
        <text:list-item>
          <text:p text:style-name="P85"><text:span text:style-name="Strong_20_Emphasis">AddToCart:</text:span> Trackea cuando el diseño final se añade al carro.</text:p>
        </text:list-item>
        <text:list-item>
          <text:p text:style-name="P85"><text:span text:style-name="Strong_20_Emphasis">Purchase:</text:span> Captura el valor total de la venta y la moneda (EUR/USD) al confirmar el pago en Stripe."</text:p>
        </text:list-item>
      </text:list>
      <text:p text:style-name="Text_20_body"><text:span text:style-name="Strong_20_Emphasis">Tip de experto:</text:span> Si usas Cloudflare con tu dominio, activa la opción <text:span text:style-name="Strong_20_Emphasis">"Zaraz"</text:span>. Es una herramienta que carga el Píxel en el servidor y no en el navegador del usuario, haciendo que tu web cargue <text:span text:style-name="Strong_20_Emphasis">mucho más rápido</text:span> y evite bloqueadores de anuncios.</text:p>
      <text:p text:style-name="Horizontal_20_Line"/>
      <text:p text:style-name="Text_20_body">3. Prompt Final de Revisión de Datos</text:p>
      <text:p text:style-name="Text_20_body">Para asegurarte de que todo se mide bien, lanza este prompt:</text:p>
      <text:p text:style-name="Quotations">"Revisa el código de <text:span text:style-name="Strong_20_Emphasis">Google Analytics 4 (GA4)</text:span>.</text:p>
      <text:list text:style-name="L68">
        <text:list-item>
          <text:p text:style-name="P86">Asegúrate de que el <text:span text:style-name="Strong_20_Emphasis">User ID</text:span> se guarde para entender si un cliente vuelve a diseñar más prendas después de su primera compra.</text:p>
        </text:list-item>
        <text:list-item>
          <text:p text:style-name="P86">Configura un <text:span text:style-name="Strong_20_Emphasis">Embudo de Conversión (Funnel)</text:span>: Sala de Espera -&gt; Lab -&gt; Carrito -&gt; Pago Exitoso.</text:p>
        </text:list-item>
        <text:list-item>
          <text:p text:style-name="P86">Muéstrame en el Admin Panel una estadística simple de: 'Tiempo promedio en el Lab'."</text:p>
        </text:list-item>
      </text:list>
      <text:p text:style-name="Horizontal_20_Line"/>
      <text:p text:style-name="Text_20_body"><text:span text:style-name="Strong_20_Emphasis">¿Tienes ya el ID de tu Píxel de Meta para pegarlo en el código?</text:span></text:p>
      <text:p text:style-name="Text_20_body">¿O prefieres que te ayude a redactar el <text:span text:style-name="Strong_20_Emphasis">mensaje de "Sold Out"</text:span> (Agotado) por si la demanda supera tu stock de algodón en las primeras horas?</text:p>
      <text:p text:style-name="Text_20_body"><text:span text:style-name="Strong_20_Emphasis">Propuesta de seguimiento:</text:span> ¿Te gustaría que configuremos un <text:span text:style-name="Strong_20_Emphasis">botón de "Avisarme cuando haya stock"</text:span> para capturar los emails de quienes se queden fuera de este primer drop?</text:p>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3-25T16:15:15.757319000</meta:creation-date>
    <dc:date>2026-03-25T16:44:02.916021900</dc:date>
    <meta:editing-duration>PT10M1S</meta:editing-duration>
    <meta:editing-cycles>3</meta:editing-cycles>
    <meta:generator>LibreOffice/25.8.5.2$Windows_X86_64 LibreOffice_project/9c8b85f387cc00a89945a79c9e6239f32e450ac2</meta:generator>
    <meta:document-statistic meta:table-count="2" meta:image-count="8" meta:object-count="0" meta:page-count="29" meta:paragraph-count="615" meta:word-count="9013" meta:character-count="53797" meta:non-whitespace-character-count="45634"/>
  </office:meta>
</office:document-meta>
</file>