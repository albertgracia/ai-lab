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margin-top="0.318cm" fo:margin-bottom="0.423cm" style:contextual-spacing="false" fo:text-indent="0cm" style:auto-text-indent="false"/>
      <style:text-properties style:text-line-through-style="none" style:text-line-through-type="none" style:font-name="Google Sans" fo:font-size="12pt" style:text-underline-style="none" fo:font-weight="normal" style:text-blinking="false" loext:padding="0cm" loext:border="none"/>
    </style:style>
    <style:style style:name="P2" style:family="paragraph" style:parent-style-name="Standard">
      <style:paragraph-properties fo:margin-left="0cm" fo:margin-right="0cm" fo:margin-top="0.635cm" fo:margin-bottom="0.318cm" style:contextual-spacing="false" fo:text-indent="0cm" style:auto-text-indent="false"/>
      <style:text-properties style:text-line-through-style="none" style:text-line-through-type="none" style:font-name="Google Sans" fo:font-size="15pt" style:text-underline-style="none" fo:font-weight="bold" style:text-blinking="false" loext:padding="0cm" loext:border="none"/>
    </style:style>
    <style:style style:name="P3"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4" style:family="paragraph" style:parent-style-name="Text_20_body">
      <style:paragraph-properties fo:margin-left="0cm" fo:margin-right="0cm" fo:margin-top="0.635cm" fo:margin-bottom="0.318cm" style:contextual-spacing="false" fo:text-indent="0cm" style:auto-text-indent="false"/>
      <style:text-properties style:text-line-through-style="none" style:text-line-through-type="none" style:font-name="Google Sans" fo:font-size="15pt" style:text-underline-style="none" fo:font-weight="bold" style:text-blinking="false" loext:padding="0cm" loext:border="none"/>
    </style:style>
    <style:style style:name="P5"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6" style:family="paragraph" style:parent-style-name="Text_20_body">
      <style:paragraph-properties fo:margin-left="0cm" fo:margin-right="0cm" fo:margin-top="0.318cm" fo:margin-bottom="0.423cm" style:contextual-spacing="false" fo:text-indent="0cm" style:auto-text-indent="false"/>
      <style:text-properties style:text-line-through-style="none" style:text-line-through-type="none" style:font-name="Google Sans" fo:font-size="12pt" style:text-underline-style="none" fo:font-weight="normal" style:text-blinking="false" loext:padding="0cm" loext:border="none"/>
    </style:style>
    <style:style style:name="P7"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8" style:family="paragraph" style:parent-style-name="Standard">
      <style:text-properties officeooo:rsid="001a8ba3" officeooo:paragraph-rsid="001a8ba3"/>
    </style:style>
    <style:style style:name="P9" style:family="paragraph" style:parent-style-name="Standard">
      <style:text-properties officeooo:rsid="001ad2dc" officeooo:paragraph-rsid="001ad2dc"/>
    </style:style>
    <style:style style:name="P10" style:family="paragraph" style:parent-style-name="Standard">
      <style:text-properties officeooo:rsid="0015ea9e" officeooo:paragraph-rsid="0015ea9e"/>
    </style:style>
    <style:style style:name="P11" style:family="paragraph" style:parent-style-name="Standard">
      <style:text-properties officeooo:paragraph-rsid="001ca0d6"/>
    </style:style>
    <style:style style:name="P12" style:family="paragraph" style:parent-style-name="Text_20_body" style:list-style-name="L4"/>
    <style:style style:name="P13" style:family="paragraph" style:parent-style-name="Standard">
      <style:text-properties officeooo:rsid="00176b44" officeooo:paragraph-rsid="00176b44"/>
    </style:style>
    <style:style style:name="P14" style:family="paragraph" style:parent-style-name="Standard">
      <style:text-properties officeooo:rsid="001bdc10" officeooo:paragraph-rsid="001bdc10"/>
    </style:style>
    <style:style style:name="T1" style:family="text">
      <style:text-properties style:text-line-through-style="none" style:text-line-through-type="none" style:font-name="Google Sans" fo:font-size="12pt" style:text-underline-style="solid" style:text-underline-width="auto" style:text-underline-color="font-color" fo:font-weight="bold" style:text-blinking="false" loext:padding="0cm" loext:border="none"/>
    </style:style>
    <style:style style:name="T2" style:family="text">
      <style:text-properties style:text-line-through-style="none" style:text-line-through-type="none" style:font-name="Google Sans" fo:font-size="12pt" style:text-underline-style="none" fo:font-weight="bold" style:text-blinking="false" loext:padding="0cm" loext:border="none"/>
    </style:style>
    <style:style style:name="T3" style:family="text">
      <style:text-properties style:text-line-through-style="none" style:text-line-through-type="none" style:font-name="Google Sans" fo:font-size="12pt" style:text-underline-style="none" fo:font-weight="normal" style:text-blinking="false" loext:padding="0cm" loext:border="none"/>
    </style:style>
    <style:style style:name="T4" style:family="text">
      <style:text-properties officeooo:rsid="00176b44"/>
    </style:style>
    <style:style style:name="T5" style:family="text">
      <style:text-properties officeooo:rsid="001ca0d6"/>
    </style:style>
    <style:style style:name="T6" style:family="text">
      <style:text-properties officeooo:rsid="001d2d65"/>
    </style:style>
    <style:style style:name="T7" style:family="text">
      <style:text-properties fo:font-weight="normal" officeooo:rsid="001ca0d6" style:font-weight-asian="normal" style:font-weight-complex="normal"/>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space-before="1.25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nque Astro es un framework enfocado en el contenido web, su ecosistema permite integrar herramientas potentes para visualizar la infraestructura de red directamente en tus páginas estáticas sin añadir dependencias pesadas al cliente.</text:p>
      <text:p text:style-name="P2">Principales Métodos en Astro</text:p>
      <text:list text:style-name="L1">
        <text:list-item>
          <text:p text:style-name="P3"><text:a xlink:type="simple" xlink:href="https://aaronjbecker.com/posts/adding-d2-diagrams-to-astro/" office:target-frame-name="_blank" xlink:show="new" text:style-name="Internet_20_link" text:visited-style-name="Visited_20_Internet_20_Link"><text:span text:style-name="Strong_20_Emphasis"><text:span text:style-name="T1">Astro-D2</text:span></text:span></text:a><text:span text:style-name="Strong_20_Emphasis"><text:span text:style-name="T2">:</text:span></text:span><text:span text:style-name="T3"> Es una integración activa y bien documentada que permite incluir diagramas de red profesionales utilizando el lenguaje D2. Es ideal para representar tanto topologías lógicas (flujos, IPs) como físicas (dispositivos).</text:span></text:p>
        </text:list-item>
        <text:list-item>
          <text:p text:style-name="P3"><text:span text:style-name="Strong_20_Emphasis"><text:span text:style-name="T2">rehype-mermaid:</text:span></text:span><text:span text:style-name="T3"> Permite renderizar diagramas de Mermaid, incluyendo diagramas de flujo y secuencia, dentro de archivos Markdown o MDX.</text:span></text:p>
        </text:list-item>
        <text:list-item>
          <text:p text:style-name="P3"><text:span text:style-name="Strong_20_Emphasis"><text:span text:style-name="T2">Integración de imágenes estáticas:</text:span></text:span><text:span text:style-name="T3"> Puedes diseñar tus esquemas en herramientas externas (como Lucidchart, Draw.io, o Miro) y exportarlos como SVG o PNG para importarlos en componentes Astro.</text:span></text:p>
        </text:list-item>
      </text:list>
      <text:p text:style-name="P4">Pasos para Añadir Diagramas a Astro (Ejemplo con D2)</text:p>
      <text:list text:style-name="L2">
        <text:list-item>
          <text:p text:style-name="P5"><text:span text:style-name="Strong_20_Emphasis"><text:span text:style-name="T2">Instalar D2:</text:span></text:span><text:span text:style-name="T3"> Instalar la herramienta D2 para desarrollo local.</text:span></text:p>
        </text:list-item>
        <text:list-item>
          <text:p text:style-name="P5"><text:span text:style-name="Strong_20_Emphasis"><text:span text:style-name="T2">Instalar astro-d2:</text:span></text:span><text:span text:style-name="T3"> Añadir la integración al proyecto Astro.</text:span></text:p>
        </text:list-item>
        <text:list-item>
          <text:p text:style-name="P5"><text:span text:style-name="Strong_20_Emphasis"><text:span text:style-name="T2">Crear el esquema:</text:span></text:span><text:span text:style-name="T3"> Usar el DSL (Domain Specific Language) de D2 en archivos Markdown para definir los dispositivos y conexiones.</text:span></text:p>
        </text:list-item>
        <text:list-item>
          <text:p text:style-name="P5"><text:span text:style-name="Strong_20_Emphasis"><text:span text:style-name="T2">Construir el sitio:</text:span></text:span><text:span text:style-name="T3"> Astro generará los diagramas como imágenes optimizadas durante el build.</text:span></text:p>
        </text:list-item>
      </text:list>
      <text:p text:style-name="P4">Alternativas de Diagramación (Externas)</text:p>
      <text:p text:style-name="P6">Si prefieres no generar los diagramas por código, puedes utilizar herramientas externas para luego integrar la imagen:</text:p>
      <text:list text:style-name="L3">
        <text:list-item>
          <text:p text:style-name="P7"><text:a xlink:type="simple" xlink:href="https://www.lucidchart.com/pages/es/ejemplos/diagramas-de-red-online" office:target-frame-name="_blank" xlink:show="new" text:style-name="Internet_20_link" text:visited-style-name="Visited_20_Internet_20_Link"><text:span text:style-name="Strong_20_Emphasis"><text:span text:style-name="T1">Lucidchart</text:span></text:span></text:a><text:span text:style-name="Strong_20_Emphasis"><text:span text:style-name="T2">:</text:span></text:span><text:span text:style-name="T3"> Ofrece plantillas específicas para topologías de red.</text:span></text:p>
        </text:list-item>
        <text:list-item>
          <text:p text:style-name="P7"><text:span text:style-name="Strong_20_Emphasis"><text:span text:style-name="T2">Draw.io (diagrams.net):</text:span></text:span><text:span text:style-name="T3"> Herramienta gratuita para crear y exportar diagramas en múltiples formatos.</text:span></text:p>
        </text:list-item>
        <text:list-item>
          <text:p text:style-name="P7"><text:a xlink:type="simple" xlink:href="https://miro.com/es/diagrama/diagrama-red/" office:target-frame-name="_blank" xlink:show="new" text:style-name="Internet_20_link" text:visited-style-name="Visited_20_Internet_20_Link"><text:span text:style-name="Strong_20_Emphasis"><text:span text:style-name="T1">Miro</text:span></text:span></text:a><text:span text:style-name="Strong_20_Emphasis"><text:span text:style-name="T2">:</text:span></text:span><text:span text:style-name="T3"> Útil para visualizar la topología de red con iconos estándar de la industria.</text:span></text:p>
        </text:list-item>
      </text:list>
      <text:p text:style-name="Standard"/>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Hacer un resumen global de todo lo implementado y manuales de todo lo que tenemos y empezar a publicarlo en el Astro, puedes usar todo el historial de la conversacion que tenemos como Arquitectura de IA Operacional para generar las entradas del blog y documentacion tecnica a añadir asi podre tener todo lo que hamos hablado y implementado bien documentado. Te parece bien?</text:p>
      <text:p text:style-name="P8"/>
      <text:p text:style-name="P8"/>
      <text:p text:style-name="P8">Dominio final del Blog ASTRO</text:p>
      <text:p text:style-name="P8"/>
      <text:p text:style-name="P8">blog-ai-lab.labrazahome.com</text:p>
      <text:p text:style-name="P8"/>
      <text:p text:style-name="P10"/>
      <text:p text:style-name="P10">añadir una politica o regla al motor de ai-lab para que utilice astro para tener todo documentado y actualizado, tanto diagramas como documentacion y procedimientos de la infraestructurra del ai-lab, podria preguntar siempre cuestiones como : ¿Quieres añadir a documentacion? O ¿Quieres actualizar diagrama? O ¿Quieres publicar al blog? Etc… sugiereme como automatizar el proceso de generacion de documentacion, actu<text:span text:style-name="T4">a</text:span>lizacion y publicacion a astro via motor ia-lab</text:p>
      <text:p text:style-name="P10"/>
      <text:p text:style-name="Standard"><text:span text:style-name="T5">Y crear alguna regla en .agent\rules para que opencode </text:span><text:span text:style-name="T6">entienda que cuando le diga genera doocumentacin y guardala y publicala en Documentos Astro o le diga Publica esto en Blog Astro haga todo el proceso, seria factible?</text:span></text:p>
      <text:p text:style-name="Standard"/>
      <text:p text:style-name="P11"><text:span text:style-name="Strong_20_Emphasis"><text:span text:style-name="T7">1.</text:span></text:span><text:span text:style-name="Strong_20_Emphasis">Cre</text:span><text:span text:style-name="Strong_20_Emphasis"><text:span text:style-name="T5">e los</text:span></text:span><text:span text:style-name="Strong_20_Emphasis"> Archivos Markdown</text:span>:</text:p>
      <text:p text:style-name="Standard"/>
      <text:list text:style-name="L4">
        <text:list-item>
          <text:list>
            <text:list-item>
              <text:p text:style-name="P12">Crea archivos markdown en la carpeta <text:span text:style-name="Source_20_Text">docs/</text:span> para documentar cada paso y configuración realizada.</text:p>
            </text:list-item>
          </text:list>
        </text:list-item>
        <text:list-item>
          <text:p text:style-name="P12"><text:span text:style-name="Strong_20_Emphasis">Publicar Documentación</text:span>:</text:p>
          <text:list>
            <text:list-item>
              <text:p text:style-name="P12">Utiliza Astro para publicar la documentación en el blog.</text:p>
            </text:list-item>
          </text:list>
        </text:list-item>
      </text:list>
      <text:p text:style-name="Standard"/>
      <text:p text:style-name="P10"/>
      <text:p text:style-name="P10"/>
      <text:p text:style-name="P10"><text:span text:style-name="T4">Astro en cloudflare: </text:span><text:a xlink:type="simple" xlink:href="https://ubuntu-ialab.albertgraciaquintana.workers.dev/" text:style-name="Internet_20_link" text:visited-style-name="Visited_20_Internet_20_Link">https://ubuntu-ialab.albertgraciaquintana.workers.dev/</text:a></text:p>
      <text:p text:style-name="P10"/>
      <text:p text:style-name="P13">Asi cuando tenga el lab y los servidores apagados pueda seguir mostrando el blog Astro en cloudflare y me puedan encontrar siempre ahi.</text:p>
      <text:p text:style-name="P13"/>
      <text:p text:style-name="P13">Como podemos aprovechar esta funcionalidad de cloudflare con Astro para exponer publicamente entradas de Blog y diagramas de arquitectura que quiera hacer publicas. Que me sugieres o aconsejas de como llevarlo a cabo, es buena idea?</text:p>
      <text:p text:style-name="P13"/>
      <text:p text:style-name="P14">Como puedo ver si la partcion secundaria de 98gb de ia-lab esta ya formateada y lista para usa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0T13:58:54.257610900</meta:creation-date>
    <dc:date>2026-05-10T18:00:08.060619800</dc:date>
    <meta:editing-duration>PT2H2M12S</meta:editing-duration>
    <meta:editing-cycles>6</meta:editing-cycles>
    <meta:generator>LibreOffice/26.2.3.2$Windows_X86_64 LibreOffice_project/70e089b17412e4cb7773e41413306b17a2328c34</meta:generator>
    <meta:document-statistic meta:table-count="0" meta:image-count="0" meta:object-count="0" meta:page-count="2" meta:paragraph-count="28" meta:word-count="523" meta:character-count="3481" meta:non-whitespace-character-count="2999"/>
  </office:meta>
</office:document-meta>
</file>