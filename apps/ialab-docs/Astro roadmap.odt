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3.884cm" table:align="left"/>
    </style:style>
    <style:style style:name="Tabla1.A" style:family="table-column">
      <style:table-column-properties style:column-width="6.181cm"/>
    </style:style>
    <style:style style:name="Tabla1.B" style:family="table-column">
      <style:table-column-properties style:column-width="1.455cm"/>
    </style:style>
    <style:style style:name="Tabla1.C" style:family="table-column">
      <style:table-column-properties style:column-width="6.248cm"/>
    </style:style>
    <style:style style:name="Tabla1.A1" style:family="table-cell">
      <style:table-cell-properties style:vertical-align="middle" fo:padding="0.049cm" fo:border="0.05pt solid #e5e7eb"/>
    </style:style>
    <style:style style:name="Tabla2" style:family="table">
      <style:table-properties style:width="13.554cm" table:align="left"/>
    </style:style>
    <style:style style:name="Tabla2.A" style:family="table-column">
      <style:table-column-properties style:column-width="2.245cm"/>
    </style:style>
    <style:style style:name="Tabla2.B" style:family="table-column">
      <style:table-column-properties style:column-width="5.017cm"/>
    </style:style>
    <style:style style:name="Tabla2.C" style:family="table-column">
      <style:table-column-properties style:column-width="6.292cm"/>
    </style:style>
    <style:style style:name="Tabla2.A1" style:family="table-cell">
      <style:table-cell-properties style:vertical-align="middle" fo:padding="0.049cm" fo:border="0.05pt solid #e5e7eb"/>
    </style:style>
    <style:style style:name="Tabla3" style:family="table">
      <style:table-properties style:width="12.631cm" table:align="left"/>
    </style:style>
    <style:style style:name="Tabla3.A" style:family="table-column">
      <style:table-column-properties style:column-width="7.325cm"/>
    </style:style>
    <style:style style:name="Tabla3.B" style:family="table-column">
      <style:table-column-properties style:column-width="5.306cm"/>
    </style:style>
    <style:style style:name="Tabla3.A1" style:family="table-cell">
      <style:table-cell-properties style:vertical-align="middle" fo:padding="0.049cm" fo:border="0.05pt solid #e5e7eb"/>
    </style:style>
    <style:style style:name="Tabla4" style:family="table">
      <style:table-properties style:width="17cm" table:align="left"/>
    </style:style>
    <style:style style:name="Tabla4.A" style:family="table-column">
      <style:table-column-properties style:column-width="6.657cm"/>
    </style:style>
    <style:style style:name="Tabla4.B" style:family="table-column">
      <style:table-column-properties style:column-width="10.343cm"/>
    </style:style>
    <style:style style:name="Tabla4.A1" style:family="table-cell">
      <style:table-cell-properties style:vertical-align="middle" fo:padding="0.049cm" fo:border="0.05pt solid #e5e7eb"/>
    </style:style>
    <style:style style:name="P1" style:family="paragraph" style:parent-style-name="Standard">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2"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5"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6" style:family="paragraph" style:parent-style-name="Text_20_body">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7"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8" style:family="paragraph" style:parent-style-name="Standard">
      <style:text-properties officeooo:rsid="001a8ba3" officeooo:paragraph-rsid="001a8ba3"/>
    </style:style>
    <style:style style:name="P9" style:family="paragraph" style:parent-style-name="Standard">
      <style:text-properties officeooo:rsid="001a8ba3" officeooo:paragraph-rsid="001ad2dc"/>
    </style:style>
    <style:style style:name="P10" style:family="paragraph" style:parent-style-name="Standard">
      <style:text-properties officeooo:rsid="0015ea9e" officeooo:paragraph-rsid="0015ea9e"/>
    </style:style>
    <style:style style:name="P11" style:family="paragraph" style:parent-style-name="Standard">
      <style:text-properties officeooo:paragraph-rsid="001ca0d6"/>
    </style:style>
    <style:style style:name="P12" style:family="paragraph" style:parent-style-name="Text_20_body" style:list-style-name="L4"/>
    <style:style style:name="P13" style:family="paragraph" style:parent-style-name="Standard">
      <style:text-properties officeooo:rsid="00176b44" officeooo:paragraph-rsid="00176b44"/>
    </style:style>
    <style:style style:name="P14" style:family="paragraph" style:parent-style-name="Standard">
      <style:text-properties officeooo:rsid="001bdc10" officeooo:paragraph-rsid="001bdc10"/>
    </style:style>
    <style:style style:name="P15" style:family="paragraph" style:parent-style-name="Standard">
      <style:text-properties style:text-line-through-style="none" style:text-line-through-type="none" style:font-name="Google Sans" fo:font-size="12pt" style:text-underline-style="none" fo:font-weight="normal" officeooo:rsid="001bdc10" officeooo:paragraph-rsid="001bdc10" style:text-blinking="false" loext:padding="0cm" loext:border="none"/>
    </style:style>
    <style:style style:name="P16" style:family="paragraph" style:parent-style-name="Standard">
      <style:paragraph-properties fo:margin-left="0cm" fo:margin-right="0cm" fo:margin-top="0.318cm" fo:margin-bottom="0.423cm" style:contextual-spacing="false" fo:text-indent="0cm" style:auto-text-indent="false"/>
    </style:style>
    <style:style style:name="P17" style:family="paragraph" style:parent-style-name="Standard">
      <style:paragraph-properties fo:margin-left="0cm" fo:margin-right="0cm" fo:margin-top="0cm" fo:margin-bottom="0.499cm" style:contextual-spacing="false" fo:text-indent="0cm" style:auto-text-indent="false"/>
    </style:style>
    <style:style style:name="P18"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officeooo:rsid="001bdc10"/>
    </style:style>
    <style:style style:name="P19"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officeooo:rsid="001bdc10" style:text-blinking="false" loext:padding="0cm" loext:border="none"/>
    </style:style>
    <style:style style:name="P20" style:family="paragraph" style:parent-style-name="Text_20_body">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officeooo:rsid="001bdc10" style:text-blinking="false" loext:padding="0cm" loext:border="none"/>
    </style:style>
    <style:style style:name="P21"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2pt" style:text-underline-style="none" fo:font-weight="bold" officeooo:rsid="001bdc10" style:text-blinking="false" loext:padding="0cm" loext:border="none"/>
    </style:style>
    <style:style style:name="P22" style:family="paragraph" style:parent-style-name="Text_20_body">
      <style:paragraph-properties fo:margin-left="0cm" fo:margin-right="0cm" fo:margin-top="0.318cm" fo:margin-bottom="0.423cm" style:contextual-spacing="false" fo:text-indent="0cm" style:auto-text-indent="false"/>
      <style:text-properties officeooo:rsid="001bdc10"/>
    </style:style>
    <style:style style:name="P23" style:family="paragraph" style:parent-style-name="Text_20_body" style:list-style-name="L6">
      <style:paragraph-properties fo:margin-left="0cm" fo:margin-right="0cm" fo:margin-top="0cm" fo:margin-bottom="0cm" style:contextual-spacing="false" fo:text-indent="0cm" style:auto-text-indent="false" fo:padding="0cm" fo:border="none" style:writing-mode="lr-tb"/>
      <style:text-properties officeooo:rsid="001bdc10"/>
    </style:style>
    <style:style style:name="P24"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officeooo:rsid="001bdc10"/>
    </style:style>
    <style:style style:name="P25"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officeooo:rsid="001bdc10"/>
    </style:style>
    <style:style style:name="P26" style:family="paragraph" style:parent-style-name="Text_20_body" style:list-style-name="L7">
      <style:paragraph-properties fo:margin-left="0cm" fo:margin-right="0cm" fo:margin-top="0cm" fo:margin-bottom="0cm" style:contextual-spacing="false" fo:text-indent="0cm" style:auto-text-indent="false" fo:padding="0cm" fo:border="none" style:writing-mode="lr-tb"/>
      <style:text-properties officeooo:rsid="001bdc10"/>
    </style:style>
    <style:style style:name="P27" style:family="paragraph" style:parent-style-name="Text_20_body">
      <style:paragraph-properties fo:margin-left="0cm" fo:margin-right="0cm" fo:margin-top="0cm" fo:margin-bottom="0cm" style:contextual-spacing="false" fo:text-indent="0cm" style:auto-text-indent="false"/>
      <style:text-properties style:text-line-through-style="none" style:text-line-through-type="none" style:font-name="Google Sans" fo:font-size="15pt" style:text-underline-style="none" fo:font-weight="bold" officeooo:rsid="001bdc10" style:text-blinking="false" loext:padding="0cm" loext:border="none"/>
    </style:style>
    <style:style style:name="P28" style:family="paragraph" style:parent-style-name="Preformatted_20_Text">
      <style:paragraph-properties fo:margin-left="0cm" fo:margin-right="0cm" fo:margin-top="0cm" fo:margin-bottom="0cm" style:contextual-spacing="false" fo:text-indent="0cm" style:auto-text-indent="false" fo:padding="0cm" fo:border="none" style:writing-mode="lr-tb"/>
      <style:text-properties officeooo:rsid="001bdc10"/>
    </style:style>
    <style:style style:name="P29" style:family="paragraph" style:parent-style-name="Preformatted_20_Text">
      <style:paragraph-properties fo:margin-left="0cm" fo:margin-right="0cm" fo:margin-top="0cm" fo:margin-bottom="0cm" style:contextual-spacing="false" fo:padding="0cm" fo:border="none" style:writing-mode="lr-tb"/>
      <style:text-properties officeooo:rsid="001bdc10"/>
    </style:style>
    <style:style style:name="P30" style:family="paragraph" style:parent-style-name="Text_20_body">
      <style:paragraph-properties fo:margin-left="0cm" fo:margin-right="0cm" fo:margin-top="0cm" fo:margin-bottom="0cm" style:contextual-spacing="false" fo:text-indent="0cm" style:auto-text-indent="false"/>
      <style:text-properties style:text-line-through-style="none" style:text-line-through-type="none" style:font-name="Google Sans" fo:font-size="9pt" style:text-underline-style="none" fo:font-weight="normal" officeooo:rsid="001bdc10" style:text-blinking="false" loext:padding="0cm" loext:border="none"/>
    </style:style>
    <style:style style:name="P31"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officeooo:rsid="001bdc10"/>
    </style:style>
    <style:style style:name="P32" style:family="paragraph" style:parent-style-name="Text_20_body">
      <style:paragraph-properties fo:margin-left="0cm" fo:margin-right="0cm" fo:margin-top="0cm" fo:margin-bottom="0cm" style:contextual-spacing="false" fo:text-indent="0cm" style:auto-text-indent="false"/>
      <style:text-properties style:text-line-through-style="none" style:text-line-through-type="none" style:font-name="Google Sans" fo:font-size="12pt" style:text-underline-style="none" fo:font-weight="normal" officeooo:rsid="001bdc10" style:text-blinking="false" loext:padding="0cm" loext:border="none"/>
    </style:style>
    <style:style style:name="P33" style:family="paragraph" style:parent-style-name="Heading_20_3">
      <style:text-properties officeooo:rsid="001bdc10" officeooo:paragraph-rsid="001bdc10"/>
    </style:style>
    <style:style style:name="P34" style:family="paragraph" style:parent-style-name="Text_20_body">
      <style:paragraph-properties fo:margin-left="0cm" fo:margin-right="0cm" fo:text-indent="0cm" style:auto-text-indent="false" fo:padding="0.049cm" fo:border="0.06pt solid #e5e7eb"/>
      <style:text-properties officeooo:rsid="001bdc10"/>
    </style:style>
    <style:style style:name="P35" style:family="paragraph" style:parent-style-name="Preformatted_20_Text">
      <style:paragraph-properties fo:margin-left="0cm" fo:margin-right="0cm" fo:text-indent="0cm" style:auto-text-indent="false" fo:padding="0.049cm" fo:border="0.06pt solid #e5e7eb"/>
      <style:text-properties officeooo:rsid="001bdc10"/>
    </style:style>
    <style:style style:name="P36" style:family="paragraph" style:parent-style-name="Preformatted_20_Text">
      <style:paragraph-properties fo:padding="0.049cm" fo:border="0.06pt solid #e5e7eb"/>
      <style:text-properties officeooo:rsid="001bdc10"/>
    </style:style>
    <style:style style:name="P37" style:family="paragraph" style:parent-style-name="Preformatted_20_Text">
      <style:paragraph-properties fo:margin-top="0cm" fo:margin-bottom="0.499cm" style:contextual-spacing="false" fo:padding="0.049cm" fo:border="0.06pt solid #e5e7eb"/>
      <style:text-properties officeooo:rsid="001bdc10"/>
    </style:style>
    <style:style style:name="P38" style:family="paragraph" style:parent-style-name="Heading_20_3">
      <style:paragraph-properties fo:margin-left="0cm" fo:margin-right="0cm" fo:text-indent="0cm" style:auto-text-indent="false" fo:padding="0.049cm" fo:border="0.06pt solid #e5e7eb"/>
      <style:text-properties officeooo:rsid="001bdc10"/>
    </style:style>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paragraph-properties fo:margin-left="0cm" fo:margin-right="0cm" fo:margin-top="0cm" fo:margin-bottom="0cm" style:contextual-spacing="false" fo:text-indent="0cm" style:auto-text-indent="false" fo:padding="0cm" fo:border="none" style:writing-mode="lr-tb"/>
    </style:style>
    <style:style style:name="P43" style:family="paragraph" style:parent-style-name="Text_20_body">
      <style:paragraph-properties fo:margin-left="0cm" fo:margin-right="0cm" fo:margin-top="0cm" fo:margin-bottom="0cm" style:contextual-spacing="false" fo:text-indent="0cm" style:auto-text-indent="false" style:writing-mode="lr-tb"/>
    </style:style>
    <style:style style:name="P44" style:family="paragraph" style:parent-style-name="Text_20_body">
      <style:paragraph-properties fo:margin-left="0cm" fo:margin-right="0cm" fo:margin-top="0cm" fo:margin-bottom="0cm" style:contextual-spacing="false" fo:text-indent="0cm" style:auto-text-indent="false"/>
    </style:style>
    <style:style style:name="P45" style:family="paragraph" style:parent-style-name="Text_20_body">
      <style:paragraph-properties fo:margin-left="0cm" fo:margin-right="0cm" fo:margin-top="0cm" fo:margin-bottom="0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46" style:family="paragraph" style:parent-style-name="Preformatted_20_Text">
      <style:paragraph-properties fo:margin-left="0cm" fo:margin-right="0cm" fo:margin-top="0cm" fo:margin-bottom="0cm" style:contextual-spacing="false" fo:text-indent="0cm" style:auto-text-indent="false" fo:padding="0cm" fo:border="none" style:writing-mode="lr-tb"/>
    </style:style>
    <style:style style:name="P47" style:family="paragraph" style:parent-style-name="Preformatted_20_Text">
      <style:paragraph-properties fo:margin-left="0cm" fo:margin-right="0cm" fo:margin-top="0cm" fo:margin-bottom="0cm" style:contextual-spacing="false" fo:padding="0cm" fo:border="none" style:writing-mode="lr-tb"/>
    </style:style>
    <style:style style:name="P48" style:family="paragraph" style:parent-style-name="Text_20_body">
      <style:paragraph-properties fo:margin-left="0cm" fo:margin-right="0cm" fo:margin-top="0cm" fo:margin-bottom="0cm" style:contextual-spacing="false" fo:text-indent="0cm" style:auto-text-indent="false"/>
      <style:text-properties style:text-line-through-style="none" style:text-line-through-type="none" style:font-name="Google Sans" fo:font-size="9pt" style:text-underline-style="none" fo:font-weight="normal" style:text-blinking="false" loext:padding="0cm" loext:border="none"/>
    </style:style>
    <style:style style:name="P49" style:family="paragraph" style:parent-style-name="Text_20_body">
      <style:paragraph-properties fo:margin-left="0cm" fo:margin-right="0cm" fo:margin-top="0.635cm" fo:margin-bottom="0.318cm" style:contextual-spacing="false" fo:text-indent="0cm" style:auto-text-indent="false"/>
    </style:style>
    <style:style style:name="P50"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51" style:family="paragraph" style:parent-style-name="Text_20_body" style:list-style-name="L13">
      <style:paragraph-properties fo:margin-left="0cm" fo:margin-right="0cm" fo:margin-top="0cm" fo:margin-bottom="0cm" style:contextual-spacing="false" fo:text-indent="0cm" style:auto-text-indent="false" fo:padding="0cm" fo:border="none" style:writing-mode="lr-tb"/>
    </style:style>
    <style:style style:name="P52" style:family="paragraph" style:parent-style-name="Text_20_body">
      <style:paragraph-properties fo:margin-left="0cm" fo:margin-right="0cm" fo:text-indent="0cm" style:auto-text-indent="false" fo:padding="0.049cm" fo:border="0.06pt solid #e5e7eb"/>
    </style:style>
    <style:style style:name="P53" style:family="paragraph" style:parent-style-name="Table_20_Heading">
      <style:paragraph-properties fo:margin-left="0cm" fo:margin-right="0cm" fo:text-indent="0cm" style:auto-text-indent="false"/>
    </style:style>
    <style:style style:name="P54" style:family="paragraph" style:parent-style-name="Table_20_Contents">
      <style:paragraph-properties fo:margin-left="0cm" fo:margin-right="0cm" fo:text-indent="0cm" style:auto-text-indent="false"/>
    </style:style>
    <style:style style:name="P55" style:family="paragraph" style:parent-style-name="Quotations">
      <style:paragraph-properties fo:margin-left="1cm" fo:margin-right="1cm" fo:text-indent="0cm" style:auto-text-indent="false" fo:padding="0.049cm" fo:border="0.06pt solid #e5e7eb"/>
    </style:style>
    <style:style style:name="P56" style:family="paragraph" style:parent-style-name="Heading_20_2">
      <style:paragraph-properties fo:margin-left="0cm" fo:margin-right="0cm" fo:text-indent="0cm" style:auto-text-indent="false" fo:padding="0.049cm" fo:border="0.06pt solid #e5e7eb"/>
    </style:style>
    <style:style style:name="P57" style:family="paragraph" style:parent-style-name="Preformatted_20_Text">
      <style:paragraph-properties fo:margin-left="0cm" fo:margin-right="0cm" fo:text-indent="0cm" style:auto-text-indent="false" fo:padding="0.049cm" fo:border="0.06pt solid #e5e7eb"/>
    </style:style>
    <style:style style:name="P58" style:family="paragraph" style:parent-style-name="Preformatted_20_Text">
      <style:paragraph-properties fo:margin-top="0cm" fo:margin-bottom="0.499cm" style:contextual-spacing="false" fo:padding="0.049cm" fo:border="0.06pt solid #e5e7eb"/>
    </style:style>
    <style:style style:name="P59" style:family="paragraph" style:parent-style-name="Preformatted_20_Text">
      <style:paragraph-properties fo:margin-left="0cm" fo:margin-right="0cm" fo:margin-top="0cm" fo:margin-bottom="0.499cm" style:contextual-spacing="false" fo:text-indent="0cm" style:auto-text-indent="false" fo:padding="0.049cm" fo:border="0.06pt solid #e5e7eb"/>
    </style:style>
    <style:style style:name="P60" style:family="paragraph" style:parent-style-name="Preformatted_20_Text">
      <style:paragraph-properties fo:padding="0.049cm" fo:border="0.06pt solid #e5e7eb"/>
    </style:style>
    <style:style style:name="P61" style:family="paragraph" style:parent-style-name="Heading_20_3">
      <style:paragraph-properties fo:margin-left="0cm" fo:margin-right="0cm" fo:text-indent="0cm" style:auto-text-indent="false" fo:padding="0.049cm" fo:border="0.06pt solid #e5e7eb"/>
    </style:style>
    <style:style style:name="P62" style:family="paragraph" style:parent-style-name="Text_20_body">
      <style:paragraph-properties fo:margin-left="0cm" fo:margin-right="0cm" fo:text-indent="0cm" style:auto-text-indent="false" fo:padding="0.049cm" fo:border="0.06pt solid #e5e7eb"/>
      <style:text-properties loext:padding="0.049cm" loext:border="0.06pt solid #e5e7eb"/>
    </style:style>
    <style:style style:name="P63" style:family="paragraph" style:parent-style-name="Text_20_body" style:list-style-name="L14">
      <style:paragraph-properties fo:margin-left="0cm" fo:margin-right="0cm" fo:margin-top="0cm" fo:margin-bottom="0cm" style:contextual-spacing="false" fo:text-indent="0cm" style:auto-text-indent="false" fo:padding="0.049cm" fo:border="0.06pt solid #e5e7eb"/>
    </style:style>
    <style:style style:name="P64" style:family="paragraph" style:parent-style-name="Text_20_body" style:list-style-name="L14">
      <style:paragraph-properties fo:margin-left="0cm" fo:margin-right="0cm" fo:text-indent="0cm" style:auto-text-indent="false" fo:padding="0.049cm" fo:border="0.06pt solid #e5e7eb"/>
    </style:style>
    <style:style style:name="P65" style:family="paragraph" style:parent-style-name="Text_20_body" style:list-style-name="L15">
      <style:paragraph-properties fo:margin-left="0cm" fo:margin-right="0cm" fo:margin-top="0cm" fo:margin-bottom="0cm" style:contextual-spacing="false" fo:text-indent="0cm" style:auto-text-indent="false" fo:padding="0.049cm" fo:border="0.06pt solid #e5e7eb"/>
    </style:style>
    <style:style style:name="P66" style:family="paragraph" style:parent-style-name="Text_20_body" style:list-style-name="L15">
      <style:paragraph-properties fo:margin-left="0cm" fo:margin-right="0cm" fo:text-indent="0cm" style:auto-text-indent="false" fo:padding="0.049cm" fo:border="0.06pt solid #e5e7eb"/>
    </style:style>
    <style:style style:name="T1" style:family="text">
      <style:text-properties style:text-line-through-style="none" style:text-line-through-type="none" style:font-name="Google Sans" fo:font-size="12pt" style:text-underline-style="solid" style:text-underline-width="auto" style:text-underline-color="font-color" fo:font-weight="bold" style:text-blinking="false" loext:padding="0cm" loext:border="none"/>
    </style:style>
    <style:style style:name="T2" style:family="text">
      <style:text-properties style:text-line-through-style="none" style:text-line-through-type="none" style:font-name="Google Sans" fo:font-size="12pt" style:text-underline-style="none" fo:font-weight="bold" style:text-blinking="false" loext:padding="0cm" loext:border="none"/>
    </style:style>
    <style:style style:name="T3" style:family="text">
      <style:text-properties style:text-line-through-style="none" style:text-line-through-type="none" style:font-name="Google Sans" fo:font-size="12pt" style:text-underline-style="none" fo:font-weight="normal" style:text-blinking="false" loext:padding="0cm" loext:border="none"/>
    </style:style>
    <style:style style:name="T4" style:family="text">
      <style:text-properties officeooo:rsid="00176b44"/>
    </style:style>
    <style:style style:name="T5" style:family="text">
      <style:text-properties officeooo:rsid="0020347a"/>
    </style:style>
    <style:style style:name="T6" style:family="text">
      <style:text-properties officeooo:rsid="001ca0d6"/>
    </style:style>
    <style:style style:name="T7" style:family="text">
      <style:text-properties officeooo:rsid="001d2d65"/>
    </style:style>
    <style:style style:name="T8" style:family="text">
      <style:text-properties fo:font-weight="normal" officeooo:rsid="001ca0d6" style:font-weight-asian="normal" style:font-weight-complex="normal"/>
    </style:style>
    <style:style style:name="T9" style:family="text">
      <style:text-properties style:text-line-through-style="none" style:text-line-through-type="none" style:font-name="Google Sans" fo:font-size="12pt" style:text-underline-style="solid" style:text-underline-width="auto" style:text-underline-color="font-color" fo:font-weight="normal" style:text-blinking="false" loext:padding="0cm" loext:border="none"/>
    </style:style>
    <style:style style:name="T10" style:family="text">
      <style:text-properties style:text-line-through-style="none" style:text-line-through-type="none" fo:font-family="monospace" fo:font-size="10.5pt" style:text-underline-style="none" fo:font-weight="normal" style:text-blinking="false" loext:padding-left="0cm" loext:padding-right="0cm" loext:padding-top="0cm" loext:padding-bottom="0.049cm" loext:border-left="none" loext:border-right="none" loext:border-top="none" loext:border-bottom="0.06pt solid #2c2e35"/>
    </style:style>
    <style:style style:name="T11" style:family="text">
      <style:text-properties style:text-line-through-style="none" style:text-line-through-type="none" fo:font-family="monospace" fo:font-size="10.5pt" style:text-underline-style="none" fo:font-weight="normal" style:text-blinking="false" loext:padding="0cm" loext:border="none"/>
    </style:style>
    <style:style style:name="T12" style:family="text">
      <style:text-properties style:text-line-through-style="none" style:text-line-through-type="none" style:text-underline-style="none" style:text-blinking="false" loext:padding="0cm" loext:border="none"/>
    </style:style>
    <style:style style:name="T13" style:family="text">
      <style:text-properties loext:padding="0.049cm" loext:border="0.06pt solid #e5e7eb"/>
    </style:style>
    <style:style style:name="T14" style:family="text">
      <style:text-properties officeooo:rsid="001e088a"/>
    </style:style>
    <style:style style:name="T15" style:family="text">
      <style:text-properties style:text-line-through-style="none" style:text-line-through-type="none" style:font-name="Google Sans" fo:font-size="15pt" style:text-underline-style="none" fo:font-weight="bold" style:text-blinking="false" loext:padding="0cm" loext:border="none"/>
    </style:style>
    <style:style style:name="T16" style:family="text">
      <style:text-properties style:text-line-through-style="none" style:text-line-through-type="none" fo:font-family="monospace" fo:font-size="10.5pt" style:text-underline-style="none" fo:font-weight="bold" style:text-blinking="false" loext:padding-left="0cm" loext:padding-right="0cm" loext:padding-top="0cm" loext:padding-bottom="0.049cm" loext:border-left="none" loext:border-right="none" loext:border-top="none" loext:border-bottom="0.06pt solid #2c2e35"/>
    </style:style>
    <style:style style:name="T17" style:family="text">
      <style:text-properties style:text-line-through-style="none" style:text-line-through-type="none" style:font-name="Google Sans" fo:font-size="15pt" style:text-underline-style="solid" style:text-underline-width="auto" style:text-underline-color="font-color" fo:font-weight="bold" style:text-blinking="false"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nque Astro es un framework enfocado en el contenido web, su ecosistema permite integrar herramientas potentes para visualizar la infraestructura de red directamente en tus páginas estáticas sin añadir dependencias pesadas al cliente.</text:p>
      <text:p text:style-name="P2">Principales Métodos en Astro</text:p>
      <text:list text:style-name="L1">
        <text:list-item>
          <text:p text:style-name="P3"><text:a xlink:type="simple" xlink:href="https://aaronjbecker.com/posts/adding-d2-diagrams-to-astro/" office:target-frame-name="_blank" xlink:show="new" text:style-name="Internet_20_link" text:visited-style-name="Visited_20_Internet_20_Link"><text:span text:style-name="Strong_20_Emphasis"><text:span text:style-name="T1">Astro-D2</text:span></text:span></text:a><text:span text:style-name="Strong_20_Emphasis"><text:span text:style-name="T2">:</text:span></text:span><text:span text:style-name="T3"> Es una integración activa y bien documentada que permite incluir diagramas de red profesionales utilizando el lenguaje D2. Es ideal para representar tanto topologías lógicas (flujos, IPs) como físicas (dispositivos).</text:span></text:p>
        </text:list-item>
        <text:list-item>
          <text:p text:style-name="P3"><text:span text:style-name="Strong_20_Emphasis"><text:span text:style-name="T2">rehype-mermaid:</text:span></text:span><text:span text:style-name="T3"> Permite renderizar diagramas de Mermaid, incluyendo diagramas de flujo y secuencia, dentro de archivos Markdown o MDX.</text:span></text:p>
        </text:list-item>
        <text:list-item>
          <text:p text:style-name="P3"><text:span text:style-name="Strong_20_Emphasis"><text:span text:style-name="T2">Integración de imágenes estáticas:</text:span></text:span><text:span text:style-name="T3"> Puedes diseñar tus esquemas en herramientas externas (como Lucidchart, Draw.io, o Miro) y exportarlos como SVG o PNG para importarlos en componentes Astro.</text:span></text:p>
        </text:list-item>
      </text:list>
      <text:p text:style-name="P4">Pasos para Añadir Diagramas a Astro (Ejemplo con D2)</text:p>
      <text:list text:style-name="L2">
        <text:list-item>
          <text:p text:style-name="P5"><text:span text:style-name="Strong_20_Emphasis"><text:span text:style-name="T2">Instalar D2:</text:span></text:span><text:span text:style-name="T3"> Instalar la herramienta D2 para desarrollo local.</text:span></text:p>
        </text:list-item>
        <text:list-item>
          <text:p text:style-name="P5"><text:span text:style-name="Strong_20_Emphasis"><text:span text:style-name="T2">Instalar astro-d2:</text:span></text:span><text:span text:style-name="T3"> Añadir la integración al proyecto Astro.</text:span></text:p>
        </text:list-item>
        <text:list-item>
          <text:p text:style-name="P5"><text:span text:style-name="Strong_20_Emphasis"><text:span text:style-name="T2">Crear el esquema:</text:span></text:span><text:span text:style-name="T3"> Usar el DSL (Domain Specific Language) de D2 en archivos Markdown para definir los dispositivos y conexiones.</text:span></text:p>
        </text:list-item>
        <text:list-item>
          <text:p text:style-name="P5"><text:span text:style-name="Strong_20_Emphasis"><text:span text:style-name="T2">Construir el sitio:</text:span></text:span><text:span text:style-name="T3"> Astro generará los diagramas como imágenes optimizadas durante el build.</text:span></text:p>
        </text:list-item>
      </text:list>
      <text:p text:style-name="P4">Alternativas de Diagramación (Externas)</text:p>
      <text:p text:style-name="P6">Si prefieres no generar los diagramas por código, puedes utilizar herramientas externas para luego integrar la imagen:</text:p>
      <text:list text:style-name="L3">
        <text:list-item>
          <text:p text:style-name="P7"><text:a xlink:type="simple" xlink:href="https://www.lucidchart.com/pages/es/ejemplos/diagramas-de-red-online" office:target-frame-name="_blank" xlink:show="new" text:style-name="Internet_20_link" text:visited-style-name="Visited_20_Internet_20_Link"><text:span text:style-name="Strong_20_Emphasis"><text:span text:style-name="T1">Lucidchart</text:span></text:span></text:a><text:span text:style-name="Strong_20_Emphasis"><text:span text:style-name="T2">:</text:span></text:span><text:span text:style-name="T3"> Ofrece plantillas específicas para topologías de red.</text:span></text:p>
        </text:list-item>
        <text:list-item>
          <text:p text:style-name="P7"><text:span text:style-name="Strong_20_Emphasis"><text:span text:style-name="T2">Draw.io (diagrams.net):</text:span></text:span><text:span text:style-name="T3"> Herramienta gratuita para crear y exportar diagramas en múltiples formatos.</text:span></text:p>
        </text:list-item>
        <text:list-item>
          <text:p text:style-name="P7"><text:a xlink:type="simple" xlink:href="https://miro.com/es/diagrama/diagrama-red/" office:target-frame-name="_blank" xlink:show="new" text:style-name="Internet_20_link" text:visited-style-name="Visited_20_Internet_20_Link"><text:span text:style-name="Strong_20_Emphasis"><text:span text:style-name="T1">Miro</text:span></text:span></text:a><text:span text:style-name="Strong_20_Emphasis"><text:span text:style-name="T2">:</text:span></text:span><text:span text:style-name="T3"> Útil para visualizar la topología de red con iconos estándar de la industria.</text:span></text:p>
        </text:list-item>
      </text:list>
      <text:p text:style-name="Standard"/>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10"/>
      <text:p text:style-name="P10">añadir una politica o regla al motor de ai-lab para que utilice astro para tener todo documentado y actualizado, tanto diagramas como documentacion y procedimientos de la infraestructurra del ai-lab, podria preguntar siempre cuestiones como : ¿Quieres añadir a documentacion? O ¿Quieres actualizar diagrama? O ¿Quieres publicar al blog? Etc… sugiereme como automatizar el proceso de generacion de documentacion, actu<text:span text:style-name="T4">a</text:span>lizacion y publicacion a astro via motor ia-lab, <text:span text:style-name="T5">y tener un recurso compatido donde opencode pueda guardar documentacion.md y yo pueda verla y utilizarla.</text:span></text:p>
      <text:p text:style-name="P10"/>
      <text:p text:style-name="Standard"><text:span text:style-name="T6">Y crear alguna regla en .agent\rules </text:span><text:span text:style-name="T5">o en router.py</text:span><text:span text:style-name="T6"> para que opencode </text:span><text:span text:style-name="T7">entienda que cuando le diga genera doocumentacin y guardala y publicala en Documentos Astro o le diga Publica esto en Blog Astro haga todo el proceso, seria factible?</text:span></text:p>
      <text:p text:style-name="Standard"/>
      <text:p text:style-name="P11"><text:span text:style-name="Strong_20_Emphasis"><text:span text:style-name="T8">1.</text:span></text:span><text:span text:style-name="Strong_20_Emphasis">Cre</text:span><text:span text:style-name="Strong_20_Emphasis"><text:span text:style-name="T6">e los</text:span></text:span><text:span text:style-name="Strong_20_Emphasis"> Archivos Markdown</text:span>:</text:p>
      <text:p text:style-name="Standard"/>
      <text:list text:style-name="L4">
        <text:list-item>
          <text:list>
            <text:list-item>
              <text:p text:style-name="P12">Crea archivos markdown en la carpeta <text:span text:style-name="Source_20_Text">docs/</text:span> para documentar cada paso y configuración realizada.</text:p>
            </text:list-item>
          </text:list>
        </text:list-item>
        <text:list-item>
          <text:p text:style-name="P12"><text:span text:style-name="Strong_20_Emphasis">Publicar Documentación</text:span>:</text:p>
          <text:list>
            <text:list-item>
              <text:p text:style-name="P12">Utiliza Astro para publicar la documentación en el blog.</text:p>
            </text:list-item>
          </text:list>
        </text:list-item>
      </text:list>
      <text:p text:style-name="Standard"/>
      <text:p text:style-name="P10"/>
      <text:p text:style-name="P10"/>
      <text:p text:style-name="P10"><text:span text:style-name="T4">Astro en cloudflare: </text:span><text:a xlink:type="simple" xlink:href="https://ubuntu-ialab.albertgraciaquintana.workers.dev/" text:style-name="Internet_20_link" text:visited-style-name="Visited_20_Internet_20_Link">https://ubuntu-ialab.albertgraciaquintana.workers.dev/</text:a></text:p>
      <text:p text:style-name="P10"/>
      <text:p text:style-name="P13">Asi cuando tenga el lab y los servidores apagados pueda seguir mostrando el blog Astro en cloudflare y me puedan encontrar siempre ahi.</text:p>
      <text:p text:style-name="P13"/>
      <text:p text:style-name="P13">Como podemos aprovechar esta funcionalidad de cloudflare con Astro para exponer publicamente entradas de Blog y diagramas de arquitectura que quiera hacer publicas. Que me sugieres o aconsejas de como llevarlo a cabo, es buena idea?</text:p>
      <text:p text:style-name="P13"/>
      <text:p text:style-name="P14">Como puedo ver si la partcion secundaria de 98gb de ia-lab esta ya formateada y lista para usa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Crear sitios web con Astro utilizando herramientas de IA de código abierto (open-source) compatibles con la API de OpenAI es una estrategia excelente para lograr alto rendimiento, privacidad de datos y reducción de costes en 2026.</text:p>
      <text:p text:style-name="P16"><text:span text:style-name="T3">Astro se integra perfectamente con herramientas modernas de IA gracias a su naturaleza ligera y soporte para SSR (Server-Side Rendering). [</text:span><text:a xlink:type="simple" xlink:href="https://translate.google.com/translate?u=https://render.com/articles/deploying-astro-websites-with-hybrid-rendering&amp;hl=es&amp;sl=en&amp;tl=es&amp;client=sge" text:style-name="Internet_20_link" text:visited-style-name="Visited_20_Internet_20_Link"><text:span text:style-name="T9">1</text:span></text:a><text:span text:style-name="T3">, </text:span><text:a xlink:type="simple" xlink:href="https://www.youtube.com/watch?v=kXSMcyrIJtI" text:style-name="Internet_20_link" text:visited-style-name="Visited_20_Internet_20_Link"><text:span text:style-name="T9">2</text:span></text:a><text:span text:style-name="T3">, </text:span><text:a xlink:type="simple" xlink:href="https://codigoencasa.com/astro-js-framework-guia-practica-para-crear-sitios-web-mas-rapidos/" text:style-name="Internet_20_link" text:visited-style-name="Visited_20_Internet_20_Link"><text:span text:style-name="T9">3</text:span></text:a><text:span text:style-name="T3">]</text:span></text:p>
      <text:p text:style-name="P2"><text:soft-page-break/>1. Herramientas de IA Open-Source Compatibles (Alternativas a OpenAI)</text:p>
      <text:p text:style-name="P17"><text:span text:style-name="T3">Para utilizar herramientas "Open Code" que funcionen igual que OpenAI, busca proveedores que soporten la </text:span><text:span text:style-name="Strong_20_Emphasis"><text:span text:style-name="T2">API compatible con OpenAI</text:span></text:span><text:span text:style-name="T3">.</text:span></text:p>
      <text:list text:style-name="L5">
        <text:list-item>
          <text:p text:style-name="P18"><text:span text:style-name="Strong_20_Emphasis"><text:span text:style-name="T2">Ollama:</text:span></text:span><text:span text:style-name="T3"> La mejor opción para ejecutar modelos localmente (Llama 3, Mistral, DeepSeek) con privacidad total, trabajando directamente en tu máquina.</text:span></text:p>
        </text:list-item>
        <text:list-item>
          <text:p text:style-name="P18"><text:span text:style-name="Strong_20_Emphasis"><text:span text:style-name="T2">OpenRouter:</text:span></text:span><text:span text:style-name="T3"> Una API unificada que te permite cambiar entre modelos abiertos (como DeepSeek, Qwen3) y cerrados usando el mismo formato de integración.</text:span></text:p>
        </text:list-item>
        <text:list-item>
          <text:p text:style-name="P18"><text:span text:style-name="Strong_20_Emphasis"><text:span text:style-name="T2">Groq:</text:span></text:span><text:span text:style-name="T3"> Ofrece inferencia extremadamente rápida de modelos abiertos con una API compatible con OpenAI.</text:span></text:p>
        </text:list-item>
        <text:list-item>
          <text:p text:style-name="P18"><text:span text:style-name="Strong_20_Emphasis"><text:span text:style-name="T2">DeepSeek AI:</text:span></text:span><text:span text:style-name="T3"> Altamente recomendado en 2026 para codificación y razonamiento, con costos mucho menores o uso local. [</text:span><text:a xlink:type="simple" xlink:href="https://medium.com/codex/open-source-llm-platforms-in-2026-ollama-openrouter-groq-nvidia-nim-which-one-should-you-use-2f11c7ba60bc" text:style-name="Internet_20_link" text:visited-style-name="Visited_20_Internet_20_Link"><text:span text:style-name="T9">1</text:span></text:a><text:span text:style-name="T3">, </text:span><text:a xlink:type="simple" xlink:href="https://www.instaclustr.com/education/open-source-ai/top-7-open-source-llms-for-2026/" text:style-name="Internet_20_link" text:visited-style-name="Visited_20_Internet_20_Link"><text:span text:style-name="T9">2</text:span></text:a><text:span text:style-name="T3">, </text:span><text:a xlink:type="simple" xlink:href="https://www.syncfusion.com/blogs/post/best-5-open-source-llms" text:style-name="Internet_20_link" text:visited-style-name="Visited_20_Internet_20_Link"><text:span text:style-name="T9">3</text:span></text:a><text:span text:style-name="T3">]</text:span></text:p>
        </text:list-item>
      </text:list>
      <text:p text:style-name="P19">2. Flujo de Trabajo: Integración de IA en Astro</text:p>
      <text:p text:style-name="P20">Puedes usar estas herramientas en dos partes: durante el desarrollo (generación de código) y en el sitio final (generación de contenido).</text:p>
      <text:p text:style-name="P21">A. Desarrollo asistido por IA (OpenCode AI)</text:p>
      <text:p text:style-name="P22"><text:span text:style-name="T3">Opencode AI es una herramienta de terminal que permite usar modelos de IA locales o en la nube para crear el código de tu sitio Astro. [</text:span><text:a xlink:type="simple" xlink:href="https://docs.astro.build/zh-tw/guides/build-with-ai/" text:style-name="Internet_20_link" text:visited-style-name="Visited_20_Internet_20_Link"><text:span text:style-name="T9">1</text:span></text:a><text:span text:style-name="T3">, </text:span><text:a xlink:type="simple" xlink:href="https://opencode.ai/docs/es/providers/" text:style-name="Internet_20_link" text:visited-style-name="Visited_20_Internet_20_Link"><text:span text:style-name="T9">2</text:span></text:a><text:span text:style-name="T3">, </text:span><text:a xlink:type="simple" xlink:href="https://www.instagram.com/reel/DXYAsvADBvI/" text:style-name="Internet_20_link" text:visited-style-name="Visited_20_Internet_20_Link"><text:span text:style-name="T9">3</text:span></text:a><text:span text:style-name="T3">]</text:span></text:p>
      <text:list text:style-name="L6">
        <text:list-item>
          <text:p text:style-name="P23"><text:span text:style-name="Strong_20_Emphasis"><text:span text:style-name="T2">Configuración:</text:span></text:span><text:span text:style-name="T3"> Crea un archivo </text:span><text:span text:style-name="Source_20_Text"><text:span text:style-name="T10">opencode.json</text:span></text:span><text:span text:style-name="T3"> en la raíz de tu proyecto para configurar el servidor de contexto.</text:span></text:p>
        </text:list-item>
        <text:list-item>
          <text:p text:style-name="P24"><text:span text:style-name="Strong_20_Emphasis"><text:span text:style-name="T2">Astro Docs:</text:span></text:span><text:span text:style-name="T3"> Puedes configurar Opencode para usar el MCP de Astro, permitiendo a la IA conocer la documentación más reciente. [</text:span><text:a xlink:type="simple" xlink:href="https://docs.astro.build/es/guides/build-with-ai/" text:style-name="Internet_20_link" text:visited-style-name="Visited_20_Internet_20_Link"><text:span text:style-name="T9">1</text:span></text:a><text:span text:style-name="T3">]</text:span></text:p>
        </text:list-item>
      </text:list>
      <text:p text:style-name="P21">B. Integración en el sitio web (Runtime)</text:p>
      <text:p text:style-name="P20">Para crear componentes que generen texto, resúmenes o chats en tiempo real (SSR) en tu web:</text:p>
      <text:list text:style-name="L7">
        <text:list-item>
          <text:p text:style-name="P25"><text:span text:style-name="Strong_20_Emphasis"><text:span text:style-name="T2">Instalar la librería de IA:</text:span></text:span><text:span text:style-name="T3"> Usa la librería AI SDK de Vercel para gestionar los flujos de texto (streaming).</text:span></text:p>
        </text:list-item>
        <text:list-item>
          <text:p text:style-name="P26"><text:span text:style-name="Strong_20_Emphasis"><text:span text:style-name="T2">Conectar con el proveedor:</text:span></text:span><text:span text:style-name="T3"> Usa </text:span><text:span text:style-name="Source_20_Text"><text:span text:style-name="T10">ollama-ai-provider</text:span></text:span><text:span text:style-name="T3"> para conectar la librería con Ollama y usar modelos locales.</text:span></text:p>
        </text:list-item>
        <text:list-item>
          <text:p text:style-name="P26"><text:span text:style-name="Strong_20_Emphasis"><text:span text:style-name="T2">Configurar las variables de entorno:</text:span></text:span><text:span text:style-name="T3"> En tu </text:span><text:span text:style-name="Source_20_Text"><text:span text:style-name="T10">.env</text:span></text:span><text:span text:style-name="T3">, apunta la URL de OpenAI a tu servidor local (ej: </text:span><text:span text:style-name="Source_20_Text"><text:span text:style-name="T10">OPENAI_BASE_URL=http://localhost:11434/v1</text:span></text:span><text:span text:style-name="T3">). [</text:span><text:a xlink:type="simple" xlink:href="https://jherr2020.medium.com/insanely-easy-local-first-ai-chatbot-with-astro-ollama-and-vercels-ai-library-7b087ce032dc" text:style-name="Internet_20_link" text:visited-style-name="Visited_20_Internet_20_Link"><text:span text:style-name="T9">1</text:span></text:a><text:span text:style-name="T3">]</text:span></text:p>
        </text:list-item>
      </text:list>
      <text:p text:style-name="P19">3. Ejemplo de Integración (Astro + Ollama)</text:p>
      <text:p text:style-name="P27"><text:soft-page-break/>javascript</text:p>
      <text:p text:style-name="P28"><text:span text:style-name="Source_20_Text"><text:span text:style-name="T11">// src/pages/api/chat.js (Ruta de API en Astro)</text:span></text:span></text:p>
      <text:p text:style-name="P28"><text:span text:style-name="Source_20_Text"><text:span text:style-name="T11">import { ollama } from 'ollama-ai-provider';</text:span></text:span></text:p>
      <text:p text:style-name="P28"><text:span text:style-name="Source_20_Text"><text:span text:style-name="T11">import { generateText } from 'ai';</text:span></text:span></text:p>
      <text:p text:style-name="P29"/>
      <text:p text:style-name="P28"><text:span text:style-name="Source_20_Text"><text:span text:style-name="T11">export const POST = async ({ request }) =&gt; {</text:span></text:span></text:p>
      <text:p text:style-name="P28"><text:span text:style-name="Source_20_Text"><text:span text:style-name="T12"><text:s text:c="2"/></text:span></text:span><text:span text:style-name="Source_20_Text"><text:span text:style-name="T11">const { prompt } = await request.json();</text:span></text:span></text:p>
      <text:p text:style-name="P29"/>
      <text:p text:style-name="P28"><text:span text:style-name="Source_20_Text"><text:span text:style-name="T12"><text:s text:c="2"/></text:span></text:span><text:span text:style-name="Source_20_Text"><text:span text:style-name="T11">const result = await generateText({</text:span></text:span></text:p>
      <text:p text:style-name="P28"><text:span text:style-name="Source_20_Text"><text:span text:style-name="T12"><text:s text:c="4"/></text:span></text:span><text:span text:style-name="Source_20_Text"><text:span text:style-name="T11">model: ollama('llama3'),</text:span></text:span></text:p>
      <text:p text:style-name="P29"><text:span text:style-name="Source_20_Text"><text:span text:style-name="T12"><text:s text:c="4"/></text:span></text:span><text:span text:style-name="Source_20_Text"><text:span text:style-name="T11">prompt: prompt,</text:span></text:span></text:p>
      <text:p text:style-name="P29"><text:span text:style-name="Source_20_Text"><text:span text:style-name="T12"><text:s text:c="2"/></text:span></text:span><text:span text:style-name="Source_20_Text"><text:span text:style-name="T11">});</text:span></text:span></text:p>
      <text:p text:style-name="P29"/>
      <text:p text:style-name="P28"><text:span text:style-name="Source_20_Text"><text:span text:style-name="T12"><text:s text:c="2"/></text:span></text:span><text:span text:style-name="Source_20_Text"><text:span text:style-name="T11">return new Response(JSON.stringify(result.text));</text:span></text:span></text:p>
      <text:p text:style-name="P29"><text:span text:style-name="Source_20_Text"><text:span text:style-name="T11">};</text:span></text:span></text:p>
      <text:p text:style-name="P30">Usa el código con precaución.</text:p>
      <text:p text:style-name="P19">4. Ventajas de este enfoque en 2026</text:p>
      <text:list text:style-name="L8">
        <text:list-item>
          <text:p text:style-name="P31"><text:span text:style-name="Strong_20_Emphasis"><text:span text:style-name="T2">Privacidad:</text:span></text:span><text:span text:style-name="T3"> Ollama permite que los datos nunca salgan de tu servidor.</text:span></text:p>
        </text:list-item>
        <text:list-item>
          <text:p text:style-name="P31"><text:span text:style-name="Strong_20_Emphasis"><text:span text:style-name="T2">Sin límites de uso:</text:span></text:span><text:span text:style-name="T3"> Al ejecutar modelos locales o en Groq, eliminas las restricciones de tasa de pago (rate limits) de OpenAI.</text:span></text:p>
        </text:list-item>
        <text:list-item>
          <text:p text:style-name="P31"><text:span text:style-name="Strong_20_Emphasis"><text:span text:style-name="T2">Rendimiento:</text:span></text:span><text:span text:style-name="T3"> Astro es ultra rápido, y al combinarlo con modelos locales, la generación de contenido es instantánea.</text:span></text:p>
        </text:list-item>
        <text:list-item>
          <text:p text:style-name="P31"><text:span text:style-name="Strong_20_Emphasis"><text:span text:style-name="T2">Modelos de Codificación:</text:span></text:span><text:span text:style-name="T3"> Herramientas como DeepSeek R1 o Qwen3 ofrecen un rendimiento excepcional para generar componentes de Astro. [</text:span><text:a xlink:type="simple" xlink:href="https://medium.com/codex/open-source-llm-platforms-in-2026-ollama-openrouter-groq-nvidia-nim-which-one-should-you-use-2f11c7ba60bc" text:style-name="Internet_20_link" text:visited-style-name="Visited_20_Internet_20_Link"><text:span text:style-name="T9">1</text:span></text:a><text:span text:style-name="T3">, </text:span><text:a xlink:type="simple" xlink:href="https://www.instaclustr.com/education/open-source-ai/top-7-open-source-llms-for-2026/" text:style-name="Internet_20_link" text:visited-style-name="Visited_20_Internet_20_Link"><text:span text:style-name="T9">2</text:span></text:a><text:span text:style-name="T3">, </text:span><text:a xlink:type="simple" xlink:href="https://www.syncfusion.com/blogs/post/best-5-open-source-llms" text:style-name="Internet_20_link" text:visited-style-name="Visited_20_Internet_20_Link"><text:span text:style-name="T9">3</text:span></text:a><text:span text:style-name="T3">]</text:span></text:p>
        </text:list-item>
      </text:list>
      <text:p text:style-name="P32">Para proyectos que buscan el máximo rendimiento, considera utilizar Ollama para desarrollo local y OpenRouter para producción con modelos de código abierto</text:p>
      <text:p text:style-name="P14"/>
      <text:h text:style-name="P33" text:outline-level="3"><text:bookmark text:name="ollama-modelos-locales-sin-conexion-a-internet"/>Ollama: modelos locales sin conexión a internet <text:a xlink:type="simple" xlink:href="https://www.webreactiva.com/blog/como-usar-opencode#ollama-modelos-locales-sin-conexion-a-internet" text:style-name="Internet_20_link" text:visited-style-name="Visited_20_Internet_20_Link"><text:span text:style-name="T13">¶</text:span></text:a></text:h>
      <text:p text:style-name="P34">Para quienes prefieren ejecutar modelos en su propia máquina, Ollama es la opción más popular. No hay latencia de red, no hay costes por token, y tus datos no salen de tu ordenador.</text:p>
      <text:p text:style-name="P34">La configuración requiere añadir unas líneas a tu archivo <text:span text:style-name="Source_20_Text"><text:span text:style-name="T13">opencode.json</text:span></text:span>:</text:p>
      <text:p text:style-name="P35"><text:span text:style-name="Source_20_Text"><text:span text:style-name="T13">{</text:span></text:span></text:p>
      <text:p text:style-name="P36"><text:span text:style-name="Source_20_Text"><text:span text:style-name="T13"><text:s text:c="2"/>"$schema": "https://opencode.ai/config.json",</text:span></text:span></text:p>
      <text:p text:style-name="P36"><text:span text:style-name="Source_20_Text"><text:span text:style-name="T13"><text:s text:c="2"/>"provider": {</text:span></text:span></text:p>
      <text:p text:style-name="P36"><text:span text:style-name="Source_20_Text"><text:span text:style-name="T13"><text:s text:c="4"/>"ollama": {</text:span></text:span></text:p>
      <text:p text:style-name="P36"><text:span text:style-name="Source_20_Text"><text:span text:style-name="T13"><text:s text:c="6"/>"npm": "@ai-sdk/openai-compatible",</text:span></text:span></text:p>
      <text:p text:style-name="P36"><text:span text:style-name="Source_20_Text"><text:span text:style-name="T13"><text:s text:c="6"/>"name": "Ollama (local)",</text:span></text:span></text:p>
      <text:p text:style-name="P36"><text:span text:style-name="Source_20_Text"><text:span text:style-name="T13"><text:s text:c="6"/>"options": {</text:span></text:span></text:p>
      <text:p text:style-name="P36"><text:span text:style-name="Source_20_Text"><text:span text:style-name="T13"><text:s text:c="8"/>"baseURL": "http://localhost:11434/v1"</text:span></text:span></text:p>
      <text:p text:style-name="P36"><text:span text:style-name="Source_20_Text"><text:span text:style-name="T13"><text:s text:c="6"/>},</text:span></text:span></text:p>
      <text:p text:style-name="P36"><text:span text:style-name="Source_20_Text"><text:span text:style-name="T13"><text:s text:c="6"/>"models": {</text:span></text:span></text:p>
      <text:p text:style-name="P36"><text:span text:style-name="Source_20_Text"><text:span text:style-name="T13"><text:s text:c="8"/>"llama3": {</text:span></text:span></text:p>
      <text:p text:style-name="P36"><text:span text:style-name="Source_20_Text"><text:span text:style-name="T13"><text:s text:c="10"/>"name": "Llama 3"</text:span></text:span></text:p>
      <text:p text:style-name="P36"><text:span text:style-name="Source_20_Text"><text:span text:style-name="T13"><text:s text:c="8"/>},</text:span></text:span></text:p>
      <text:p text:style-name="P36"><text:span text:style-name="Source_20_Text"><text:span text:style-name="T13"><text:s text:c="8"/>"mistral": {</text:span></text:span></text:p>
      <text:p text:style-name="P36"><text:span text:style-name="Source_20_Text"><text:span text:style-name="T13"><text:s text:c="10"/>"name": "Mistral"</text:span></text:span></text:p>
      <text:p text:style-name="P36"><text:span text:style-name="Source_20_Text"><text:span text:style-name="T13"><text:s text:c="8"/>},</text:span></text:span></text:p>
      <text:p text:style-name="P36"><text:soft-page-break/><text:span text:style-name="Source_20_Text"><text:span text:style-name="T13"><text:s text:c="8"/>"qwen2.5-coder": {</text:span></text:span></text:p>
      <text:p text:style-name="P36"><text:span text:style-name="Source_20_Text"><text:span text:style-name="T13"><text:s text:c="10"/>"name": "Qwen 2.5 Coder"</text:span></text:span></text:p>
      <text:p text:style-name="P36"><text:span text:style-name="Source_20_Text"><text:span text:style-name="T13"><text:s text:c="8"/>}</text:span></text:span></text:p>
      <text:p text:style-name="P36"><text:span text:style-name="Source_20_Text"><text:span text:style-name="T13"><text:s text:c="6"/>}</text:span></text:span></text:p>
      <text:p text:style-name="P36"><text:span text:style-name="Source_20_Text"><text:span text:style-name="T13"><text:s text:c="4"/>}</text:span></text:span></text:p>
      <text:p text:style-name="P36"><text:span text:style-name="Source_20_Text"><text:span text:style-name="T13"><text:s text:c="2"/>}</text:span></text:span></text:p>
      <text:p text:style-name="P37"><text:span text:style-name="Source_20_Text"><text:span text:style-name="T13">}</text:span></text:span></text:p>
      <text:p text:style-name="P34">Los modelos que pongas en <text:span text:style-name="Source_20_Text"><text:span text:style-name="T13">models</text:span></text:span> tienen que estar descargados en Ollama. Puedes añadir tantos como quieras. Para descargar un modelo, ejecuta <text:span text:style-name="Source_20_Text"><text:span text:style-name="T13">ollama pull llama3</text:span></text:span> en otra terminal. Si buscas el mejor modelo open source para usar con OpenCode en local, <text:a xlink:type="simple" xlink:href="https://www.webreactiva.com/blog/gemma-4" text:style-name="Internet_20_link" text:visited-style-name="Visited_20_Internet_20_Link"><text:span text:style-name="T13">Gemma 4 26B A4B es una opción muy competitiva</text:span></text:a> con function calling nativo y rendimiento estable en todas las cuantizaciones.</text:p>
      <text:h text:style-name="P38" text:outline-level="3"><text:bookmark text:name="lm-studio-alternativa-visual-para-modelos-locales"/>LM Studio: alternativa visual para modelos locales <text:a xlink:type="simple" xlink:href="https://www.webreactiva.com/blog/como-usar-opencode#lm-studio-alternativa-visual-para-modelos-locales" text:style-name="Internet_20_link" text:visited-style-name="Visited_20_Internet_20_Link"><text:span text:style-name="T13">¶</text:span></text:a></text:h>
      <text:p text:style-name="P34">Si prefieres una interfaz gráfica para gestionar modelos locales, LM Studio es otra opción compatible. La configuración es similar a Ollama, apuntando a su endpoint local:</text:p>
      <text:p text:style-name="P35"><text:span text:style-name="Source_20_Text"><text:span text:style-name="T13">{</text:span></text:span></text:p>
      <text:p text:style-name="P36"><text:span text:style-name="Source_20_Text"><text:span text:style-name="T13"><text:s text:c="2"/>"$schema": "https://opencode.ai/config.json",</text:span></text:span></text:p>
      <text:p text:style-name="P36"><text:span text:style-name="Source_20_Text"><text:span text:style-name="T13"><text:s text:c="2"/>"provider": {</text:span></text:span></text:p>
      <text:p text:style-name="P36"><text:span text:style-name="Source_20_Text"><text:span text:style-name="T13"><text:s text:c="4"/>"lmstudio": {</text:span></text:span></text:p>
      <text:p text:style-name="P36"><text:span text:style-name="Source_20_Text"><text:span text:style-name="T13"><text:s text:c="6"/>"npm": "@ai-sdk/openai-compatible",</text:span></text:span></text:p>
      <text:p text:style-name="P36"><text:span text:style-name="Source_20_Text"><text:span text:style-name="T13"><text:s text:c="6"/>"name": "LM Studio",</text:span></text:span></text:p>
      <text:p text:style-name="P36"><text:span text:style-name="Source_20_Text"><text:span text:style-name="T13"><text:s text:c="6"/>"options": {</text:span></text:span></text:p>
      <text:p text:style-name="P36"><text:span text:style-name="Source_20_Text"><text:span text:style-name="T13"><text:s text:c="8"/>"baseURL": "http://localhost:1234/v1"</text:span></text:span></text:p>
      <text:p text:style-name="P36"><text:span text:style-name="Source_20_Text"><text:span text:style-name="T13"><text:s text:c="6"/>},</text:span></text:span></text:p>
      <text:p text:style-name="P36"><text:span text:style-name="Source_20_Text"><text:span text:style-name="T13"><text:s text:c="6"/>"models": {</text:span></text:span></text:p>
      <text:p text:style-name="P36"><text:span text:style-name="Source_20_Text"><text:span text:style-name="T13"><text:s text:c="8"/>"tu-modelo-local": {</text:span></text:span></text:p>
      <text:p text:style-name="P36"><text:span text:style-name="Source_20_Text"><text:span text:style-name="T13"><text:s text:c="10"/>"name": "Tu modelo en LM Studio"</text:span></text:span></text:p>
      <text:p text:style-name="P36"><text:span text:style-name="Source_20_Text"><text:span text:style-name="T13"><text:s text:c="8"/>}</text:span></text:span></text:p>
      <text:p text:style-name="P36"><text:span text:style-name="Source_20_Text"><text:span text:style-name="T13"><text:s text:c="6"/>}</text:span></text:span></text:p>
      <text:p text:style-name="P36"><text:span text:style-name="Source_20_Text"><text:span text:style-name="T13"><text:s text:c="4"/>}</text:span></text:span></text:p>
      <text:p text:style-name="P36"><text:span text:style-name="Source_20_Text"><text:span text:style-name="T13"><text:s text:c="2"/>}</text:span></text:span></text:p>
      <text:p text:style-name="P37"><text:span text:style-name="Source_20_Text"><text:span text:style-name="T13">}</text:span></text:span></text:p>
      <text:p text:style-name="P34">Asegúrate de que LM Studio está ejecutándose y sirviendo el modelo antes de arrancar OpenCode.</text:p>
      <text:h text:style-name="P38" text:outline-level="3"><text:bookmark text:name="llamacpp-para-quienes-quieren-control-total"/>llama.cpp: para quienes quieren control total <text:a xlink:type="simple" xlink:href="https://www.webreactiva.com/blog/como-usar-opencode#llamacpp-para-quienes-quieren-control-total" text:style-name="Internet_20_link" text:visited-style-name="Visited_20_Internet_20_Link"><text:span text:style-name="T13">¶</text:span></text:a></text:h>
      <text:p text:style-name="P34">Si prefieres la vía más directa y sin intermediarios, llama.cpp te permite servir modelos GGUF y conectarlos a OpenCode. La configuración sigue el mismo patrón de proveedor compatible con OpenAI, apuntando al puerto donde sirvas tu modelo.</text:p>
      <text:p text:style-name="P14"/>
      <text:p text:style-name="P14"/>
      <text:h text:style-name="Heading_20_4" text:outline-level="4"><text:bookmark text:name="opencode-ai"/><text:soft-page-break/>Opencode AI</text:h>
      <text:p text:style-name="Text_20_body"><text:a xlink:type="simple" xlink:href="https://opencode.ai/" text:style-name="Internet_20_link" text:visited-style-name="Visited_20_Internet_20_Link">Opencode AI</text:a> es una herramienta de codificación con IA de código abierto y basada en terminal que puede usar el servidor MCP de la documentación de Astro para acceder a la documentación mientras genera código para Astro.</text:p>
      <text:p text:style-name="Text_20_body">Puedes configurar los servidores MCP en tu archivo de configuración de Opencode, normalmente llamado <text:span text:style-name="Source_20_Text">opencode.json</text:span>, ubicado en la raíz de tu proyecto o en tu directorio de configuración global (por ejemplo, <text:span text:style-name="Source_20_Text">~/.config/opencode/opencode.json</text:span>).</text:p>
      <text:p text:style-name="Text_20_body">Configuración MCP</text:p>
      <text:p text:style-name="Preformatted_20_Text"><text:span text:style-name="Source_20_Text">{</text:span></text:p>
      <text:p text:style-name="Preformatted_20_Text"><text:span text:style-name="Source_20_Text"><text:s text:c="2"/>"$schema": "https://opencode.ai/config.json",</text:span></text:p>
      <text:p text:style-name="Preformatted_20_Text"><text:span text:style-name="Source_20_Text"><text:s text:c="2"/>"mcp": {</text:span></text:p>
      <text:p text:style-name="Preformatted_20_Text"><text:span text:style-name="Source_20_Text"><text:s text:c="4"/>"Astro docs": {</text:span></text:p>
      <text:p text:style-name="Preformatted_20_Text"><text:span text:style-name="Source_20_Text"><text:s text:c="6"/>"type": "remote",</text:span></text:p>
      <text:p text:style-name="Preformatted_20_Text"><text:span text:style-name="Source_20_Text"><text:s text:c="6"/>"url": "https://mcp.docs.astro.build/mcp",</text:span></text:p>
      <text:p text:style-name="Preformatted_20_Text"><text:span text:style-name="Source_20_Text"><text:s text:c="6"/>"enabled": tru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Text_20_body"><text:a xlink:type="simple" xlink:href="https://opencode.ai/" text:style-name="Internet_20_link" text:visited-style-name="Visited_20_Internet_20_Link">Más información sobre el uso de Opencode AI</text:a></text:p>
      <text:p text:style-name="Standard"/>
      <text:p text:style-name="Standard"/>
      <text:p text:style-name="Standard"/>
      <text:p text:style-name="Standard"/>
      <text:p text:style-name="Standard"/>
      <text:h text:style-name="Heading_20_3" text:outline-level="3"><text:bookmark text:name="uso"/>Uso</text:h>
      <text:p text:style-name="Text_20_body">Una vez configurado, puedes hacer preguntas sobre Astro a tu herramienta de IA, y esta recuperará información directamente de la documentación más reciente. Los agentes de codificación podrán consultar la documentación actualizada al realizar tareas de programación, y los chatbots podrán responder con precisión preguntas sobre las funciones, API y mejores prácticas de Astro.</text:p>
      <text:p text:style-name="Text_20_body">Recuerda</text:p>
      <text:p text:style-name="Text_20_body">El servidor MCP de la documentación de Astro proporciona acceso a la documentación actual, pero tus herramientas de IA siguen siendo responsables de la interpretación y generación de código. La IA puede cometer errores, así que siempre revisa cuidadosamente el código generado y pruébalo a fondo.</text:p>
      <text:h text:style-name="Heading_20_3" text:outline-level="3"><text:bookmark text:name="solución-de-problemas"/>Solución de problemas</text:h>
      <text:p text:style-name="Text_20_body">Si encuentras problemas:</text:p>
      <text:list text:style-name="L9">
        <text:list-item>
          <text:p text:style-name="P39">Verifica que tu herramienta admita transporte HTTP transmisible.</text:p>
        </text:list-item>
        <text:list-item>
          <text:p text:style-name="P39">Comprueba que la URL del servidor sea correcta: <text:span text:style-name="Source_20_Text">https://mcp.docs.astro.build/mcp</text:span>.</text:p>
        </text:list-item>
        <text:list-item>
          <text:p text:style-name="P39">Asegúrate de que tu herramienta tenga acceso a internet.</text:p>
        </text:list-item>
        <text:list-item>
          <text:p text:style-name="P39">Consulta la documentación de integración MCP específica de tu herramienta.</text:p>
        </text:list-item>
      </text:list>
      <text:p text:style-name="Text_20_body">Si aún tienes problemas, abre un issue en el <text:a xlink:type="simple" xlink:href="https://github.com/withastro/docs-mcp/issues" text:style-name="Internet_20_link" text:visited-style-name="Visited_20_Internet_20_Link">repositorio del servidor MCP de la documentación de Astro</text:a>.</text:p>
      <text:h text:style-name="Heading_20_2" text:outline-level="2"><text:bookmark text:name="soporte-de-ia-en-discord"/><text:soft-page-break/>Soporte de IA en Discord</text:h>
      <text:p text:style-name="Text_20_body">La misma tecnología que impulsa el servidor MCP de Astro también está disponible como chatbot en el <text:a xlink:type="simple" xlink:href="https://astro.build/chat" text:style-name="Internet_20_link" text:visited-style-name="Visited_20_Internet_20_Link">Discord de Astro</text:a> para soporte autoservicio. Visita el canal <text:span text:style-name="Source_20_Text">#support-ai</text:span> para hacer preguntas sobre Astro o el código de tu proyecto en lenguaje natural. Tu conversación se organiza automáticamente en hilos, y puedes hacer un número ilimitado de preguntas de seguimiento.</text:p>
      <text:p text:style-name="Text_20_body"><text:span text:style-name="Strong_20_Emphasis">Las conversaciones con el chatbot son públicas y están sujetas a las mismas reglas del servidor sobre lenguaje y comportamiento que el resto de nuestros canales</text:span>, pero no son revisadas activamente por nuestros miembros voluntarios de soporte. Para recibir ayuda de la comunidad, crea un hilo en nuestro canal regular <text:span text:style-name="Source_20_Text">#support</text:span>.</text:p>
      <text:h text:style-name="Heading_20_2" text:outline-level="2"><text:bookmark text:name="consejos-para-el-desarrollo-de-astro-potenciado-por-ia"/>Consejos para el desarrollo de Astro potenciado por IA</text:h>
      <text:list text:style-name="L10">
        <text:list-item>
          <text:p text:style-name="P40"><text:span text:style-name="Strong_20_Emphasis">Comienza con plantillas</text:span>: En lugar de construir desde cero, pide a las herramientas de IA que comiencen con una <text:a xlink:type="simple" xlink:href="https://astro.build/themes/" text:style-name="Internet_20_link" text:visited-style-name="Visited_20_Internet_20_Link">plantilla de Astro</text:a> existente o usa <text:span text:style-name="Source_20_Text">npm create astro@latest</text:span> con una opción de plantilla.</text:p>
        </text:list-item>
        <text:list-item>
          <text:p text:style-name="P40"><text:span text:style-name="Strong_20_Emphasis">Usa </text:span><text:span text:style-name="Strong_20_Emphasis"><text:span text:style-name="Source_20_Text">astro add</text:span></text:span><text:span text:style-name="Strong_20_Emphasis"> para integraciones</text:span>: Pide a las herramientas de IA que utilicen <text:span text:style-name="Source_20_Text">astro add</text:span> para integraciones oficiales (por ejemplo, <text:span text:style-name="Source_20_Text">astro add tailwind</text:span>, <text:span text:style-name="Source_20_Text">astro add react</text:span>). Para otros paquetes, instálalos usando el comando de tu gestor de paquetes preferido en lugar de editar directamente <text:span text:style-name="Source_20_Text">package.json</text:span>.</text:p>
        </text:list-item>
      </text:list>
      <text:list text:style-name="L11">
        <text:list-item>
          <text:p text:style-name="P41"><text:span text:style-name="Strong_20_Emphasis">Verifica las APIs actuales</text:span>: Las herramientas de IA pueden usar patrones desactualizados. Pídeles que consulten la documentación más reciente, especialmente para funciones nuevas como sesiones y actions. Esto también es importante para funciones que han tenido cambios significativos desde su lanzamiento inicial, como las colecciones de contenido, o funciones que antes eran experimentales y que ahora pueden haber dejado de serlo.</text:p>
        </text:list-item>
        <text:list-item>
          <text:p text:style-name="P41"><text:span text:style-name="Strong_20_Emphasis">Usa reglas de proyecto</text:span>: Si tu herramienta de IA lo permite, configura reglas de proyecto para aplicar las mejores prácticas y estándares de codificación, como los mencionados anteriormente.</text:p>
        </text:list-item>
      </text:list>
      <text:p text:style-name="Standard"/>
      <text:p text:style-name="P2"/>
      <text:p text:style-name="P2"/>
      <text:p text:style-name="P2">Configurar reglas de proyecto en Astro para un blog en 2026 implica priorizar el rendimiento (envío mínimo de JS), la seguridad, y la seguridad de tipos (TypeScript). La estructura de archivos y las herramientas de linting deben configurarse para automatizar estas mejores prácticas</text:p>
      <text:p text:style-name="P2"><text:span text:style-name="T14">G</text:span>uía de configuración para aplicar estos estándares: </text:p>
      <text:p text:style-name="P2"><text:soft-page-break/>1. Estructura y Estándares de Archivos</text:p>
      <text:list text:style-name="L12">
        <text:list-item>
          <text:p text:style-name="P42"><text:span text:style-name="Strong_20_Emphasis"><text:span text:style-name="T2">Contenido:</text:span></text:span><text:span text:style-name="T3"> Utiliza </text:span><text:span text:style-name="Source_20_Text"><text:span text:style-name="T10">src/content/</text:span></text:span><text:span text:style-name="T3"> para gestionar entradas de blog mediante </text:span><text:a xlink:type="simple" xlink:href="https://docs.astro.build/it/guides/content-collections/" office:target-frame-name="_blank" xlink:show="new" text:style-name="Internet_20_link" text:visited-style-name="Visited_20_Internet_20_Link"><text:span text:style-name="T2">Colecciones de Contenido</text:span></text:a><text:span text:style-name="T3">, lo que garantiza validación y seguridad de tipos (TypeScript).</text:span></text:p>
        </text:list-item>
        <text:list-item>
          <text:p text:style-name="P42"><text:span text:style-name="Strong_20_Emphasis"><text:span text:style-name="T2">Componentes:</text:span></text:span><text:span text:style-name="T3"> Organiza en </text:span><text:span text:style-name="Source_20_Text"><text:span text:style-name="T10">src/components/</text:span></text:span><text:span text:style-name="T3"> dividiendo entre </text:span><text:span text:style-name="Source_20_Text"><text:span text:style-name="T10">ui/</text:span></text:span><text:span text:style-name="T3"> (botones, tarjetas) y </text:span><text:span text:style-name="Source_20_Text"><text:span text:style-name="T10">feature/</text:span></text:span><text:span text:style-name="T3"> (header, footer).</text:span></text:p>
        </text:list-item>
        <text:list-item>
          <text:p text:style-name="P42"><text:span text:style-name="Strong_20_Emphasis"><text:span text:style-name="T2">Páginas:</text:span></text:span><text:span text:style-name="T3"> Usa </text:span><text:span text:style-name="Source_20_Text"><text:span text:style-name="T10">src/pages/</text:span></text:span><text:span text:style-name="T3"> para enrutamiento basado en archivos (</text:span><text:span text:style-name="Source_20_Text"><text:span text:style-name="T10">.astro</text:span></text:span><text:span text:style-name="T3">, </text:span><text:span text:style-name="Source_20_Text"><text:span text:style-name="T10">.md</text:span></text:span><text:span text:style-name="T3">, </text:span><text:span text:style-name="Source_20_Text"><text:span text:style-name="T10">.mdx</text:span></text:span><text:span text:style-name="T3">).</text:span></text:p>
        </text:list-item>
        <text:list-item>
          <text:p text:style-name="P42"><text:span text:style-name="Strong_20_Emphasis"><text:span text:style-name="T2">Imágenes:</text:span></text:span><text:span text:style-name="T3"> Optimiza imágenes situándolas en </text:span><text:span text:style-name="Source_20_Text"><text:span text:style-name="T10">src/assets/</text:span></text:span><text:span text:style-name="T3"> y utiliza el componente </text:span><text:span text:style-name="Source_20_Text"><text:span text:style-name="T10">&lt;Image /&gt;</text:span></text:span><text:span text:style-name="T3"> de Astro para formato y tamaño automático. </text:span></text:p>
        </text:list-item>
      </text:list>
      <text:p text:style-name="P43"><text:span text:style-name="T15">2. Configuración de TypeScript (</text:span><text:span text:style-name="Source_20_Text"><text:span text:style-name="T16">tsconfig.json</text:span></text:span><text:span text:style-name="T15">) </text:span></text:p>
      <text:p text:style-name="P44"><text:span text:style-name="T3">Utiliza la configuración </text:span><text:span text:style-name="Strong_20_Emphasis"><text:span text:style-name="T2">strictest</text:span></text:span><text:span text:style-name="T3"> recomendada por Astro para evitar errores en tiempo de ejecución: </text:span></text:p>
      <text:p text:style-name="P45">json</text:p>
      <text:p text:style-name="P46"><text:span text:style-name="Source_20_Text"><text:span text:style-name="T11">{</text:span></text:span></text:p>
      <text:p text:style-name="P46"><text:span text:style-name="Source_20_Text"><text:span text:style-name="T12"><text:s text:c="2"/></text:span></text:span><text:span text:style-name="Source_20_Text"><text:span text:style-name="T11">"extends": "astro/tsconfigs/strictest",</text:span></text:span></text:p>
      <text:p text:style-name="P46"><text:span text:style-name="Source_20_Text"><text:span text:style-name="T12"><text:s text:c="2"/></text:span></text:span><text:span text:style-name="Source_20_Text"><text:span text:style-name="T11">"compilerOptions": {</text:span></text:span></text:p>
      <text:p text:style-name="P46"><text:span text:style-name="Source_20_Text"><text:span text:style-name="T12"><text:s text:c="4"/></text:span></text:span><text:span text:style-name="Source_20_Text"><text:span text:style-name="T11">"strict": true,</text:span></text:span></text:p>
      <text:p text:style-name="P46"><text:span text:style-name="Source_20_Text"><text:span text:style-name="T12"><text:s text:c="4"/></text:span></text:span><text:span text:style-name="Source_20_Text"><text:span text:style-name="T11">"baseUrl": ".",</text:span></text:span></text:p>
      <text:p text:style-name="P46"><text:span text:style-name="Source_20_Text"><text:span text:style-name="T12"><text:s text:c="4"/></text:span></text:span><text:span text:style-name="Source_20_Text"><text:span text:style-name="T11">"paths": {</text:span></text:span></text:p>
      <text:p text:style-name="P46"><text:span text:style-name="Source_20_Text"><text:span text:style-name="T12"><text:s text:c="6"/></text:span></text:span><text:span text:style-name="Source_20_Text"><text:span text:style-name="T11">"@components/*": ["src/components/*"],</text:span></text:span></text:p>
      <text:p text:style-name="P46"><text:span text:style-name="Source_20_Text"><text:span text:style-name="T12"><text:s text:c="6"/></text:span></text:span><text:span text:style-name="Source_20_Text"><text:span text:style-name="T11">"@layouts/*": ["src/layouts/*"],</text:span></text:span></text:p>
      <text:p text:style-name="P46"><text:span text:style-name="Source_20_Text"><text:span text:style-name="T12"><text:s text:c="6"/></text:span></text:span><text:span text:style-name="Source_20_Text"><text:span text:style-name="T11">"@content/*": ["src/content/*"]</text:span></text:span></text:p>
      <text:p text:style-name="P47"><text:span text:style-name="Source_20_Text"><text:span text:style-name="T12"><text:s text:c="4"/></text:span></text:span><text:span text:style-name="Source_20_Text"><text:span text:style-name="T11">}</text:span></text:span></text:p>
      <text:p text:style-name="P47"><text:span text:style-name="Source_20_Text"><text:span text:style-name="T12"><text:s text:c="2"/></text:span></text:span><text:span text:style-name="Source_20_Text"><text:span text:style-name="T11">}</text:span></text:span></text:p>
      <text:p text:style-name="P47"><text:span text:style-name="Source_20_Text"><text:span text:style-name="T11">}</text:span></text:span></text:p>
      <text:p text:style-name="P48">Usa el código con precaución.</text:p>
      <text:p text:style-name="P49"><text:span text:style-name="T15">3. Linting y Formateo (ESLint + Prettier) [</text:span><text:a xlink:type="simple" xlink:href="https://dev.to/pockit_tools/biome-the-eslint-and-prettier-killer-complete-migration-guide-for-2026-27m" text:style-name="Internet_20_link" text:visited-style-name="Visited_20_Internet_20_Link"><text:span text:style-name="T17">1</text:span></text:a><text:span text:style-name="T15">]</text:span></text:p>
      <text:p text:style-name="P43"><text:span text:style-name="T3">Para mantener un código consistente, instala las dependencias necesarias:<text:line-break/></text:span><text:span text:style-name="Source_20_Text"><text:span text:style-name="T10">npm install --save-dev eslint eslint-plugin-astro prettier prettier-plugin-astro</text:span></text:span><text:span text:style-name="T3"> [</text:span><text:a xlink:type="simple" xlink:href="https://stackoverflow.com/questions/76682799/how-to-configure-eslint-in-astro-framework" text:style-name="Internet_20_link" text:visited-style-name="Visited_20_Internet_20_Link"><text:span text:style-name="T9">1</text:span></text:a><text:span text:style-name="T3">, </text:span><text:a xlink:type="simple" xlink:href="https://github.com/ota-meshi/eslint-plugin-astro/issues/203" text:style-name="Internet_20_link" text:visited-style-name="Visited_20_Internet_20_Link"><text:span text:style-name="T9">2</text:span></text:a><text:span text:style-name="T3">]</text:span></text:p>
      <text:p text:style-name="P43"><text:span text:style-name="Source_20_Text"><text:span text:style-name="T16">.eslintrc.js</text:span></text:span></text:p>
      <text:p text:style-name="P45">javascript</text:p>
      <text:p text:style-name="P46"><text:span text:style-name="Source_20_Text"><text:span text:style-name="T11">module.exports = {</text:span></text:span></text:p>
      <text:p text:style-name="P46"><text:span text:style-name="Source_20_Text"><text:span text:style-name="T12"><text:s text:c="2"/></text:span></text:span><text:span text:style-name="Source_20_Text"><text:span text:style-name="T11">extends: [</text:span></text:span></text:p>
      <text:p text:style-name="P46"><text:span text:style-name="Source_20_Text"><text:span text:style-name="T12"><text:s text:c="4"/></text:span></text:span><text:span text:style-name="Source_20_Text"><text:span text:style-name="T11">"plugin:astro/recommended",</text:span></text:span></text:p>
      <text:p text:style-name="P46"><text:span text:style-name="Source_20_Text"><text:span text:style-name="T12"><text:s text:c="4"/></text:span></text:span><text:span text:style-name="Source_20_Text"><text:span text:style-name="T11">"plugin:prettier/recommended",</text:span></text:span></text:p>
      <text:p text:style-name="P47"><text:span text:style-name="Source_20_Text"><text:span text:style-name="T12"><text:s text:c="2"/></text:span></text:span><text:span text:style-name="Source_20_Text"><text:span text:style-name="T11">],</text:span></text:span></text:p>
      <text:p text:style-name="P47"><text:span text:style-name="Source_20_Text"><text:span text:style-name="T12"><text:s text:c="2"/></text:span></text:span><text:span text:style-name="Source_20_Text"><text:span text:style-name="T11">overrides: [</text:span></text:span></text:p>
      <text:p text:style-name="P47"><text:span text:style-name="Source_20_Text"><text:span text:style-name="T12"><text:s text:c="4"/></text:span></text:span><text:span text:style-name="Source_20_Text"><text:span text:style-name="T11">{</text:span></text:span></text:p>
      <text:p text:style-name="P46"><text:span text:style-name="Source_20_Text"><text:span text:style-name="T12"><text:s text:c="6"/></text:span></text:span><text:span text:style-name="Source_20_Text"><text:span text:style-name="T11">files: ["*.astro"],</text:span></text:span></text:p>
      <text:p text:style-name="P46"><text:span text:style-name="Source_20_Text"><text:span text:style-name="T12"><text:s text:c="6"/></text:span></text:span><text:span text:style-name="Source_20_Text"><text:span text:style-name="T11">processor: "astro/client-side-ts",</text:span></text:span></text:p>
      <text:p text:style-name="P47"><text:span text:style-name="Source_20_Text"><text:span text:style-name="T12"><text:s text:c="6"/></text:span></text:span><text:span text:style-name="Source_20_Text"><text:span text:style-name="T11">rules: {</text:span></text:span></text:p>
      <text:p text:style-name="P46"><text:span text:style-name="Source_20_Text"><text:span text:style-name="T12"><text:s text:c="8"/></text:span></text:span><text:span text:style-name="Source_20_Text"><text:span text:style-name="T11">"astro/no-prerender-export-outside-pages": "error", // Nueva regla 2026</text:span></text:span></text:p>
      <text:p text:style-name="P47"><text:span text:style-name="Source_20_Text"><text:span text:style-name="T12"><text:s text:c="6"/></text:span></text:span><text:span text:style-name="Source_20_Text"><text:span text:style-name="T11">},</text:span></text:span></text:p>
      <text:p text:style-name="P47"><text:span text:style-name="Source_20_Text"><text:span text:style-name="T12"><text:s text:c="4"/></text:span></text:span><text:span text:style-name="Source_20_Text"><text:span text:style-name="T11">},</text:span></text:span></text:p>
      <text:p text:style-name="P47"><text:span text:style-name="Source_20_Text"><text:span text:style-name="T12"><text:s text:c="2"/></text:span></text:span><text:span text:style-name="Source_20_Text"><text:span text:style-name="T11">],</text:span></text:span></text:p>
      <text:p text:style-name="P47"><text:span text:style-name="Source_20_Text"><text:span text:style-name="T11">};</text:span></text:span></text:p>
      <text:p text:style-name="P48">Usa el código con precaución.</text:p>
      <text:p text:style-name="P43"><text:span text:style-name="Source_20_Text"><text:span text:style-name="T16">.prettierrc</text:span></text:span></text:p>
      <text:p text:style-name="P45"><text:soft-page-break/>json</text:p>
      <text:p text:style-name="P46"><text:span text:style-name="Source_20_Text"><text:span text:style-name="T11">{</text:span></text:span></text:p>
      <text:p text:style-name="P46"><text:span text:style-name="Source_20_Text"><text:span text:style-name="T12"><text:s text:c="2"/></text:span></text:span><text:span text:style-name="Source_20_Text"><text:span text:style-name="T11">"plugins": ["prettier-plugin-astro"],</text:span></text:span></text:p>
      <text:p text:style-name="P46"><text:span text:style-name="Source_20_Text"><text:span text:style-name="T12"><text:s text:c="2"/></text:span></text:span><text:span text:style-name="Source_20_Text"><text:span text:style-name="T11">"overrides": [</text:span></text:span></text:p>
      <text:p text:style-name="P47"><text:span text:style-name="Source_20_Text"><text:span text:style-name="T12"><text:s text:c="4"/></text:span></text:span><text:span text:style-name="Source_20_Text"><text:span text:style-name="T11">{</text:span></text:span></text:p>
      <text:p text:style-name="P46"><text:span text:style-name="Source_20_Text"><text:span text:style-name="T12"><text:s text:c="6"/></text:span></text:span><text:span text:style-name="Source_20_Text"><text:span text:style-name="T11">"files": "*.astro",</text:span></text:span></text:p>
      <text:p text:style-name="P46"><text:span text:style-name="Source_20_Text"><text:span text:style-name="T12"><text:s text:c="6"/></text:span></text:span><text:span text:style-name="Source_20_Text"><text:span text:style-name="T11">"options": {</text:span></text:span></text:p>
      <text:p text:style-name="P46"><text:span text:style-name="Source_20_Text"><text:span text:style-name="T12"><text:s text:c="8"/></text:span></text:span><text:span text:style-name="Source_20_Text"><text:span text:style-name="T11">"parser": "astro"</text:span></text:span></text:p>
      <text:p text:style-name="P47"><text:span text:style-name="Source_20_Text"><text:span text:style-name="T12"><text:s text:c="6"/></text:span></text:span><text:span text:style-name="Source_20_Text"><text:span text:style-name="T11">}</text:span></text:span></text:p>
      <text:p text:style-name="P47"><text:span text:style-name="Source_20_Text"><text:span text:style-name="T12"><text:s text:c="4"/></text:span></text:span><text:span text:style-name="Source_20_Text"><text:span text:style-name="T11">}</text:span></text:span></text:p>
      <text:p text:style-name="P47"><text:span text:style-name="Source_20_Text"><text:span text:style-name="T12"><text:s text:c="2"/></text:span></text:span><text:span text:style-name="Source_20_Text"><text:span text:style-name="T11">],</text:span></text:span></text:p>
      <text:p text:style-name="P46"><text:span text:style-name="Source_20_Text"><text:span text:style-name="T12"><text:s text:c="2"/></text:span></text:span><text:span text:style-name="Source_20_Text"><text:span text:style-name="T11">"semi": true,</text:span></text:span></text:p>
      <text:p text:style-name="P46"><text:span text:style-name="Source_20_Text"><text:span text:style-name="T12"><text:s text:c="2"/></text:span></text:span><text:span text:style-name="Source_20_Text"><text:span text:style-name="T11">"singleQuote": true</text:span></text:span></text:p>
      <text:p text:style-name="P47"><text:span text:style-name="Source_20_Text"><text:span text:style-name="T11">}</text:span></text:span></text:p>
      <text:p text:style-name="P48">Usa el código con precaución.</text:p>
      <text:p text:style-name="P4">4. Reglas de Codificación para Rendimiento y SEO</text:p>
      <text:list text:style-name="L13">
        <text:list-item>
          <text:p text:style-name="P50"><text:span text:style-name="Strong_20_Emphasis"><text:span text:style-name="T2">Zero JS by Default:</text:span></text:span><text:span text:style-name="T3"> Evita componentes interactivos innecesarios. Usa componentes Astro estáticos siempre que sea posible.</text:span></text:p>
        </text:list-item>
        <text:list-item>
          <text:p text:style-name="P51"><text:span text:style-name="Strong_20_Emphasis"><text:span text:style-name="T2">Hidratación Parcial (Islands Architecture):</text:span></text:span><text:span text:style-name="T3"> Cuando uses React, Svelte o Vue, usa directivas de hidratación (</text:span><text:span text:style-name="Source_20_Text"><text:span text:style-name="T10">client:load</text:span></text:span><text:span text:style-name="T3">, </text:span><text:span text:style-name="Source_20_Text"><text:span text:style-name="T10">client:visible</text:span></text:span><text:span text:style-name="T3">) solo cuando sea necesario.</text:span></text:p>
        </text:list-item>
        <text:list-item>
          <text:p text:style-name="P51"><text:span text:style-name="Strong_20_Emphasis"><text:span text:style-name="T2">SEO:</text:span></text:span><text:span text:style-name="T3"> Crea un componente </text:span><text:span text:style-name="Source_20_Text"><text:span text:style-name="T10">&lt;SEO /&gt;</text:span></text:span><text:span text:style-name="T3"> y úsalo en tu Layout para generar automáticamente meta tags, títulos y OpenGraph, tal como se recomienda en las mejores prácticas de 2026.</text:span></text:p>
        </text:list-item>
        <text:list-item>
          <text:p text:style-name="P51"><text:span text:style-name="Strong_20_Emphasis"><text:span text:style-name="T2">Imágenes:</text:span></text:span><text:span text:style-name="T3"> Usa </text:span><text:span text:style-name="Source_20_Text"><text:span text:style-name="T10">astro:assets</text:span></text:span><text:span text:style-name="T3"> para convertir imágenes a WebP/AVIF automáticamente.</text:span></text:p>
        </text:list-item>
        <text:list-item>
          <text:p text:style-name="P50"><text:span text:style-name="Strong_20_Emphasis"><text:span text:style-name="T2">SSR vs SSG:</text:span></text:span><text:span text:style-name="T3"> Usa Static Site Generation (SSG) por defecto para el blog. Usa Server-Side Rendering (SSR) solo para páginas con datos altamente dinámicos. [</text:span><text:a xlink:type="simple" xlink:href="https://docs.astro.build/es/guides/configuring-astro/" text:style-name="Internet_20_link" text:visited-style-name="Visited_20_Internet_20_Link"><text:span text:style-name="T9">1</text:span></text:a><text:span text:style-name="T3">, </text:span><text:a xlink:type="simple" xlink:href="https://www.martagonzalez.dev/blog/mejorando-el-rendimiento-en-astro-estrategias-y-buenas-practicas/" text:style-name="Internet_20_link" text:visited-style-name="Visited_20_Internet_20_Link"><text:span text:style-name="T9">2</text:span></text:a><text:span text:style-name="T3">, </text:span><text:a xlink:type="simple" xlink:href="https://codigoencasa.com/astro-js-framework-guia-practica-para-crear-sitios-web-mas-rapidos/" text:style-name="Internet_20_link" text:visited-style-name="Visited_20_Internet_20_Link"><text:span text:style-name="T9">3</text:span></text:a><text:span text:style-name="T3">, </text:span><text:a xlink:type="simple" xlink:href="https://lobehub.com/it/skills/kobogithub-knowledge-astro-best-practices" text:style-name="Internet_20_link" text:visited-style-name="Visited_20_Internet_20_Link"><text:span text:style-name="T9">4</text:span></text:a><text:span text:style-name="T3">]</text:span></text:p>
        </text:list-item>
      </text:list>
      <text:p text:style-name="P4">5. Reglas de Git</text:p>
      <text:p text:style-name="P43"><text:span text:style-name="T3">Crea un archivo </text:span><text:span text:style-name="Source_20_Text"><text:span text:style-name="T10">.gitignore</text:span></text:span><text:span text:style-name="T3"> estricto para no subir archivos de construcción:</text:span></text:p>
      <text:p text:style-name="P45">text</text:p>
      <text:p text:style-name="P46"><text:span text:style-name="Source_20_Text"><text:span text:style-name="T11">node_modules/</text:span></text:span></text:p>
      <text:p text:style-name="P47"><text:span text:style-name="Source_20_Text"><text:span text:style-name="T11">dist/</text:span></text:span></text:p>
      <text:p text:style-name="P47"><text:span text:style-name="Source_20_Text"><text:span text:style-name="T11">.astro/</text:span></text:span></text:p>
      <text:p text:style-name="P47"><text:span text:style-name="Source_20_Text"><text:span text:style-name="T11">.env</text:span></text:span></text:p>
      <text:p text:style-name="P48">Usa el código con precaución.</text:p>
      <text:p text:style-name="P6">Estas reglas aseguran un proyecto rápido, mantenible y escalable utilizando las últimas convenciones de Astro en 2026. []</text:p>
      <text:p text:style-name="Standard"/>
      <text:p text:style-name="Standard"/>
      <text:h text:style-name="Heading_20_2" text:outline-level="2"><text:bookmark text:name="plan-vs-build-el-sistema-de-agentes-de-opencode"/>Plan vs Build: el sistema de agentes de OpenCode <text:a xlink:type="simple" xlink:href="https://www.webreactiva.com/blog/como-usar-opencode#plan-vs-build-el-sistema-de-agentes-de-opencode" text:style-name="Internet_20_link" text:visited-style-name="Visited_20_Internet_20_Link"><text:span text:style-name="T13">¶</text:span></text:a></text:h>
      <text:p text:style-name="P52">Aquí viene uno de los conceptos más importantes de OpenCode y que lo diferencia de otros asistentes de código. OpenCode no es un único agente que hace todo. Son varios agentes con diferentes niveles de permiso.</text:p>
      <text:p text:style-name="P52"><text:soft-page-break/>Los dos principales son <text:span text:style-name="Strong_20_Emphasis"><text:span text:style-name="T13">Plan</text:span></text:span> y <text:span text:style-name="Strong_20_Emphasis"><text:span text:style-name="T13">Build</text:span></text:span>.</text:p>
      <text:p text:style-name="P52"><text:span text:style-name="Strong_20_Emphasis"><text:span text:style-name="T13">Plan</text:span></text:span> es el modo seguro. Solo puede leer archivos y analizar código. No puede modificar nada ni ejecutar comandos sin tu permiso explícito. Es perfecto para cuando te enfrentas a código que no conoces y quieres entender qué hace antes de tocarlo.</text:p>
      <text:p text:style-name="P52"><text:span text:style-name="Strong_20_Emphasis"><text:span text:style-name="T13">Build</text:span></text:span> es el modo de acción. Puede leer, escribir, modificar archivos y ejecutar comandos. Es el modo que usas cuando sabes qué quieres hacer y confías en que OpenCode lo haga.</text:p>
      <text:p text:style-name="P52">Cambiar entre uno y otro es tan fácil como pulsar la tecla <text:span text:style-name="Strong_20_Emphasis"><text:span text:style-name="T13">Tab</text:span></text:span>. En cualquier momento de la conversación puedes cambiar de agente. La interfaz te muestra siempre cuál está activo.</text:p>
      <text:p text:style-name="P52">¿Cuándo usar cada uno? Aquí va una tabla que te puede servir de referencia:</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53">Situación</text:p>
            </table:table-cell>
            <table:table-cell table:style-name="Tabla1.A1" office:value-type="string">
              <text:p text:style-name="P53">Agente</text:p>
            </table:table-cell>
            <table:table-cell table:style-name="Tabla1.A1" office:value-type="string">
              <text:p text:style-name="P53">Razón</text:p>
            </table:table-cell>
          </table:table-row>
        </table:table-header-rows>
        <table:table-row>
          <table:table-cell table:style-name="Tabla1.A1" office:value-type="string">
            <text:p text:style-name="P54">No conozco este código</text:p>
          </table:table-cell>
          <table:table-cell table:style-name="Tabla1.A1" office:value-type="string">
            <text:p text:style-name="P54">Plan</text:p>
          </table:table-cell>
          <table:table-cell table:style-name="Tabla1.A1" office:value-type="string">
            <text:p text:style-name="P54">Exploras sin riesgo de romper nada</text:p>
          </table:table-cell>
        </table:table-row>
        <table:table-row>
          <table:table-cell table:style-name="Tabla1.A1" office:value-type="string">
            <text:p text:style-name="P54">Quiero entender antes de modificar</text:p>
          </table:table-cell>
          <table:table-cell table:style-name="Tabla1.A1" office:value-type="string">
            <text:p text:style-name="P54">Plan</text:p>
          </table:table-cell>
          <table:table-cell table:style-name="Tabla1.A1" office:value-type="string">
            <text:p text:style-name="P54">Análisis sin efectos secundarios</text:p>
          </table:table-cell>
        </table:table-row>
        <table:table-row>
          <table:table-cell table:style-name="Tabla1.A1" office:value-type="string">
            <text:p text:style-name="P54">Sé qué quiero hacer</text:p>
          </table:table-cell>
          <table:table-cell table:style-name="Tabla1.A1" office:value-type="string">
            <text:p text:style-name="P54">Build</text:p>
          </table:table-cell>
          <table:table-cell table:style-name="Tabla1.A1" office:value-type="string">
            <text:p text:style-name="P54">Ejecución directa</text:p>
          </table:table-cell>
        </table:table-row>
        <table:table-row>
          <table:table-cell table:style-name="Tabla1.A1" office:value-type="string">
            <text:p text:style-name="P54">Estoy haciendo refactoring</text:p>
          </table:table-cell>
          <table:table-cell table:style-name="Tabla1.A1" office:value-type="string">
            <text:p text:style-name="P54">Build</text:p>
          </table:table-cell>
          <table:table-cell table:style-name="Tabla1.A1" office:value-type="string">
            <text:p text:style-name="P54">Necesitas modificar archivos</text:p>
          </table:table-cell>
        </table:table-row>
        <table:table-row>
          <table:table-cell table:style-name="Tabla1.A1" office:value-type="string">
            <text:p text:style-name="P54">Revisando código de otro</text:p>
          </table:table-cell>
          <table:table-cell table:style-name="Tabla1.A1" office:value-type="string">
            <text:p text:style-name="P54">Plan</text:p>
          </table:table-cell>
          <table:table-cell table:style-name="Tabla1.A1" office:value-type="string">
            <text:p text:style-name="Table_20_Contents">Solo necesitas leer y opinar</text:p>
          </table:table-cell>
        </table:table-row>
      </table:table>
      <text:p text:style-name="P52">La gracia está en que puedes empezar explorando en Plan, formarte una idea clara de lo que hay, y luego cambiar a Build para aplicar los cambios. Es un flujo muy natural que reduce los errores y te da confianza.</text:p>
      <text:p text:style-name="P52">Además de Plan y Build, OpenCode incluye dos subagentes integrados: <text:span text:style-name="Strong_20_Emphasis"><text:span text:style-name="T13">General</text:span></text:span> (para tareas complejas y búsquedas en profundidad) y <text:span text:style-name="Strong_20_Emphasis"><text:span text:style-name="T13">Explore</text:span></text:span> (para navegación rápida de código en modo solo lectura). Más adelante veremos cómo usar estos subagentes.</text:p>
      <text:p text:style-name="P55">💡 Al iniciar, OpenCode usa Build por defecto. Si prefieres empezar en modo seguro, puedes lanzarlo con <text:span text:style-name="Source_20_Text"><text:span text:style-name="T13">opencode --agent plan</text:span></text:span>.</text:p>
      <text:h text:style-name="P56" text:outline-level="2"><text:bookmark text:name="comando-init-inicializar-tu-proyecto"/>Comando /init: inicializar tu proyecto <text:a xlink:type="simple" xlink:href="https://www.webreactiva.com/blog/como-usar-opencode#comando-init-inicializar-tu-proyecto" text:style-name="Internet_20_link" text:visited-style-name="Visited_20_Internet_20_Link"><text:span text:style-name="T13">¶</text:span></text:a></text:h>
      <text:p text:style-name="P52">OpenCode funciona mejor cuando tiene contexto sobre tu proyecto. Sabe que hay un <text:span text:style-name="Source_20_Text"><text:span text:style-name="T13">package.json</text:span></text:span>, que usas TypeScript, que tienes tests con Jest… pero hay cosas que no puede inferir solo mirando archivos.</text:p>
      <text:p text:style-name="P52">Para darle ese contexto extra, existe el comando <text:span text:style-name="Source_20_Text"><text:span text:style-name="T13">/init</text:span></text:span>. Este comando analiza tu proyecto y genera un archivo llamado <text:span text:style-name="Source_20_Text"><text:span text:style-name="T13">AGENTS.md</text:span></text:span> en la raíz.</text:p>
      <text:p text:style-name="P52">Navega a tu proyecto y ejecuta:</text:p>
      <text:p text:style-name="P57"><text:span text:style-name="Source_20_Text"><text:span text:style-name="T13">cd /ruta/a/tu/proyecto</text:span></text:span></text:p>
      <text:p text:style-name="P58"><text:span text:style-name="Source_20_Text"><text:span text:style-name="T13">opencode</text:span></text:span></text:p>
      <text:p text:style-name="P52">Una vez dentro:</text:p>
      <text:p text:style-name="P59"><text:span text:style-name="Source_20_Text"><text:span text:style-name="T13">/init</text:span></text:span></text:p>
      <text:p text:style-name="P52"><text:soft-page-break/>OpenCode escanea la estructura, identifica tecnologías, detecta patrones y genera el archivo con toda esa información. En futuras sesiones, este archivo se carga de forma automática.</text:p>
      <text:p text:style-name="P52">Puedes ver qué ha generado con:</text:p>
      <text:p text:style-name="P59"><text:span text:style-name="Source_20_Text"><text:span text:style-name="T13">cat AGENTS.md</text:span></text:span></text:p>
      <text:p text:style-name="P52">Encontrarás secciones sobre el stack tecnológico, estructura de directorios, convenciones de código detectadas y cualquier otra información relevante.</text:p>
      <text:p text:style-name="P52">Lo interesante es que puedes editar este archivo a mano para añadir información que OpenCode no puede inferir. Por ejemplo, decisiones de arquitectura, convenciones de equipo o particularidades del dominio de negocio.</text:p>
      <text:p text:style-name="P55">📁 El equipo de OpenCode recomienda incluir el archivo <text:span text:style-name="Source_20_Text"><text:span text:style-name="T13">AGENTS.md</text:span></text:span> en tu repositorio Git. Así cualquier miembro del equipo que use OpenCode arrancará con el mismo contexto sobre el proyecto.</text:p>
      <text:h text:style-name="P56" text:outline-level="2"><text:bookmark text:name="integracion-lsp-inteligencia-de-codigo-nativa"/>Integración LSP: inteligencia de código nativa <text:a xlink:type="simple" xlink:href="https://www.webreactiva.com/blog/como-usar-opencode#integracion-lsp-inteligencia-de-codigo-nativa" text:style-name="Internet_20_link" text:visited-style-name="Visited_20_Internet_20_Link"><text:span text:style-name="T13">¶</text:span></text:a></text:h>
      <text:p text:style-name="P52">Una funcionalidad que merece capítulo propio es la <text:span text:style-name="Strong_20_Emphasis"><text:span text:style-name="T13">integración con Language Server Protocol (LSP)</text:span></text:span>. OpenCode se conecta a servidores LSP de forma automática para obtener diagnósticos, errores de tipos y análisis estático del código que el agente está tocando.</text:p>
      <text:p text:style-name="P52">¿Qué significa esto en la práctica? Que cuando OpenCode modifica un archivo TypeScript, Go o Python, tiene acceso a los mismos errores y warnings que verías en tu IDE. No está “adivinando” si el código es correcto basándose en su entrenamiento. Está recibiendo feedback real del compilador o analizador de tu proyecto.</text:p>
      <text:p text:style-name="P52">OpenCode trae servidores LSP integrados para los lenguajes más populares. Se habilitan de forma automática cuando detecta archivos con las extensiones correspondientes. No tienes que configurar nada: si tu proyecto tiene archivos <text:span text:style-name="Source_20_Text"><text:span text:style-name="T13">.ts</text:span></text:span>, OpenCode arranca el servidor LSP de TypeScript por detrás.</text:p>
      <text:p text:style-name="P52">Si necesitas personalizar la configuración de un servidor LSP, puedes hacerlo en tu <text:span text:style-name="Source_20_Text"><text:span text:style-name="T13">opencode.json</text:span></text:span>:</text:p>
      <text:p text:style-name="P57"><text:span text:style-name="Source_20_Text"><text:span text:style-name="T13">{</text:span></text:span></text:p>
      <text:p text:style-name="P60"><text:span text:style-name="Source_20_Text"><text:span text:style-name="T13"><text:s text:c="2"/>"lsp": {</text:span></text:span></text:p>
      <text:p text:style-name="P60"><text:span text:style-name="Source_20_Text"><text:span text:style-name="T13"><text:s text:c="4"/>"go": {</text:span></text:span></text:p>
      <text:p text:style-name="P60"><text:span text:style-name="Source_20_Text"><text:span text:style-name="T13"><text:s text:c="6"/>"disabled": false,</text:span></text:span></text:p>
      <text:p text:style-name="P60"><text:span text:style-name="Source_20_Text"><text:span text:style-name="T13"><text:s text:c="6"/>"command": "gopls"</text:span></text:span></text:p>
      <text:p text:style-name="P60"><text:span text:style-name="Source_20_Text"><text:span text:style-name="T13"><text:s text:c="4"/>},</text:span></text:span></text:p>
      <text:p text:style-name="P60"><text:span text:style-name="Source_20_Text"><text:span text:style-name="T13"><text:s text:c="4"/>"typescript": {</text:span></text:span></text:p>
      <text:p text:style-name="P60"><text:span text:style-name="Source_20_Text"><text:span text:style-name="T13"><text:s text:c="6"/>"disabled": false,</text:span></text:span></text:p>
      <text:p text:style-name="P60"><text:span text:style-name="Source_20_Text"><text:span text:style-name="T13"><text:s text:c="6"/>"command": "typescript-language-server",</text:span></text:span></text:p>
      <text:p text:style-name="P60"><text:span text:style-name="Source_20_Text"><text:span text:style-name="T13"><text:s text:c="6"/>"args": ["--stdio"]</text:span></text:span></text:p>
      <text:p text:style-name="P60"><text:span text:style-name="Source_20_Text"><text:span text:style-name="T13"><text:s text:c="4"/>}</text:span></text:span></text:p>
      <text:p text:style-name="P60"><text:span text:style-name="Source_20_Text"><text:span text:style-name="T13"><text:s text:c="2"/>}</text:span></text:span></text:p>
      <text:p text:style-name="P58"><text:span text:style-name="Source_20_Text"><text:span text:style-name="T13">}</text:span></text:span></text:p>
      <text:p text:style-name="P52"><text:soft-page-break/>También puedes desactivar la descarga automática de servidores LSP con la variable de entorno <text:span text:style-name="Source_20_Text"><text:span text:style-name="T13">OPENCODE_DISABLE_LSP_DOWNLOAD=true</text:span></text:span> si prefieres usar los que ya tienes instalados en tu sistema.</text:p>
      <text:p text:style-name="P55">🔑 La integración LSP es lo que separa a un agente que “escribe código que parece correcto” de uno que “escribe código que compila”. Es una ventaja real frente a agentes que no tienen esta capacidad.</text:p>
      <text:p text:style-name="P52">Si quieres entender por qué LSP cambia tanto la experiencia con cualquier agente, qué operaciones gana tu IA al activarlo y cómo se configura en otros clientes (Claude Code, Copilot CLI, Qwen Code o Serena MCP), te dejo la <text:a xlink:type="simple" xlink:href="https://www.webreactiva.com/blog/lsp" text:style-name="Internet_20_link" text:visited-style-name="Visited_20_Internet_20_Link"><text:span text:style-name="T13">guía de LSP en agentes de IA</text:span></text:a>.</text:p>
      <text:h text:style-name="P56" text:outline-level="2"><text:bookmark text:name="navegacion-de-codigo-con-subagentes"/>Navegación de código con subagentes <text:a xlink:type="simple" xlink:href="https://www.webreactiva.com/blog/como-usar-opencode#navegacion-de-codigo-con-subagentes" text:style-name="Internet_20_link" text:visited-style-name="Visited_20_Internet_20_Link"><text:span text:style-name="T13">¶</text:span></text:a></text:h>
      <text:p text:style-name="P52">Antes de modificar código, necesitas encontrarlo y entenderlo. OpenCode tiene herramientas específicas para esto que son más eficientes que buscar a mano con grep o con el buscador del editor.</text:p>
      <text:p text:style-name="P52">El carácter <text:span text:style-name="Strong_20_Emphasis"><text:span text:style-name="T13">@</text:span></text:span> inicia una búsqueda fuzzy de archivos. Escribes <text:span text:style-name="Source_20_Text"><text:span text:style-name="T13">@auth</text:span></text:span> y aparece un buscador donde puedes filtrar por nombre. Seleccionas con Enter y el archivo se añade al contexto de la conversación.</text:p>
      <text:p text:style-name="P52">Pero la magia de verdad está en los subagentes: <text:span text:style-name="Strong_20_Emphasis"><text:span text:style-name="T13">@explore</text:span></text:span> y <text:span text:style-name="Strong_20_Emphasis"><text:span text:style-name="T13">@general</text:span></text:span>.</text:p>
      <text:p text:style-name="P52"><text:span text:style-name="Strong_20_Emphasis"><text:span text:style-name="T13">@explore</text:span></text:span> es un subagente especializado en búsqueda y análisis. Solo lee, nunca modifica. Es rápido y seguro. Lo usas para preguntas del tipo “¿dónde está X?” o “¿cómo funciona Y?”.</text:p>
      <text:p text:style-name="P59"><text:span text:style-name="Source_20_Text"><text:span text:style-name="T13">&gt; @explore ¿Dónde se manejan los errores de autenticación?</text:span></text:span></text:p>
      <text:p text:style-name="P52">El subagente trabaja de forma autónoma, busca en tu código, y devuelve los resultados integrados en tu conversación.</text:p>
      <text:p text:style-name="P52"><text:span text:style-name="Strong_20_Emphasis"><text:span text:style-name="T13">@general</text:span></text:span> es más potente. Tiene acceso a todas las herramientas y puede hacer investigaciones complejas. Úsalo cuando necesitas un análisis profundo.</text:p>
      <text:p text:style-name="P59"><text:span text:style-name="Source_20_Text"><text:span text:style-name="T13">&gt; @general Investiga el sistema de caché: qué tecnología usa, dónde se configura y cómo se invalida</text:span></text:span></text:p>
      <text:p text:style-name="P52">Este subagente puede tardar más porque hace un trabajo más exhaustivo, pero los resultados son análisis detallados que te ahorran horas de investigación manual.</text:p>
      <text:p text:style-name="P52">La ventaja de los subagentes es que no ensucian tu conversación principal. Hacen su trabajo, devuelven los resultados, y tú continúas con el foco en lo que estabas haciendo.</text:p>
      <text:h text:style-name="P56" text:outline-level="2"><text:bookmark text:name="flujos-de-trabajo-productivos"/>Flujos de trabajo productivos <text:a xlink:type="simple" xlink:href="https://www.webreactiva.com/blog/como-usar-opencode#flujos-de-trabajo-productivos" text:style-name="Internet_20_link" text:visited-style-name="Visited_20_Internet_20_Link"><text:span text:style-name="T13">¶</text:span></text:a></text:h>
      <text:p text:style-name="P52">Conocer los patrones de uso comunes te hace más eficiente. No reinventes la rueda cada vez que te sientas a trabajar con OpenCode.</text:p>
      <text:h text:style-name="P61" text:outline-level="3"><text:bookmark text:name="refactoring-seguro"/><text:soft-page-break/>Refactoring seguro <text:a xlink:type="simple" xlink:href="https://www.webreactiva.com/blog/como-usar-opencode#refactoring-seguro" text:style-name="Internet_20_link" text:visited-style-name="Visited_20_Internet_20_Link"><text:span text:style-name="T13">¶</text:span></text:a></text:h>
      <text:p text:style-name="P52">Este flujo minimiza el riesgo de romper código. Empiezas en modo seguro, entiendes lo que hay, y solo después actúas.</text:p>
      <text:p text:style-name="P52">Primero, arranca en modo Plan:</text:p>
      <text:p text:style-name="P59"><text:span text:style-name="Source_20_Text"><text:span text:style-name="T13">opencode --agent plan</text:span></text:span></text:p>
      <text:p text:style-name="P52">Analiza el código que quieres refactorizar:</text:p>
      <text:p text:style-name="P59"><text:span text:style-name="Source_20_Text"><text:span text:style-name="T13">&gt; Analiza la función processPayment: qué hace, qué dependencias tiene, qué efectos secundarios produce</text:span></text:span></text:p>
      <text:p text:style-name="P52">Pide un plan antes de hacer cambios:</text:p>
      <text:p text:style-name="P59"><text:span text:style-name="Source_20_Text"><text:span text:style-name="T13">&gt; Sugiere cómo refactorizar esta función para mejorar testabilidad. No hagas cambios, solo propón.</text:span></text:span></text:p>
      <text:p text:style-name="P52">Revisa la propuesta con calma. Si te convence, cambia a Build pulsando Tab y aplica el cambio:</text:p>
      <text:p text:style-name="P59"><text:span text:style-name="Source_20_Text"><text:span text:style-name="T13">&gt; Aplica el refactoring que propusiste</text:span></text:span></text:p>
      <text:p text:style-name="P52">Si algo sale mal:</text:p>
      <text:p text:style-name="P59"><text:span text:style-name="Source_20_Text"><text:span text:style-name="T13">/undo</text:span></text:span></text:p>
      <text:p text:style-name="P52">Este comando deshace el último cambio. Puedes ejecutarlo múltiples veces para ir hacia atrás en el historial.</text:p>
      <text:h text:style-name="P61" text:outline-level="3"><text:bookmark text:name="sesiones-continuas"/>Sesiones continuas <text:a xlink:type="simple" xlink:href="https://www.webreactiva.com/blog/como-usar-opencode#sesiones-continuas" text:style-name="Internet_20_link" text:visited-style-name="Visited_20_Internet_20_Link"><text:span text:style-name="T13">¶</text:span></text:a></text:h>
      <text:p text:style-name="P52">OpenCode guarda las sesiones de forma automática. No tienes que empezar de cero cada vez que abres la herramienta.</text:p>
      <text:p text:style-name="P52">El primer día trabajas en una feature:</text:p>
      <text:p text:style-name="P57"><text:span text:style-name="Source_20_Text"><text:span text:style-name="T13">opencode</text:span></text:span></text:p>
      <text:p text:style-name="P58"><text:span text:style-name="Source_20_Text"><text:span text:style-name="T13">&gt; Implementa el endpoint de login</text:span></text:span></text:p>
      <text:p text:style-name="P52">Al día siguiente, continúas donde lo dejaste:</text:p>
      <text:p text:style-name="P57"><text:span text:style-name="Source_20_Text"><text:span text:style-name="T13">opencode -c</text:span></text:span></text:p>
      <text:p text:style-name="P58"><text:span text:style-name="Source_20_Text"><text:span text:style-name="T13">&gt; Ahora añade validación de inputs al login que hicimos ayer</text:span></text:span></text:p>
      <text:p text:style-name="P52">OpenCode recuerda todo el contexto de la sesión anterior. No tienes que volver a explicar qué estás haciendo ni qué decisiones tomaste.</text:p>
      <text:h text:style-name="P61" text:outline-level="3"><text:bookmark text:name="automatizacion-con-scripts"/>Automatización con scripts <text:a xlink:type="simple" xlink:href="https://www.webreactiva.com/blog/como-usar-opencode#automatizacion-con-scripts" text:style-name="Internet_20_link" text:visited-style-name="Visited_20_Internet_20_Link"><text:span text:style-name="T13">¶</text:span></text:a></text:h>
      <text:p text:style-name="P52">Para integrar OpenCode en scripts o pipelines de CI/CD, existe el modo no interactivo con el flag <text:span text:style-name="Source_20_Text"><text:span text:style-name="T13">-p</text:span></text:span>:</text:p>
      <text:p text:style-name="P57"><text:span text:style-name="Source_20_Text"><text:span text:style-name="T13"># Ejecutar un prompt sin interfaz interactiva</text:span></text:span></text:p>
      <text:p text:style-name="P60"><text:soft-page-break/><text:span text:style-name="Source_20_Text"><text:span text:style-name="T13">opencode -p "Revisa el código y genera un informe de problemas de seguridad"</text:span></text:span></text:p>
      <text:p text:style-name="P60"/>
      <text:p text:style-name="P60"><text:span text:style-name="Source_20_Text"><text:span text:style-name="T13"># Con archivo adjunto</text:span></text:span></text:p>
      <text:p text:style-name="P60"><text:span text:style-name="Source_20_Text"><text:span text:style-name="T13">opencode -p "Explica este archivo" -f src/complex.ts</text:span></text:span></text:p>
      <text:p text:style-name="P60"/>
      <text:p text:style-name="P60"><text:span text:style-name="Source_20_Text"><text:span text:style-name="T13"># Respuesta en formato JSON (útil para pipelines)</text:span></text:span></text:p>
      <text:p text:style-name="P60"><text:span text:style-name="Source_20_Text"><text:span text:style-name="T13">opencode -p "Lista los TODO pendientes en formato JSON" -f json</text:span></text:span></text:p>
      <text:p text:style-name="P60"/>
      <text:p text:style-name="P60"><text:span text:style-name="Source_20_Text"><text:span text:style-name="T13"># Modo silencioso sin spinner (ideal para scripts)</text:span></text:span></text:p>
      <text:p text:style-name="P58"><text:span text:style-name="Source_20_Text"><text:span text:style-name="T13">opencode -p "Genera documentación del módulo auth" -q</text:span></text:span></text:p>
      <text:p text:style-name="P52">El flag <text:span text:style-name="Source_20_Text"><text:span text:style-name="T13">-p</text:span></text:span> ejecuta el prompt, imprime el resultado a la salida estándar y termina. Todos los permisos se aprueban de forma automática durante la sesión. Es la pieza que conecta OpenCode con tu CI/CD.</text:p>
      <text:h text:style-name="P56" text:outline-level="2"><text:bookmark text:name="crear-skills-para-tu-proyecto"/>Crear skills para tu proyecto <text:a xlink:type="simple" xlink:href="https://www.webreactiva.com/blog/como-usar-opencode#crear-skills-para-tu-proyecto" text:style-name="Internet_20_link" text:visited-style-name="Visited_20_Internet_20_Link"><text:span text:style-name="T13">¶</text:span></text:a></text:h>
      <text:p text:style-name="P52">Las skills son una de las funcionalidades más potentes de OpenCode y una de las menos aprovechadas. Una skill es conocimiento empaquetado que OpenCode puede usar de forma automática. Si quieres profundizar en este concepto y aprender a crear skills también para Claude Code, Cursor o Copilot, te recomiendo la <text:a xlink:type="simple" xlink:href="https://www.webreactiva.com/blog/skills-programadores-agentes-ia" text:style-name="Internet_20_link" text:visited-style-name="Visited_20_Internet_20_Link"><text:span text:style-name="T13">guía completa sobre skills para agentes de IA</text:span></text:a>.</text:p>
      <text:p text:style-name="P52">Piensa en todas las veces que has tenido que explicar a un compañero nuevo cómo funciona el sistema de autenticación, dónde están los logs, cuáles son las convenciones de código del equipo. Con las skills, documentas eso una vez y OpenCode lo usa siempre que sea relevante.</text:p>
      <text:h text:style-name="P61" text:outline-level="3"><text:bookmark text:name="el-ecosistema-de-skills-skillssh"/>El ecosistema de skills: skills.sh <text:a xlink:type="simple" xlink:href="https://www.webreactiva.com/blog/como-usar-opencode#el-ecosistema-de-skills-skillssh" text:style-name="Internet_20_link" text:visited-style-name="Visited_20_Internet_20_Link"><text:span text:style-name="T13">¶</text:span></text:a></text:h>
      <text:p text:style-name="P52">Antes de crear tus propias skills, merece la pena conocer <text:a xlink:type="simple" xlink:href="https://skills.sh/" office:target-frame-name="_blank" xlink:show="new" text:style-name="Internet_20_link" text:visited-style-name="Visited_20_Internet_20_Link"><text:span text:style-name="T13">Skills Open Agent Ecosystem</text:span></text:a>. Es un repositorio de skills creadas por la comunidad que puedes instalar con un solo comando.</text:p>
      <text:p text:style-name="P52">Por ejemplo, si trabajas con frontend y quieres que OpenCode te ayude a crear interfaces de calidad, puedes instalar la skill <text:span text:style-name="Source_20_Text"><text:span text:style-name="T13">frontend-design</text:span></text:span> de Anthropic:</text:p>
      <text:p text:style-name="P59"><text:span text:style-name="Source_20_Text"><text:span text:style-name="T13">npx skills add https://github.com/anthropics/skills --skill frontend-design</text:span></text:span></text:p>
      <text:p text:style-name="P52">El instalador te pregunta para qué herramienta quieres configurar la skill. Selecciona <text:span text:style-name="Strong_20_Emphasis"><text:span text:style-name="T13">OpenCode</text:span></text:span> y quedará instalada en tu configuración global, lista para usar en todos tus proyectos.</text:p>
      <text:p text:style-name="P52">Esta skill en concreto enseña a OpenCode buenas prácticas de diseño frontend: cómo estructurar componentes, patrones de CSS, accesibilidad, responsive design… Todo ese conocimiento queda disponible cuando le pides que te ayude con la interfaz.</text:p>
      <text:p text:style-name="P52">El catálogo de skills.sh crece cada día. Hay skills para testing, documentación, seguridad, bases de datos… Antes de crear una skill desde cero, comprueba si alguien ya ha hecho el trabajo.</text:p>
      <text:h text:style-name="P61" text:outline-level="3"><text:bookmark text:name="crear-tus-propias-skills"/>Crear tus propias skills <text:a xlink:type="simple" xlink:href="https://www.webreactiva.com/blog/como-usar-opencode#crear-tus-propias-skills" text:style-name="Internet_20_link" text:visited-style-name="Visited_20_Internet_20_Link"><text:span text:style-name="T13">¶</text:span></text:a></text:h>
      <text:p text:style-name="P52">Cuando necesites conocimiento específico de tu proyecto que no existe en ningún catálogo, puedes crear tus propias skills.</text:p>
      <text:p text:style-name="P52"><text:soft-page-break/>Una skill tiene una estructura sencilla. Es una carpeta con un archivo <text:span text:style-name="Source_20_Text"><text:span text:style-name="T13">SKILL.md</text:span></text:span> y, de forma opcional, recursos adicionales:</text:p>
      <text:p text:style-name="P57"><text:span text:style-name="Source_20_Text"><text:span text:style-name="T13">mi-skill/</text:span></text:span></text:p>
      <text:p text:style-name="P60"><text:span text:style-name="Source_20_Text"><text:span text:style-name="T13">├── SKILL.md <text:s text:c="13"/># Instrucciones principales (obligatorio)</text:span></text:span></text:p>
      <text:p text:style-name="P60"><text:span text:style-name="Source_20_Text"><text:span text:style-name="T13">├── references/ <text:s text:c="10"/># Documentación extensa (opcional)</text:span></text:span></text:p>
      <text:p text:style-name="P60"><text:span text:style-name="Source_20_Text"><text:span text:style-name="T13">│ <text:s text:c="2"/>├── api-docs.md</text:span></text:span></text:p>
      <text:p text:style-name="P60"><text:span text:style-name="Source_20_Text"><text:span text:style-name="T13">│ <text:s text:c="2"/>└── database-schema.md</text:span></text:span></text:p>
      <text:p text:style-name="P60"><text:span text:style-name="Source_20_Text"><text:span text:style-name="T13">├── scripts/ <text:s text:c="13"/># Código reutilizable (opcional)</text:span></text:span></text:p>
      <text:p text:style-name="P60"><text:span text:style-name="Source_20_Text"><text:span text:style-name="T13">│ <text:s text:c="2"/>└── setup.sh</text:span></text:span></text:p>
      <text:p text:style-name="P60"><text:span text:style-name="Source_20_Text"><text:span text:style-name="T13">└── assets/ <text:s text:c="14"/># Plantillas, imágenes (opcional)</text:span></text:span></text:p>
      <text:p text:style-name="P58"><text:span text:style-name="Source_20_Text"><text:span text:style-name="T13"><text:s text:c="4"/>└── template.html</text:span></text:span></text:p>
      <text:p text:style-name="P52">Las skills de proyecto van en <text:span text:style-name="Source_20_Text"><text:span text:style-name="T13">.opencode/skills/</text:span></text:span> dentro de tu repositorio. Las skills globales, que quieres usar en todos tus proyectos, van en <text:span text:style-name="Source_20_Text"><text:span text:style-name="T13">~/.config/opencode/skills/</text:span></text:span>.</text:p>
      <text:p text:style-name="P52">OpenCode también es compatible con rutas de skills de Claude Code (<text:span text:style-name="Source_20_Text"><text:span text:style-name="T13">.claude/skills/</text:span></text:span>) y del estándar de agentes (<text:span text:style-name="Source_20_Text"><text:span text:style-name="T13">.agents/skills/</text:span></text:span>), lo que facilita compartir skills entre herramientas.</text:p>
      <text:p text:style-name="P52">Vamos a crear una skill de ejemplo. Primero la estructura:</text:p>
      <text:p text:style-name="P59"><text:span text:style-name="Source_20_Text"><text:span text:style-name="T13">mkdir -p .opencode/skills/mi-proyecto</text:span></text:span></text:p>
      <text:p text:style-name="P52">Ahora el archivo <text:span text:style-name="Source_20_Text"><text:span text:style-name="T13">SKILL.md</text:span></text:span>:</text:p>
      <text:p text:style-name="P57"><text:span text:style-name="Source_20_Text"><text:span text:style-name="T13">---</text:span></text:span></text:p>
      <text:p text:style-name="P60"><text:span text:style-name="Source_20_Text"><text:span text:style-name="T13">name: mi-proyecto</text:span></text:span></text:p>
      <text:p text:style-name="P60"><text:span text:style-name="Source_20_Text"><text:span text:style-name="T13">description: |</text:span></text:span></text:p>
      <text:p text:style-name="P60"><text:span text:style-name="Source_20_Text"><text:span text:style-name="T13"><text:s text:c="2"/>Contexto específico de mi proyecto. Usa esta skill cuando trabajes con</text:span></text:span></text:p>
      <text:p text:style-name="P60"><text:span text:style-name="Source_20_Text"><text:span text:style-name="T13"><text:s text:c="2"/>autenticación, base de datos, o la API REST de este proyecto.</text:span></text:span></text:p>
      <text:p text:style-name="P60"><text:span text:style-name="Source_20_Text"><text:span text:style-name="T13">---</text:span></text:span></text:p>
      <text:p text:style-name="P60"/>
      <text:p text:style-name="P60"><text:span text:style-name="Source_20_Text"><text:span text:style-name="T13"># Mi Proyecto</text:span></text:span></text:p>
      <text:p text:style-name="P60"/>
      <text:p text:style-name="P60"><text:span text:style-name="Source_20_Text"><text:span text:style-name="T13">## Stack tecnológico</text:span></text:span></text:p>
      <text:p text:style-name="P60"/>
      <text:p text:style-name="P60"><text:span text:style-name="Source_20_Text"><text:span text:style-name="T13">- **Backend**: Node.js 20 + Express 4</text:span></text:span></text:p>
      <text:p text:style-name="P60"><text:span text:style-name="Source_20_Text"><text:span text:style-name="T13">- **Base de datos**: PostgreSQL 15</text:span></text:span></text:p>
      <text:p text:style-name="P60"><text:span text:style-name="Source_20_Text"><text:span text:style-name="T13">- **Autenticación**: JWT con refresh tokens</text:span></text:span></text:p>
      <text:p text:style-name="P60"><text:span text:style-name="Source_20_Text"><text:span text:style-name="T13">- **Testing**: Jest + Supertest</text:span></text:span></text:p>
      <text:p text:style-name="P60"/>
      <text:p text:style-name="P60"><text:span text:style-name="Source_20_Text"><text:span text:style-name="T13">## Convenciones de código</text:span></text:span></text:p>
      <text:p text:style-name="P60"/>
      <text:p text:style-name="P60"><text:span text:style-name="Source_20_Text"><text:span text:style-name="T13">- Endpoints en `/api/v1/`</text:span></text:span></text:p>
      <text:p text:style-name="P60"><text:span text:style-name="Source_20_Text"><text:span text:style-name="T13">- Errores siguen RFC 7807 (Problem Details)</text:span></text:span></text:p>
      <text:p text:style-name="P60"><text:span text:style-name="Source_20_Text"><text:span text:style-name="T13">- Tests junto al código en `__tests__/`</text:span></text:span></text:p>
      <text:p text:style-name="P60"/>
      <text:p text:style-name="P60"><text:span text:style-name="Source_20_Text"><text:span text:style-name="T13">## Arquitectura</text:span></text:span></text:p>
      <text:p text:style-name="P60"/>
      <text:p text:style-name="P60"><text:span text:style-name="Source_20_Text"><text:span text:style-name="T13">La estructura del proyecto sigue este patrón:</text:span></text:span></text:p>
      <text:p text:style-name="P60"/>
      <text:p text:style-name="P60"><text:span text:style-name="Source_20_Text"><text:span text:style-name="T13">- `controllers/` contiene la lógica de endpoints</text:span></text:span></text:p>
      <text:p text:style-name="P60"><text:soft-page-break/><text:span text:style-name="Source_20_Text"><text:span text:style-name="T13">- `services/` tiene la lógica de negocio</text:span></text:span></text:p>
      <text:p text:style-name="P60"><text:span text:style-name="Source_20_Text"><text:span text:style-name="T13">- `models/` define las estructuras de datos</text:span></text:span></text:p>
      <text:p text:style-name="P60"><text:span text:style-name="Source_20_Text"><text:span text:style-name="T13">- `middleware/` incluye auth, logging y manejo de errores</text:span></text:span></text:p>
      <text:p text:style-name="P60"><text:span text:style-name="Source_20_Text"><text:span text:style-name="T13">- `utils/` agrupa helpers compartidos</text:span></text:span></text:p>
      <text:p text:style-name="P60"/>
      <text:p text:style-name="P60"><text:span text:style-name="Source_20_Text"><text:span text:style-name="T13">## Decisiones importantes</text:span></text:span></text:p>
      <text:p text:style-name="P60"/>
      <text:p text:style-name="P60"><text:span text:style-name="Source_20_Text"><text:span text:style-name="T13">- Usamos transacciones para operaciones de múltiples tablas</text:span></text:span></text:p>
      <text:p text:style-name="P60"><text:span text:style-name="Source_20_Text"><text:span text:style-name="T13">- Los tokens expiran en 15 minutos, el refresh token en 7 días</text:span></text:span></text:p>
      <text:p text:style-name="P58"><text:span text:style-name="Source_20_Text"><text:span text:style-name="T13">- Logs estructurados en JSON para producción</text:span></text:span></text:p>
      <text:p text:style-name="P52">El frontmatter con <text:span text:style-name="Source_20_Text"><text:span text:style-name="T13">name</text:span></text:span> y <text:span text:style-name="Source_20_Text"><text:span text:style-name="T13">description</text:span></text:span> es obligatorio. La descripción le dice a OpenCode cuándo activar esta skill.</text:p>
      <text:p text:style-name="P52">Reinicia OpenCode para que detecte la skill nueva y prueba que funciona:</text:p>
      <text:p text:style-name="P59"><text:span text:style-name="Source_20_Text"><text:span text:style-name="T13">&gt; ¿Cómo funciona la autenticación en este proyecto?</text:span></text:span></text:p>
      <text:p text:style-name="P52">Si responde usando la información de tu skill, todo está configurado de forma correcta.</text:p>
      <text:p text:style-name="P55">📚 Las skills son acumulativas. Puedes tener varias activas a la vez. OpenCode decide cuáles son relevantes para cada pregunta y las combina de forma inteligente. Además, puedes controlar permisos por skill con patrones glob en tu <text:span text:style-name="Source_20_Text"><text:span text:style-name="T13">opencode.json</text:span></text:span>.</text:p>
      <text:p text:style-name="P62">Las skills convierten a cualquier agente en un especialista de tu dominio. En la newsletter exploramos cada domingo como la IA esta transformando la forma de programar, con experiencias reales y las aportaciones de 6.100 developers que estan viviendo el cambio. Gratis, todos los domingos.</text:p>
      <text:h text:style-name="Heading_20_2" text:outline-level="2"><text:bookmark text:name="el-ecosistema-de-plugins"/>El ecosistema de plugins <text:a xlink:type="simple" xlink:href="https://www.webreactiva.com/blog/como-usar-opencode#el-ecosistema-de-plugins" text:style-name="Internet_20_link" text:visited-style-name="Visited_20_Internet_20_Link"><text:span text:style-name="T13">¶</text:span></text:a></text:h>
      <text:p text:style-name="P52">Además de skills y comandos, OpenCode tiene un <text:span text:style-name="Strong_20_Emphasis"><text:span text:style-name="T13">sistema de plugins</text:span></text:span> que permite extender su comportamiento a un nivel más profundo. Los plugins se enganchan a eventos del ciclo de vida del agente: pueden interceptar lecturas de archivos, modificar comandos antes de que se ejecuten, reaccionar a eventos de sesión y hasta inyectar herramientas nuevas.</text:p>
      <text:p text:style-name="P52">Piensa en los plugins como el paso siguiente a las skills. Mientras las skills aportan conocimiento (qué sabe el agente), los plugins modifican comportamiento (cómo actúa el agente).</text:p>
      <text:p text:style-name="P52">El ecosistema ya supera las 30 entradas oficiales y crece cada semana. Algunos de los más destacados:</text:p>
      <text:list text:style-name="L14">
        <text:list-item>
          <text:p text:style-name="P63"><text:span text:style-name="Strong_20_Emphasis"><text:span text:style-name="T13">Context7</text:span></text:span> — Inyecta documentación actualizada por versión para que el agente no genere código basado en APIs obsoletas.</text:p>
        </text:list-item>
        <text:list-item>
          <text:p text:style-name="P63"><text:span text:style-name="Strong_20_Emphasis"><text:span text:style-name="T13">opencode-supermemory</text:span></text:span> — Memoria persistente entre sesiones. El agente recuerda convenciones, preferencias y decisiones de sesiones anteriores.</text:p>
        </text:list-item>
        <text:list-item>
          <text:p text:style-name="P63"><text:span text:style-name="Strong_20_Emphasis"><text:span text:style-name="T13">opencode-type-inject</text:span></text:span> — Si trabajas con TypeScript, este plugin inyecta firmas de tipos en las lecturas de archivos. El agente deja de inventar interfaces y respeta las que ya existen.</text:p>
        </text:list-item>
        <text:list-item>
          <text:p text:style-name="P63"><text:soft-page-break/><text:span text:style-name="Strong_20_Emphasis"><text:span text:style-name="T13">opencode-vibeguard</text:span></text:span> — Redacta valores sensibles (claves API, tokens) antes de enviarlos al proveedor LLM. Un proxy de privacidad entre tu código y la nube.</text:p>
        </text:list-item>
        <text:list-item>
          <text:p text:style-name="P64"><text:span text:style-name="Strong_20_Emphasis"><text:span text:style-name="T13">opencode-pty</text:span></text:span> — Gestiona procesos interactivos que no terminan: tu <text:span text:style-name="Source_20_Text"><text:span text:style-name="T13">npm run dev</text:span></text:span>, watch modes, REPLs. El agente puede leer su salida en tiempo real.</text:p>
        </text:list-item>
      </text:list>
      <text:p text:style-name="P52">Los plugins se instalan en <text:span text:style-name="Source_20_Text"><text:span text:style-name="T13">.opencode/plugins/</text:span></text:span> para el proyecto local o <text:span text:style-name="Source_20_Text"><text:span text:style-name="T13">~/.config/opencode/plugins/</text:span></text:span> para configuración global. También puedes declararlos en tu <text:span text:style-name="Source_20_Text"><text:span text:style-name="T13">opencode.json</text:span></text:span>:</text:p>
      <text:p text:style-name="P57"><text:span text:style-name="Source_20_Text"><text:span text:style-name="T13">{</text:span></text:span></text:p>
      <text:p text:style-name="P60"><text:span text:style-name="Source_20_Text"><text:span text:style-name="T13"><text:s text:c="2"/>"$schema": "https://opencode.ai/config.json",</text:span></text:span></text:p>
      <text:p text:style-name="P60"><text:span text:style-name="Source_20_Text"><text:span text:style-name="T13"><text:s text:c="2"/>"plugin": ["opencode-supermemory", "opencode-type-inject"]</text:span></text:span></text:p>
      <text:p text:style-name="P58"><text:span text:style-name="Source_20_Text"><text:span text:style-name="T13">}</text:span></text:span></text:p>
      <text:p text:style-name="P52">El tema de plugins da para mucho más: cuáles instalar según tu stack, cómo combinarlos sin saturar la ventana de contexto, proyectos comunitarios como oh-my-openagent que convierten OpenCode en un sistema multiagente, y cómo crear tu propio plugin. Todo eso lo tienes en la guía completa de <text:a xlink:type="simple" xlink:href="https://www.webreactiva.com/blog/plugins-opencode" text:style-name="Internet_20_link" text:visited-style-name="Visited_20_Internet_20_Link"><text:span text:style-name="T13">los mejores plugins para OpenCode</text:span></text:a>.</text:p>
      <text:h text:style-name="Heading_20_2" text:outline-level="2"><text:bookmark text:name="comandos-esenciales"/>Comandos esenciales <text:a xlink:type="simple" xlink:href="https://www.webreactiva.com/blog/como-usar-opencode#comandos-esenciales" text:style-name="Internet_20_link" text:visited-style-name="Visited_20_Internet_20_Link"><text:span text:style-name="T13">¶</text:span></text:a></text:h>
      <text:p text:style-name="P52">Tener una referencia rápida evita que pierdas el flujo buscando en la documentación.</text:p>
      <text:h text:style-name="P61" text:outline-level="3"><text:bookmark text:name="comandos-internos-dentro-de-opencode"/>Comandos internos (dentro de OpenCode) <text:a xlink:type="simple" xlink:href="https://www.webreactiva.com/blog/como-usar-opencode#comandos-internos-dentro-de-opencode" text:style-name="Internet_20_link" text:visited-style-name="Visited_20_Internet_20_Link"><text:span text:style-name="T13">¶</text:span></text:a></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53">Comando</text:p>
            </table:table-cell>
            <table:table-cell table:style-name="Tabla2.A1" office:value-type="string">
              <text:p text:style-name="P53">Qué hace</text:p>
            </table:table-cell>
            <table:table-cell table:style-name="Tabla2.A1" office:value-type="string">
              <text:p text:style-name="P53">Cuándo usarlo</text:p>
            </table:table-cell>
          </table:table-row>
        </table:table-header-rows>
        <table:table-row>
          <table:table-cell table:style-name="Tabla2.A1" office:value-type="string">
            <text:p text:style-name="P54"><text:span text:style-name="Source_20_Text"><text:span text:style-name="T13">/connect</text:span></text:span></text:p>
          </table:table-cell>
          <table:table-cell table:style-name="Tabla2.A1" office:value-type="string">
            <text:p text:style-name="P54">Configura API keys</text:p>
          </table:table-cell>
          <table:table-cell table:style-name="Tabla2.A1" office:value-type="string">
            <text:p text:style-name="P54">Primera vez o cambio de proveedor</text:p>
          </table:table-cell>
        </table:table-row>
        <table:table-row>
          <table:table-cell table:style-name="Tabla2.A1" office:value-type="string">
            <text:p text:style-name="P54"><text:span text:style-name="Source_20_Text"><text:span text:style-name="T13">/init</text:span></text:span></text:p>
          </table:table-cell>
          <table:table-cell table:style-name="Tabla2.A1" office:value-type="string">
            <text:p text:style-name="P54">Inicializa proyecto</text:p>
          </table:table-cell>
          <table:table-cell table:style-name="Tabla2.A1" office:value-type="string">
            <text:p text:style-name="P54">Una vez por proyecto nuevo</text:p>
          </table:table-cell>
        </table:table-row>
        <table:table-row>
          <table:table-cell table:style-name="Tabla2.A1" office:value-type="string">
            <text:p text:style-name="P54"><text:span text:style-name="Source_20_Text"><text:span text:style-name="T13">/undo</text:span></text:span></text:p>
          </table:table-cell>
          <table:table-cell table:style-name="Tabla2.A1" office:value-type="string">
            <text:p text:style-name="P54">Deshace el último cambio</text:p>
          </table:table-cell>
          <table:table-cell table:style-name="Tabla2.A1" office:value-type="string">
            <text:p text:style-name="P54">Cuando algo sale mal</text:p>
          </table:table-cell>
        </table:table-row>
        <table:table-row>
          <table:table-cell table:style-name="Tabla2.A1" office:value-type="string">
            <text:p text:style-name="P54"><text:span text:style-name="Source_20_Text"><text:span text:style-name="T13">/redo</text:span></text:span></text:p>
          </table:table-cell>
          <table:table-cell table:style-name="Tabla2.A1" office:value-type="string">
            <text:p text:style-name="P54">Rehace cambio deshecho</text:p>
          </table:table-cell>
          <table:table-cell table:style-name="Tabla2.A1" office:value-type="string">
            <text:p text:style-name="P54">Si el undo fue un error</text:p>
          </table:table-cell>
        </table:table-row>
        <table:table-row>
          <table:table-cell table:style-name="Tabla2.A1" office:value-type="string">
            <text:p text:style-name="P54"><text:span text:style-name="Source_20_Text"><text:span text:style-name="T13">/share</text:span></text:span></text:p>
          </table:table-cell>
          <table:table-cell table:style-name="Tabla2.A1" office:value-type="string">
            <text:p text:style-name="P54">Genera enlace compartible</text:p>
          </table:table-cell>
          <table:table-cell table:style-name="Tabla2.A1" office:value-type="string">
            <text:p text:style-name="P54">Para colaborar o guardar</text:p>
          </table:table-cell>
        </table:table-row>
        <table:table-row>
          <table:table-cell table:style-name="Tabla2.A1" office:value-type="string">
            <text:p text:style-name="P54"><text:span text:style-name="Source_20_Text"><text:span text:style-name="T13">/models</text:span></text:span></text:p>
          </table:table-cell>
          <table:table-cell table:style-name="Tabla2.A1" office:value-type="string">
            <text:p text:style-name="P54">Lista modelos disponibles</text:p>
          </table:table-cell>
          <table:table-cell table:style-name="Tabla2.A1" office:value-type="string">
            <text:p text:style-name="P54">Para cambiar de modelo</text:p>
          </table:table-cell>
        </table:table-row>
        <table:table-row>
          <table:table-cell table:style-name="Tabla2.A1" office:value-type="string">
            <text:p text:style-name="P54"><text:span text:style-name="Source_20_Text"><text:span text:style-name="T13">/help</text:span></text:span></text:p>
          </table:table-cell>
          <table:table-cell table:style-name="Tabla2.A1" office:value-type="string">
            <text:p text:style-name="P54">Muestra ayuda de comandos</text:p>
          </table:table-cell>
          <table:table-cell table:style-name="Tabla2.A1" office:value-type="string">
            <text:p text:style-name="Table_20_Contents">Cuando no recuerdas un comando</text:p>
          </table:table-cell>
        </table:table-row>
      </table:table>
      <text:p text:style-name="P52">Estos son los más habituales, pero OpenCode tiene más de una docena de comandos adicionales que no aparecen en el onboarding. Si quieres descubrirlos, tenemos una guía con <text:a xlink:type="simple" xlink:href="https://www.webreactiva.com/blog/comandos-secretos-opencode" text:style-name="Internet_20_link" text:visited-style-name="Visited_20_Internet_20_Link"><text:span text:style-name="T13">los comandos secretos de OpenCode</text:span></text:a>.</text:p>
      <text:h text:style-name="P61" text:outline-level="3"><text:bookmark text:name="comandos-de-terminal"/>Comandos de terminal <text:a xlink:type="simple" xlink:href="https://www.webreactiva.com/blog/como-usar-opencode#comandos-de-terminal" text:style-name="Internet_20_link" text:visited-style-name="Visited_20_Internet_20_Link"><text:span text:style-name="T13">¶</text:span></text:a></text:h>
      <table:table table:name="Tabla3" table:style-name="Tabla3">
        <table:table-column table:style-name="Tabla3.A"/>
        <table:table-column table:style-name="Tabla3.B"/>
        <table:table-header-rows>
          <table:table-row>
            <table:table-cell table:style-name="Tabla3.A1" office:value-type="string">
              <text:p text:style-name="P53">Comando</text:p>
            </table:table-cell>
            <table:table-cell table:style-name="Tabla3.A1" office:value-type="string">
              <text:p text:style-name="P53">Qué hace</text:p>
            </table:table-cell>
          </table:table-row>
        </table:table-header-rows>
        <table:table-row>
          <table:table-cell table:style-name="Tabla3.A1" office:value-type="string">
            <text:p text:style-name="P54"><text:span text:style-name="Source_20_Text"><text:span text:style-name="T13">opencode</text:span></text:span></text:p>
          </table:table-cell>
          <table:table-cell table:style-name="Tabla3.A1" office:value-type="string">
            <text:p text:style-name="P54">Inicia la interfaz TUI</text:p>
          </table:table-cell>
        </table:table-row>
        <table:table-row>
          <table:table-cell table:style-name="Tabla3.A1" office:value-type="string">
            <text:p text:style-name="P54"><text:span text:style-name="Source_20_Text"><text:span text:style-name="T13">opencode -c</text:span></text:span></text:p>
          </table:table-cell>
          <table:table-cell table:style-name="Tabla3.A1" office:value-type="string">
            <text:p text:style-name="P54">Continúa la última sesión</text:p>
          </table:table-cell>
        </table:table-row>
        <table:table-row>
          <table:table-cell table:style-name="Tabla3.A1" office:value-type="string">
            <text:p text:style-name="P54"><text:span text:style-name="Source_20_Text"><text:span text:style-name="T13">opencode --agent plan</text:span></text:span></text:p>
          </table:table-cell>
          <table:table-cell table:style-name="Tabla3.A1" office:value-type="string">
            <text:p text:style-name="P54">Inicia en modo Plan</text:p>
          </table:table-cell>
        </table:table-row>
        <text:soft-page-break/>
        <table:table-row>
          <table:table-cell table:style-name="Tabla3.A1" office:value-type="string">
            <text:p text:style-name="P54"><text:span text:style-name="Source_20_Text"><text:span text:style-name="T13">opencode -p "mensaje"</text:span></text:span></text:p>
          </table:table-cell>
          <table:table-cell table:style-name="Tabla3.A1" office:value-type="string">
            <text:p text:style-name="P54">Ejecuta sin interfaz (prompt)</text:p>
          </table:table-cell>
        </table:table-row>
        <table:table-row>
          <table:table-cell table:style-name="Tabla3.A1" office:value-type="string">
            <text:p text:style-name="P54"><text:span text:style-name="Source_20_Text"><text:span text:style-name="T13">opencode -p "msg" -f archivo</text:span></text:span></text:p>
          </table:table-cell>
          <table:table-cell table:style-name="Tabla3.A1" office:value-type="string">
            <text:p text:style-name="P54">Ejecuta con archivo adjunto</text:p>
          </table:table-cell>
        </table:table-row>
        <table:table-row>
          <table:table-cell table:style-name="Tabla3.A1" office:value-type="string">
            <text:p text:style-name="P54"><text:span text:style-name="Source_20_Text"><text:span text:style-name="T13">opencode -p "msg" -f json</text:span></text:span></text:p>
          </table:table-cell>
          <table:table-cell table:style-name="Tabla3.A1" office:value-type="string">
            <text:p text:style-name="P54">Respuesta en formato JSON</text:p>
          </table:table-cell>
        </table:table-row>
        <table:table-row>
          <table:table-cell table:style-name="Tabla3.A1" office:value-type="string">
            <text:p text:style-name="P54"><text:span text:style-name="Source_20_Text"><text:span text:style-name="T13">opencode -p "msg" -q</text:span></text:span></text:p>
          </table:table-cell>
          <table:table-cell table:style-name="Tabla3.A1" office:value-type="string">
            <text:p text:style-name="P54">Modo silencioso (sin spinner)</text:p>
          </table:table-cell>
        </table:table-row>
        <table:table-row>
          <table:table-cell table:style-name="Tabla3.A1" office:value-type="string">
            <text:p text:style-name="P54"><text:span text:style-name="Source_20_Text"><text:span text:style-name="T13">opencode models</text:span></text:span></text:p>
          </table:table-cell>
          <table:table-cell table:style-name="Tabla3.A1" office:value-type="string">
            <text:p text:style-name="P54">Lista modelos disponibles</text:p>
          </table:table-cell>
        </table:table-row>
        <table:table-row>
          <table:table-cell table:style-name="Tabla3.A1" office:value-type="string">
            <text:p text:style-name="P54"><text:span text:style-name="Source_20_Text"><text:span text:style-name="T13">opencode stats</text:span></text:span></text:p>
          </table:table-cell>
          <table:table-cell table:style-name="Tabla3.A1" office:value-type="string">
            <text:p text:style-name="P54">Muestra estadísticas de uso</text:p>
          </table:table-cell>
        </table:table-row>
        <table:table-row>
          <table:table-cell table:style-name="Tabla3.A1" office:value-type="string">
            <text:p text:style-name="P54"><text:span text:style-name="Source_20_Text"><text:span text:style-name="T13">opencode session list</text:span></text:span></text:p>
          </table:table-cell>
          <table:table-cell table:style-name="Tabla3.A1" office:value-type="string">
            <text:p text:style-name="P54">Lista sesiones guardadas</text:p>
          </table:table-cell>
        </table:table-row>
        <table:table-row>
          <table:table-cell table:style-name="Tabla3.A1" office:value-type="string">
            <text:p text:style-name="P54"><text:span text:style-name="Source_20_Text"><text:span text:style-name="T13">opencode web</text:span></text:span></text:p>
          </table:table-cell>
          <table:table-cell table:style-name="Tabla3.A1" office:value-type="string">
            <text:p text:style-name="P54">Inicia interfaz web</text:p>
          </table:table-cell>
        </table:table-row>
        <table:table-row>
          <table:table-cell table:style-name="Tabla3.A1" office:value-type="string">
            <text:p text:style-name="P54"><text:span text:style-name="Source_20_Text"><text:span text:style-name="T13">opencode agent create</text:span></text:span></text:p>
          </table:table-cell>
          <table:table-cell table:style-name="Tabla3.A1" office:value-type="string">
            <text:p text:style-name="P54">Crea un agente personalizado</text:p>
          </table:table-cell>
        </table:table-row>
        <table:table-row>
          <table:table-cell table:style-name="Tabla3.A1" office:value-type="string">
            <text:p text:style-name="P54"><text:span text:style-name="Source_20_Text"><text:span text:style-name="T13">opencode mcp add</text:span></text:span></text:p>
          </table:table-cell>
          <table:table-cell table:style-name="Tabla3.A1" office:value-type="string">
            <text:p text:style-name="P54">Añade un servidor MCP</text:p>
          </table:table-cell>
        </table:table-row>
        <table:table-row>
          <table:table-cell table:style-name="Tabla3.A1" office:value-type="string">
            <text:p text:style-name="P54"><text:span text:style-name="Source_20_Text"><text:span text:style-name="T13">opencode update</text:span></text:span></text:p>
          </table:table-cell>
          <table:table-cell table:style-name="Tabla3.A1" office:value-type="string">
            <text:p text:style-name="Table_20_Contents">Actualiza a la última versión</text:p>
          </table:table-cell>
        </table:table-row>
      </table:table>
      <text:h text:style-name="P61" text:outline-level="3"><text:bookmark text:name="atajos-de-teclado"/>Atajos de teclado <text:a xlink:type="simple" xlink:href="https://www.webreactiva.com/blog/como-usar-opencode#atajos-de-teclado" text:style-name="Internet_20_link" text:visited-style-name="Visited_20_Internet_20_Link"><text:span text:style-name="T13">¶</text:span></text:a></text:h>
      <text:list text:style-name="L15">
        <text:list-item>
          <text:p text:style-name="P65"><text:span text:style-name="Strong_20_Emphasis"><text:span text:style-name="T13">Tab</text:span></text:span>: Cambiar entre Build y Plan</text:p>
        </text:list-item>
        <text:list-item>
          <text:p text:style-name="P65"><text:span text:style-name="Strong_20_Emphasis"><text:span text:style-name="T13">@</text:span></text:span>: Búsqueda fuzzy de archivos</text:p>
        </text:list-item>
        <text:list-item>
          <text:p text:style-name="P65"><text:span text:style-name="Strong_20_Emphasis"><text:span text:style-name="T13">!</text:span></text:span>: Ejecutar comando de shell</text:p>
        </text:list-item>
        <text:list-item>
          <text:p text:style-name="P66"><text:span text:style-name="Strong_20_Emphasis"><text:span text:style-name="T13">Ctrl+C</text:span></text:span>: Cancelar operación actual</text:p>
        </text:list-item>
      </text:list>
      <text:h text:style-name="P56" text:outline-level="2"><text:bookmark text:name="solucion-de-problemas"/>Solución de problemas <text:a xlink:type="simple" xlink:href="https://www.webreactiva.com/blog/como-usar-opencode#solucion-de-problemas" text:style-name="Internet_20_link" text:visited-style-name="Visited_20_Internet_20_Link"><text:span text:style-name="T13">¶</text:span></text:a></text:h>
      <text:h text:style-name="P61" text:outline-level="3"><text:bookmark text:name="api-key-not-configured"/>“API key not configured” <text:a xlink:type="simple" xlink:href="https://www.webreactiva.com/blog/como-usar-opencode#api-key-not-configured" text:style-name="Internet_20_link" text:visited-style-name="Visited_20_Internet_20_Link"><text:span text:style-name="T13">¶</text:span></text:a></text:h>
      <text:p text:style-name="P52">No has configurado la conexión con el modelo. Ejecuta <text:span text:style-name="Source_20_Text"><text:span text:style-name="T13">/connect</text:span></text:span> y sigue las instrucciones.</text:p>
      <text:h text:style-name="P61" text:outline-level="3"><text:bookmark text:name="hice-cambios-que-no-queria"/>Hice cambios que no quería <text:a xlink:type="simple" xlink:href="https://www.webreactiva.com/blog/como-usar-opencode#hice-cambios-que-no-queria" text:style-name="Internet_20_link" text:visited-style-name="Visited_20_Internet_20_Link"><text:span text:style-name="T13">¶</text:span></text:a></text:h>
      <text:p text:style-name="P52">Build ejecutó algo que no esperabas. Usa <text:span text:style-name="Source_20_Text"><text:span text:style-name="T13">/undo</text:span></text:span> para deshacer. Puedes ejecutarlo varias veces para ir hacia atrás.</text:p>
      <text:h text:style-name="P61" text:outline-level="3"><text:bookmark text:name="opencode-no-encuentra-mis-archivos"/>OpenCode no encuentra mis archivos <text:a xlink:type="simple" xlink:href="https://www.webreactiva.com/blog/como-usar-opencode#opencode-no-encuentra-mis-archivos" text:style-name="Internet_20_link" text:visited-style-name="Visited_20_Internet_20_Link"><text:span text:style-name="T13">¶</text:span></text:a></text:h>
      <text:p text:style-name="P52">Estás en el directorio equivocado. Navega a la raíz de tu proyecto antes de iniciar OpenCode.</text:p>
      <text:h text:style-name="P61" text:outline-level="3"><text:bookmark text:name="las-respuestas-son-muy-lentas"/>Las respuestas son muy lentas <text:a xlink:type="simple" xlink:href="https://www.webreactiva.com/blog/como-usar-opencode#las-respuestas-son-muy-lentas" text:style-name="Internet_20_link" text:visited-style-name="Visited_20_Internet_20_Link"><text:span text:style-name="T13">¶</text:span></text:a></text:h>
      <text:p text:style-name="P52">El modelo que estás usando es pesado o el contexto es muy grande. Prueba con un modelo más rápido:</text:p>
      <text:p text:style-name="P59"><text:span text:style-name="Source_20_Text"><text:span text:style-name="T13">opencode -m claude-3-5-haiku</text:span></text:span></text:p>
      <text:h text:style-name="P61" text:outline-level="3"><text:bookmark text:name="perdi-mi-sesion"/><text:soft-page-break/>Perdí mi sesión <text:a xlink:type="simple" xlink:href="https://www.webreactiva.com/blog/como-usar-opencode#perdi-mi-sesion" text:style-name="Internet_20_link" text:visited-style-name="Visited_20_Internet_20_Link"><text:span text:style-name="T13">¶</text:span></text:a></text:h>
      <text:p text:style-name="P52">Puedes recuperarla. Lista las sesiones guardadas con <text:span text:style-name="Source_20_Text"><text:span text:style-name="T13">opencode session list</text:span></text:span> y abre la que necesites con <text:span text:style-name="Source_20_Text"><text:span text:style-name="T13">opencode -s &lt;id&gt;</text:span></text:span>.</text:p>
      <text:h text:style-name="P61" text:outline-level="3"><text:bookmark text:name="la-skill-no-se-carga"/>La skill no se carga <text:a xlink:type="simple" xlink:href="https://www.webreactiva.com/blog/como-usar-opencode#la-skill-no-se-carga" text:style-name="Internet_20_link" text:visited-style-name="Visited_20_Internet_20_Link"><text:span text:style-name="T13">¶</text:span></text:a></text:h>
      <text:p text:style-name="P52">Probablemente hay un error en el frontmatter YAML. Verifica que <text:span text:style-name="Source_20_Text"><text:span text:style-name="T13">name:</text:span></text:span> y <text:span text:style-name="Source_20_Text"><text:span text:style-name="T13">description:</text:span></text:span> existen y tienen valores válidos. Comprueba que el archivo se llama <text:span text:style-name="Source_20_Text"><text:span text:style-name="T13">SKILL.md</text:span></text:span> (en mayúsculas). No olvides reiniciar OpenCode después de crear o modificar una skill.</text:p>
      <text:h text:style-name="P61" text:outline-level="3"><text:bookmark text:name="opencode-va-lento-en-windows"/>OpenCode va lento en Windows <text:a xlink:type="simple" xlink:href="https://www.webreactiva.com/blog/como-usar-opencode#opencode-va-lento-en-windows" text:style-name="Internet_20_link" text:visited-style-name="Visited_20_Internet_20_Link"><text:span text:style-name="T13">¶</text:span></text:a></text:h>
      <text:p text:style-name="P52">Si estás ejecutando OpenCode de forma nativa en Windows y notas problemas de rendimiento, la solución más efectiva es migrar a WSL 2. El rendimiento del sistema de archivos y la compatibilidad con las herramientas de desarrollo mejoran de forma sustancial.</text:p>
      <text:h text:style-name="P61" text:outline-level="3"><text:bookmark text:name="errores-de-autenticacion-con-claude"/>Errores de autenticación con Claude <text:a xlink:type="simple" xlink:href="https://www.webreactiva.com/blog/como-usar-opencode#errores-de-autenticacion-con-claude" text:style-name="Internet_20_link" text:visited-style-name="Visited_20_Internet_20_Link"><text:span text:style-name="T13">¶</text:span></text:a></text:h>
      <text:p text:style-name="P52">Si ves errores como “This credential is only authorized for use with Claude Code”, es porque Anthropic bloqueó el acceso OAuth desde herramientas de terceros en enero de 2026. Las opciones son: usar claves API directas de Anthropic, los gateways de OpenCode (Zen o Black), o explorar las alternativas comunitarias documentadas en el artículo sobre <text:a xlink:type="simple" xlink:href="https://www.webreactiva.com/blog/plugins-opencode#el-caso-claude-la-guerra-oauth-y-como-seguir-usando-tu-suscripcion-max" text:style-name="Internet_20_link" text:visited-style-name="Visited_20_Internet_20_Link"><text:span text:style-name="T13">plugins de OpenCode</text:span></text:a>.</text:p>
      <text:h text:style-name="P56" text:outline-level="2"><text:bookmark text:name="buenas-practicas"/>Buenas prácticas <text:a xlink:type="simple" xlink:href="https://www.webreactiva.com/blog/como-usar-opencode#buenas-practicas" text:style-name="Internet_20_link" text:visited-style-name="Visited_20_Internet_20_Link"><text:span text:style-name="T13">¶</text:span></text:a></text:h>
      <text:p text:style-name="P52">Después de usar OpenCode durante un tiempo, hay patrones que funcionan mejor que otros. Aquí van los que me han resultado más útiles.</text:p>
      <text:p text:style-name="P52"><text:span text:style-name="Strong_20_Emphasis"><text:span text:style-name="T13">Explora antes de actuar</text:span></text:span>. Siempre que te enfrentes a código que no conoces, empieza en modo Plan. No cuesta nada y te evita sorpresas desagradables. Entiende lo que hay antes de modificarlo.</text:p>
      <text:p text:style-name="P52"><text:span text:style-name="Strong_20_Emphasis"><text:span text:style-name="T13">Usa /undo sin miedo</text:span></text:span>. Los cambios son reversibles. Esto te da libertad para experimentar. Si no funciona, deshaces y pruebas otra cosa. No te quedes paralizado pensando si el cambio es correcto.</text:p>
      <text:p text:style-name="P52"><text:span text:style-name="Strong_20_Emphasis"><text:span text:style-name="T13">Aprovecha las sesiones continuas</text:span></text:span>. Usar <text:span text:style-name="Source_20_Text"><text:span text:style-name="T13">opencode -c</text:span></text:span> mantiene el contexto de lo que estabas haciendo. No empieces de cero cada día. OpenCode recuerda las decisiones, el código que viste, las explicaciones que te dio.</text:p>
      <text:p text:style-name="P52"><text:span text:style-name="Strong_20_Emphasis"><text:span text:style-name="T13">Crea skills para conocimiento recurrente</text:span></text:span>. Si te encuentras explicando lo mismo dos veces, es señal de que necesitas una skill. Documéntalo una vez y deja que OpenCode lo use de forma automática.</text:p>
      <text:p text:style-name="P52"><text:span text:style-name="Strong_20_Emphasis"><text:span text:style-name="T13">Usa subagentes para mantener el foco</text:span></text:span>. @explore y @general hacen su trabajo sin ensuciar tu conversación principal. Úsalos para investigaciones paralelas mientras mantienes el hilo de lo que estás haciendo.</text:p>
      <text:p text:style-name="P52"><text:soft-page-break/><text:span text:style-name="Strong_20_Emphasis"><text:span text:style-name="T13">Verifica después de cada cambio significativo</text:span></text:span>. No acumules cambios sin probar. Ejecuta los tests, comprueba que la aplicación funciona. Es más fácil detectar y arreglar un problema cuando sabes qué cambio lo provocó.</text:p>
      <text:p text:style-name="P52"><text:span text:style-name="Strong_20_Emphasis"><text:span text:style-name="T13">Empieza con preguntas sencillas</text:span></text:span>. Cuando trabajes con código nuevo, haz preguntas básicas primero. “¿Qué hace esta función?” “¿Dónde se llama?” “¿Qué dependencias tiene?” Construye tu comprensión de forma gradual.</text:p>
      <text:p text:style-name="P52"><text:span text:style-name="Strong_20_Emphasis"><text:span text:style-name="T13">Confía pero verifica</text:span></text:span>. OpenCode es muy bueno, pero no es infalible. Revisa el código que genera, entiende lo que hace, ejecuta los tests. El código es tu responsabilidad, no de la IA. <text:a xlink:type="simple" xlink:href="https://www.webreactiva.com/blog/creador-opencode" text:style-name="Internet_20_link" text:visited-style-name="Visited_20_Internet_20_Link"><text:span text:style-name="T13">Dax Raad, creador de Open Code, explica por qué mantener un código base limpio es más importante que nunca</text:span></text:a> cuando los agentes generan código a escala.</text:p>
      <text:p text:style-name="P52"><text:span text:style-name="Strong_20_Emphasis"><text:span text:style-name="T13">Mantén las skills actualizadas</text:span></text:span>. Cuando cambien las convenciones del proyecto o la arquitectura, actualiza las skills. Información desactualizada es peor que no tener información.</text:p>
      <text:p text:style-name="P55">🎯 La clave no está en usar OpenCode para todo. Está en saber cuándo usarlo y cuándo es más eficiente hacer las cosas a mano. Con el tiempo desarrollas un instinto para esto.</text:p>
      <text:h text:style-name="P56" text:outline-level="2"><text:bookmark text:name="proximos-pasos"/>Próximos pasos <text:a xlink:type="simple" xlink:href="https://www.webreactiva.com/blog/como-usar-opencode#proximos-pasos" text:style-name="Internet_20_link" text:visited-style-name="Visited_20_Internet_20_Link"><text:span text:style-name="T13">¶</text:span></text:a></text:h>
      <text:p text:style-name="P52">Una vez domines lo básico, hay más territorio que explorar.</text:p>
      <text:p text:style-name="P52">Puedes crear <text:span text:style-name="Strong_20_Emphasis"><text:span text:style-name="T13">agentes personalizados</text:span></text:span> con <text:span text:style-name="Source_20_Text"><text:span text:style-name="T13">opencode agent create</text:span></text:span> para tareas que repites con frecuencia. Si siempre haces el mismo tipo de revisión de código o generas el mismo tipo de documentación, un agente personalizado te ahorra tiempo. Y si quieres llevar esto al siguiente nivel, <text:a xlink:type="simple" xlink:href="https://www.webreactiva.com/blog/ohmyopencode" text:style-name="Internet_20_link" text:visited-style-name="Visited_20_Internet_20_Link"><text:span text:style-name="T13">Oh My OpenCode</text:span></text:a> es un proyecto que convierte OpenCode en un sistema de orquestación con múltiples agentes especializados trabajando juntos.</text:p>
      <text:p text:style-name="P52">Los <text:span text:style-name="Strong_20_Emphasis"><text:span text:style-name="T13">MCP servers</text:span></text:span> permiten conectar OpenCode con herramientas externas. Bases de datos, APIs, servicios en la nube. Usa <text:span text:style-name="Source_20_Text"><text:span text:style-name="T13">opencode mcp add</text:span></text:span> para explorar las integraciones disponibles. Si quieres entender cómo funcionan los servidores MCP y cómo configurarlos paso a paso, consulta la <text:a xlink:type="simple" xlink:href="https://www.webreactiva.com/blog/como-instalar-mcp" text:style-name="Internet_20_link" text:visited-style-name="Visited_20_Internet_20_Link"><text:span text:style-name="T13">guía para instalar y usar MCP en tus proyectos</text:span></text:a>.</text:p>
      <text:p text:style-name="P52">Los <text:span text:style-name="Strong_20_Emphasis"><text:span text:style-name="T13">plugins</text:span></text:span> abren otra dimensión de personalización. Desde memoria persistente entre sesiones hasta protección de secretos o inyección de tipos TypeScript, el ecosistema de plugins transforma lo que OpenCode puede hacer por ti. Tienes la guía completa en <text:a xlink:type="simple" xlink:href="https://www.webreactiva.com/blog/plugins-opencode" text:style-name="Internet_20_link" text:visited-style-name="Visited_20_Internet_20_Link"><text:span text:style-name="T13">los mejores plugins para OpenCode</text:span></text:a>.</text:p>
      <text:p text:style-name="P52">La <text:span text:style-name="Strong_20_Emphasis"><text:span text:style-name="T13">automatización con CI/CD</text:span></text:span> es otro camino interesante. Puedes usar <text:span text:style-name="Source_20_Text"><text:span text:style-name="T13">opencode -p</text:span></text:span> en tus pipelines para generar documentación, hacer revisiones de código automatizadas o analizar cambios antes de mergear.</text:p>
      <text:p text:style-name="P52"><text:soft-page-break/>Y no te olvides de explorar las <text:span text:style-name="Strong_20_Emphasis"><text:span text:style-name="T13">skills existentes</text:span></text:span>. Mira qué hay en <text:span text:style-name="Source_20_Text"><text:span text:style-name="T13">~/.config/opencode/skills/</text:span></text:span> y aprende de cómo están estructuradas. Muchas veces la mejor forma de aprender es viendo ejemplos reales.</text:p>
      <text:p text:style-name="P52">OpenCode es una herramienta que crece contigo. Cuanto más la uses, más patrones descubrirás, más skills crearás, más eficiente serás. El truco está en empezar con lo básico y ir añadiendo complejidad según la necesites.</text:p>
      <text:p text:style-name="Standard"/>
      <text:p text:style-name="Standard"/>
      <text:p text:style-name="P52">Los plugins se cargan desde dos ubicaciones: <text:span text:style-name="Source_20_Text"><text:span text:style-name="T13">.opencode/plugins/</text:span></text:span> para el proyecto local o <text:span text:style-name="Source_20_Text"><text:span text:style-name="T13">~/.config/opencode/plugins/</text:span></text:span> para configuración global. También puedes instalar plugins desde npm con una línea en tu <text:span text:style-name="Source_20_Text"><text:span text:style-name="T13">opencode.json</text:span></text:span>:</text:p>
      <text:p text:style-name="P57"><text:span text:style-name="Source_20_Text"><text:span text:style-name="T13">{</text:span></text:span></text:p>
      <text:p text:style-name="P60"><text:span text:style-name="Source_20_Text"><text:span text:style-name="T13"><text:s text:c="2"/>"$schema": "https://opencode.ai/config.json",</text:span></text:span></text:p>
      <text:p text:style-name="P60"><text:span text:style-name="Source_20_Text"><text:span text:style-name="T13"><text:s text:c="2"/>"plugin": ["opencode-supermemory", "opencode-type-inject"]</text:span></text:span></text:p>
      <text:p text:style-name="P58"><text:span text:style-name="Source_20_Text"><text:span text:style-name="T13">}</text:span></text:span></text:p>
      <text:p text:style-name="P52">OpenCode usa Bun para instalar las dependencias de plugins npm y las cachea en <text:span text:style-name="Source_20_Text"><text:span text:style-name="T13">~/.cache/opencode/node_modules/</text:span></text:span>. Los plugins locales se cargan directamente al arrancar.</text:p>
      <text:p text:style-name="P55">💡 Si vienes de Claude Code, piensa en los plugins de OpenCode como una versión más flexible de los hooks: pueden interceptar lecturas de archivos, modificar comandos bash antes de que se ejecuten, reaccionar a eventos de sesión y hasta inyectar herramientas nuevas al agente.</text:p>
      <text:h text:style-name="P56" text:outline-level="2"><text:bookmark text:name="cuales-son-los-plugins-que-aportan-valor-real"/>¿Cuáles son los plugins que aportan valor real? <text:a xlink:type="simple" xlink:href="https://www.webreactiva.com/blog/plugins-opencode#cuales-son-los-plugins-que-aportan-valor-real" text:style-name="Internet_20_link" text:visited-style-name="Visited_20_Internet_20_Link"><text:span text:style-name="T13">¶</text:span></text:a></text:h>
      <text:p text:style-name="P52">Los plugins con mayor impacto práctico son Context7 (documentación actualizada), opencode-type-inject (tipos TypeScript), opencode-supermemory (memoria persistente), opencode-pty (procesos interactivos) y opencode-vibeguard (redacción de secretos). Son los cinco que cubren los problemas más frecuentes al trabajar con agentes de IA.</text:p>
      <text:p text:style-name="P52">La <text:a xlink:type="simple" xlink:href="https://opencode.ai/docs/ecosystem/" text:style-name="Internet_20_link" text:visited-style-name="Visited_20_Internet_20_Link"><text:span text:style-name="T13">página oficial del ecosistema</text:span></text:a> lista más de 30 plugins comunitarios. Pero no todos están al mismo nivel de madurez, utilidad o mantenimiento. Según datos de la JetBrains Developer Ecosystem Survey, el 59% de los developers que usan herramientas de IA trabajan con tres o más en paralelo. Eso hace que la selección sea crítica: no puedes permitirte instalar plugins que añadan ruido sin aportar valor.</text:p>
      <text:h text:style-name="P61" text:outline-level="3"><text:bookmark text:name="context7-documentacion-actualizada-dentro-del-flujo"/>Context7: documentación actualizada dentro del flujo <text:a xlink:type="simple" xlink:href="https://www.webreactiva.com/blog/plugins-opencode#context7-documentacion-actualizada-dentro-del-flujo" text:style-name="Internet_20_link" text:visited-style-name="Visited_20_Internet_20_Link"><text:span text:style-name="T13">¶</text:span></text:a></text:h>
      <text:p text:style-name="P52">Context7 inyecta documentación actualizada y específica por versión en el contexto del agente, eliminando las alucinaciones causadas por APIs obsoletas. Si tuvieras que instalar un solo complemento, este sería el candidato.</text:p>
      <text:p text:style-name="P52"><text:a xlink:type="simple" xlink:href="https://github.com/upstash/context7" text:style-name="Internet_20_link" text:visited-style-name="Visited_20_Internet_20_Link"><text:soft-page-break/><text:span text:style-name="Strong_20_Emphasis"><text:span text:style-name="T13">Context7</text:span></text:span></text:a> resuelve un problema que cualquier developer reconoce: la IA genera código basándose en documentación que ya no es válida. Según GitHub, solo el 30% del código sugerido por asistentes de IA se acepta tal cual, y una parte relevante de los rechazos se debe a APIs desactualizadas o inexistentes (GitHub Copilot Research, 2025).</text:p>
      <text:p text:style-name="P52">Lo que hace Context7 es alimentar al agente con documentación específica por versión, directa de la fuente oficial. Funciona con OpenCode tanto en modo MCP como en modo CLI + Skills, y la configuración es un único comando:</text:p>
      <text:p text:style-name="P57"><text:span text:style-name="Source_20_Text"><text:span text:style-name="T13"># Instala y configura Context7 para OpenCode</text:span></text:span></text:p>
      <text:p text:style-name="P58"><text:span text:style-name="Source_20_Text"><text:span text:style-name="T13">npx ctx7 setup --opencode</text:span></text:span></text:p>
      <text:p text:style-name="P52">El proyecto está mantenido por Upstash y tiene una comunidad enorme detrás. No estamos hablando de un experimento de fin de semana.</text:p>
      <text:p text:style-name="P52">Imagina que estás montando una app con Next.js 15 y le pides al agente que configure un middleware. Sin Context7, el agente puede generar código basado en la API de Next.js 13 porque es lo que tiene en su entrenamiento. Con Context7, va a buscar la documentación de la versión 15 antes de escribir una línea. Esa diferencia, en proyectos con librerías que cambian rápido (Next.js, Supabase, Hono, Astro), te ahorra horas de debugging contra APIs fantasma.</text:p>
      <text:h text:style-name="P61" text:outline-level="3"><text:bookmark text:name="opencode-type-inject-tipos-de-typescript-inyectados-al-vuelo"/>opencode-type-inject: tipos de TypeScript inyectados al vuelo <text:a xlink:type="simple" xlink:href="https://www.webreactiva.com/blog/plugins-opencode#opencode-type-inject-tipos-de-typescript-inyectados-al-vuelo" text:style-name="Internet_20_link" text:visited-style-name="Visited_20_Internet_20_Link"><text:span text:style-name="T13">¶</text:span></text:a></text:h>
      <text:p text:style-name="P52">Este plugin inyecta firmas de tipos en las lecturas de archivos, reporta type errors en las escrituras y expone herramientas MCP de consulta de tipos. El agente pasa de inventar interfaces a respetar las que ya existen en tu proyecto.</text:p>
      <text:p text:style-name="P52">Si tu stack gira alrededor de TypeScript — y según la Stack Overflow Survey 2025, TypeScript está entre los 5 lenguajes más usados por developers profesionales — <text:a xlink:type="simple" xlink:href="https://github.com/nick-vi/opencode-type-inject" text:style-name="Internet_20_link" text:visited-style-name="Visited_20_Internet_20_Link"><text:span text:style-name="Strong_20_Emphasis"><text:span text:style-name="T13">opencode-type-inject</text:span></text:span></text:a> cambia las reglas del juego.</text:p>
      <text:p text:style-name="P52">Brilla en proyectos con tipos complejos: monorepos con tipos compartidos, APIs con esquemas Zod o TypeBox, aplicaciones con generics anidados. El agente deja de inventar interfaces que no existen y empieza a respetar las que ya has definido. También es útil cuando refactorizas tipos: el plugin le da al agente feedback inmediato de type errors, como tener un compañero que ejecuta <text:span text:style-name="Source_20_Text"><text:span text:style-name="T13">tsc --watch</text:span></text:span> en segundo plano.</text:p>
      <text:h text:style-name="P61" text:outline-level="3"><text:bookmark text:name="opencode-supermemory-memoria-persistente-entre-sesiones"/>opencode-supermemory: memoria persistente entre sesiones <text:a xlink:type="simple" xlink:href="https://www.webreactiva.com/blog/plugins-opencode#opencode-supermemory-memoria-persistente-entre-sesiones" text:style-name="Internet_20_link" text:visited-style-name="Visited_20_Internet_20_Link"><text:span text:style-name="T13">¶</text:span></text:a></text:h>
      <text:p text:style-name="P52">opencode-supermemory guarda preferencias, convenciones y conocimiento del proyecto entre sesiones, indexa la base de código y preserva contexto durante la compactación.</text:p>
      <text:p text:style-name="P52"><text:a xlink:type="simple" xlink:href="https://github.com/supermemoryai/opencode-supermemory" text:style-name="Internet_20_link" text:visited-style-name="Visited_20_Internet_20_Link"><text:span text:style-name="Strong_20_Emphasis"><text:span text:style-name="T13">opencode-supermemory</text:span></text:span></text:a> ataca una de las mayores fuentes de fricción al trabajar con agentes. Según la documentación oficial de OpenCode, la compactación de sesión es uno de los eventos más críticos del ciclo de vida del agente: cuando la ventana de contexto se llena, OpenCode comprime el historial y pierde información de sesiones anteriores. Supermemory preserva ese conocimiento entre sesiones, para que no tengas que repetir las mismas instrucciones cada vez.</text:p>
      <text:p text:style-name="P52">El caso de uso más claro: tienes un proyecto donde el agente necesita saber que usas una estructura de carpetas específica, que los tests van en <text:span text:style-name="Source_20_Text"><text:span text:style-name="T13">__tests__/</text:span></text:span> y no en <text:span text:style-name="Source_20_Text"><text:span text:style-name="T13">test/</text:span></text:span>, que el ORM es Drizzle <text:soft-page-break/>y no Prisma, que los imports son con alias <text:span text:style-name="Source_20_Text"><text:span text:style-name="T13">@/</text:span></text:span>. Sin supermemory, le explicas esto cada sesión. Con supermemory, lo aprende una vez y lo recuerda. También indexa tu codebase para que el agente tenga un mapa del proyecto sin que tengas que señalarle cada archivo relevante.</text:p>
      <text:p text:style-name="P55">⚠️ Un aviso sobre plugins y ventana de contexto: la documentación oficial de OpenCode señala que los MCP meten contexto extra en cada llamada. Plugins como el MCP de GitHub pueden consumir la ventana de contexto con rapidez. Vigila el uso de tokens cuando combines varios plugins.</text:p>
      <text:h text:style-name="P61" text:outline-level="3"><text:bookmark text:name="opencode-pty-procesos-interactivos-bajo-control"/>opencode-pty: procesos interactivos bajo control <text:a xlink:type="simple" xlink:href="https://www.webreactiva.com/blog/plugins-opencode#opencode-pty-procesos-interactivos-bajo-control" text:style-name="Internet_20_link" text:visited-style-name="Visited_20_Internet_20_Link"><text:span text:style-name="T13">¶</text:span></text:a></text:h>
      <text:p text:style-name="P52">opencode-pty añade PTYs persistentes para que el agente gestione procesos que no terminan — servidores de desarrollo, watch modes, REPLs — con lectura de salida en tiempo real, input interactivo y notificaciones.</text:p>
      <text:p text:style-name="P52"><text:a xlink:type="simple" xlink:href="https://github.com/shekohex/opencode-pty" text:style-name="Internet_20_link" text:visited-style-name="Visited_20_Internet_20_Link"><text:span text:style-name="Strong_20_Emphasis"><text:span text:style-name="T13">opencode-pty</text:span></text:span></text:a> resuelve un problema incómodo: OpenCode necesita convivir con procesos que no terminan. Tu <text:span text:style-name="Source_20_Text"><text:span text:style-name="T13">npm run dev</text:span></text:span>, el watch mode de Vite, un túnel de ngrok, un REPL de Python. Según la encuesta de JetBrains Developer Ecosystem 2024, el 68% de los developers usa herramientas de hot-reload o watch mode a diario. Sin un plugin como opencode-pty, el agente pierde el control de esos procesos en cuanto los lanza.</text:p>
      <text:p text:style-name="P52">El escenario típico: estás desarrollando una API y quieres que el agente lance el servidor de desarrollo, haga cambios en el código, compruebe la salida del servidor para ver si hay errores, y siga iterando. Sin opencode-pty, el agente lanza <text:span text:style-name="Source_20_Text"><text:span text:style-name="T13">npm run dev</text:span></text:span> y pierde el control del proceso. Con el plugin, puede leer la salida en tiempo real, enviar señales, reiniciar el proceso y reaccionar a errores sin intervención manual.</text:p>
      <text:h text:style-name="P61" text:outline-level="3"><text:bookmark text:name="opencode-vibeguard-redaccion-de-secretos-antes-de-enviar-al-llm"/>opencode-vibeguard: redacción de secretos antes de enviar al LLM <text:a xlink:type="simple" xlink:href="https://www.webreactiva.com/blog/plugins-opencode#opencode-vibeguard-redaccion-de-secretos-antes-de-enviar-al-llm" text:style-name="Internet_20_link" text:visited-style-name="Visited_20_Internet_20_Link"><text:span text:style-name="T13">¶</text:span></text:a></text:h>
      <text:p text:style-name="P52">opencode-vibeguard intercepta el contexto antes de que llegue al proveedor LLM, redacta valores sensibles (claves API, tokens, credenciales) y los restaura en local para que las herramientas sigan funcionando. Es un proxy de privacidad entre tu código y la nube.</text:p>
      <text:p text:style-name="P52">Si trabajas con variables de entorno, tokens o datos sensibles, <text:a xlink:type="simple" xlink:href="https://github.com/inkdust2021/opencode-vibeguard" text:style-name="Internet_20_link" text:visited-style-name="Visited_20_Internet_20_Link"><text:span text:style-name="Strong_20_Emphasis"><text:span text:style-name="T13">opencode-vibeguard</text:span></text:span></text:a> cubre un riesgo real. Según la Stack Overflow Developer Survey 2025, el 81% de los developers expresa preocupación por la seguridad y privacidad de los datos al usar herramientas de IA. Este plugin aborda esa preocupación sin añadir fricción al flujo de trabajo.</text:p>
      <text:p text:style-name="P52">Lo necesitas cuando tu proyecto tiene archivos <text:span text:style-name="Source_20_Text"><text:span text:style-name="T13">.env</text:span></text:span> con claves de API, tokens de base de datos o secretos de terceros que no quieres que salgan de tu máquina. El agente puede trabajar con esos archivos (leerlos, modificarlos, usar sus valores) pero los secretos reales nunca viajan al proveedor LLM.</text:p>
      <text:h text:style-name="P61" text:outline-level="3"><text:bookmark text:name="otros-plugins-que-merecen-mencion"/>Otros plugins que merecen mención <text:a xlink:type="simple" xlink:href="https://www.webreactiva.com/blog/plugins-opencode#otros-plugins-que-merecen-mencion" text:style-name="Internet_20_link" text:visited-style-name="Visited_20_Internet_20_Link"><text:span text:style-name="T13">¶</text:span></text:a></text:h>
      <table:table table:name="Tabla4" table:style-name="Tabla4">
        <table:table-column table:style-name="Tabla4.A"/>
        <table:table-column table:style-name="Tabla4.B"/>
        <table:table-header-rows>
          <table:table-row>
            <table:table-cell table:style-name="Tabla4.A1" office:value-type="string">
              <text:p text:style-name="P53">Plugin</text:p>
            </table:table-cell>
            <table:table-cell table:style-name="Tabla4.A1" office:value-type="string">
              <text:p text:style-name="P53">Qué hace</text:p>
            </table:table-cell>
          </table:table-row>
        </table:table-header-rows>
        <table:table-row>
          <table:table-cell table:style-name="Tabla4.A1" office:value-type="string">
            <text:p text:style-name="P54"><text:a xlink:type="simple" xlink:href="https://github.com/ghoulr/opencode-websearch-cited" text:style-name="Internet_20_link" text:visited-style-name="Visited_20_Internet_20_Link"><text:span text:style-name="Strong_20_Emphasis"><text:span text:style-name="T13">opencode-websearch-cited</text:span></text:span></text:a></text:p>
          </table:table-cell>
          <table:table-cell table:style-name="Tabla4.A1" office:value-type="string">
            <text:p text:style-name="P54">Búsqueda web nativa con citas inline, útil para research sin montar un MCP externo</text:p>
          </table:table-cell>
        </table:table-row>
        <text:soft-page-break/>
        <table:table-row>
          <table:table-cell table:style-name="Tabla4.A1" office:value-type="string">
            <text:p text:style-name="P54"><text:a xlink:type="simple" xlink:href="https://github.com/Tarquinen/opencode-dynamic-context-pruning" text:style-name="Internet_20_link" text:visited-style-name="Visited_20_Internet_20_Link"><text:span text:style-name="Strong_20_Emphasis"><text:span text:style-name="T13">opencode-dynamic-context-pruning</text:span></text:span></text:a></text:p>
          </table:table-cell>
          <table:table-cell table:style-name="Tabla4.A1" office:value-type="string">
            <text:p text:style-name="P54">Poda de outputs obsoletos para ahorrar tokens en sesiones largas</text:p>
          </table:table-cell>
        </table:table-row>
        <table:table-row>
          <table:table-cell table:style-name="Tabla4.A1" office:value-type="string">
            <text:p text:style-name="P54"><text:a xlink:type="simple" xlink:href="https://github.com/stolinski/opencode-sentry-monitor" text:style-name="Internet_20_link" text:visited-style-name="Visited_20_Internet_20_Link"><text:span text:style-name="Strong_20_Emphasis"><text:span text:style-name="T13">opencode-sentry-monitor</text:span></text:span></text:a></text:p>
          </table:table-cell>
          <table:table-cell table:style-name="Tabla4.A1" office:value-type="string">
            <text:p text:style-name="P54">Trazas de sesión, herramientas y tokens en Sentry, para equipos que quieren observabilidad real</text:p>
          </table:table-cell>
        </table:table-row>
        <table:table-row>
          <table:table-cell table:style-name="Tabla4.A1" office:value-type="string">
            <text:p text:style-name="P54"><text:a xlink:type="simple" xlink:href="https://github.com/JRedeker/opencode-shell-strategy" text:style-name="Internet_20_link" text:visited-style-name="Visited_20_Internet_20_Link"><text:span text:style-name="Strong_20_Emphasis"><text:span text:style-name="T13">opencode-shell-strategy</text:span></text:span></text:a></text:p>
          </table:table-cell>
          <table:table-cell table:style-name="Tabla4.A1" office:value-type="string">
            <text:p text:style-name="P54">Instrucciones para comandos no interactivos que evitan que el agente se quede colgado</text:p>
          </table:table-cell>
        </table:table-row>
        <table:table-row>
          <table:table-cell table:style-name="Tabla4.A1" office:value-type="string">
            <text:p text:style-name="P54"><text:a xlink:type="simple" xlink:href="https://github.com/ramtinJ95/opencode-tokenscope" text:style-name="Internet_20_link" text:visited-style-name="Visited_20_Internet_20_Link"><text:span text:style-name="Strong_20_Emphasis"><text:span text:style-name="T13">opencode-tokenscope</text:span></text:span></text:a></text:p>
          </table:table-cell>
          <table:table-cell table:style-name="Tabla4.A1" office:value-type="string">
            <text:p text:style-name="P54">Análisis detallado del uso de tokens y tracking de costes por sesión</text:p>
          </table:table-cell>
        </table:table-row>
        <table:table-row>
          <table:table-cell table:style-name="Tabla4.A1" office:value-type="string">
            <text:p text:style-name="P54"><text:a xlink:type="simple" xlink:href="https://github.com/lgladysz/opencode-ignore" text:style-name="Internet_20_link" text:visited-style-name="Visited_20_Internet_20_Link"><text:span text:style-name="Strong_20_Emphasis"><text:span text:style-name="T13">opencode-ignore</text:span></text:span></text:a></text:p>
          </table:table-cell>
          <table:table-cell table:style-name="Tabla4.A1" office:value-type="string">
            <text:p text:style-name="P54">Excluye archivos y directorios por patrón para que el agente no los toque</text:p>
          </table:table-cell>
        </table:table-row>
        <table:table-row>
          <table:table-cell table:style-name="Tabla4.A1" office:value-type="string">
            <text:p text:style-name="P54"><text:a xlink:type="simple" xlink:href="https://github.com/simonwjackson/opencode-direnv" text:style-name="Internet_20_link" text:visited-style-name="Visited_20_Internet_20_Link"><text:span text:style-name="Strong_20_Emphasis"><text:span text:style-name="T13">opencode-direnv</text:span></text:span></text:a></text:p>
          </table:table-cell>
          <table:table-cell table:style-name="Tabla4.A1" office:value-type="string">
            <text:p text:style-name="Table_20_Contents">Carga variables de entorno con direnv al iniciar sesión, ideal para usuarios de Nix flakes</text:p>
          </table:table-cell>
        </table:table-row>
      </table:table>
      <text:p text:style-name="P52">No todos necesitan estar en tu configuración desde el día uno, pero es bueno saber que existen cuando el caso de uso aparezc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0T13:58:54.257610900</meta:creation-date>
    <dc:date>2026-05-10T23:30:17.301009200</dc:date>
    <meta:editing-duration>PT2H16M57S</meta:editing-duration>
    <meta:editing-cycles>7</meta:editing-cycles>
    <meta:generator>LibreOffice/26.2.3.2$Windows_X86_64 LibreOffice_project/70e089b17412e4cb7773e41413306b17a2328c34</meta:generator>
    <meta:document-statistic meta:table-count="4" meta:image-count="0" meta:object-count="0" meta:page-count="24" meta:paragraph-count="560" meta:word-count="7060" meta:character-count="45940" meta:non-whitespace-character-count="38957"/>
  </office:meta>
</office:document-meta>
</file>