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Heading_20_1">
      <style:paragraph-properties fo:margin-top="0cm" fo:margin-bottom="0.247cm" style:contextual-spacing="false" fo:line-height="115%"/>
    </style:style>
    <style:style style:name="P6" style:family="paragraph" style:parent-style-name="Heading_20_2">
      <style:paragraph-properties fo:margin-top="0cm" fo:margin-bottom="0.247cm" style:contextual-spacing="false" fo:line-height="115%"/>
    </style:style>
    <style:style style:name="P7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Preformatted_20_Text">
      <style:paragraph-properties fo:margin-top="0cm" fo:margin-bottom="0.247cm" style:contextual-spacing="false" fo:line-height="115%"/>
    </style:style>
    <style:style style:name="P11" style:family="paragraph" style:parent-style-name="Horizontal_20_Line">
      <style:paragraph-properties fo:margin-top="0cm" fo:margin-bottom="0.247cm" style:contextual-spacing="false" fo:line-height="115%"/>
    </style:style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Heading_20_3">
      <style:paragraph-properties fo:margin-top="0cm" fo:margin-bottom="0.247cm" style:contextual-spacing="false" fo:line-height="115%"/>
    </style:style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2">
      <style:paragraph-properties fo:margin-top="0cm" fo:margin-bottom="0cm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3">
      <style:paragraph-properties fo:margin-top="0cm" fo:margin-bottom="0cm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4">
      <style:paragraph-properties fo:margin-top="0cm" fo:margin-bottom="0cm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5">
      <style:paragraph-properties fo:margin-top="0cm" fo:margin-bottom="0cm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6">
      <style:paragraph-properties fo:margin-top="0cm" fo:margin-bottom="0cm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7">
      <style:paragraph-properties fo:margin-top="0cm" fo:margin-bottom="0cm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8">
      <style:paragraph-properties fo:margin-top="0cm" fo:margin-bottom="0cm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9">
      <style:paragraph-properties fo:margin-top="0cm" fo:margin-bottom="0cm" style:contextual-spacing="false"/>
    </style:style>
    <style:style style:name="P42" style:family="paragraph" style:parent-style-name="Text_20_body" style:list-style-name="L19"/>
    <style:style style:name="P43" style:family="paragraph" style:parent-style-name="Standard">
      <style:paragraph-properties fo:margin-left="0cm" fo:margin-right="0cm" fo:text-indent="0cm" style:auto-text-indent="false"/>
      <style:text-properties fo:background-color="#5eb91e"/>
    </style:style>
    <style:style style:name="P44" style:family="paragraph" style:parent-style-name="Standard">
      <style:paragraph-properties fo:margin-left="0cm" fo:margin-right="0cm" fo:text-indent="0cm" style:auto-text-indent="false"/>
    </style:style>
    <style:style style:name="P45" style:family="paragraph" style:parent-style-name="Text_20_body" style:list-style-name="L20">
      <style:paragraph-properties fo:margin-top="0cm" fo:margin-bottom="0cm" style:contextual-spacing="false"/>
    </style:style>
    <style:style style:name="P46" style:family="paragraph" style:parent-style-name="Text_20_body" style:list-style-name="L20"/>
    <style:style style:name="P47" style:family="paragraph" style:parent-style-name="Standard">
      <style:paragraph-properties fo:margin-top="0cm" fo:margin-bottom="0.499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I-LAB Cognitive Runtime</text:h>
      <text:h text:style-name="Heading_20_2" text:outline-level="2">Arquitectura Operacional · Runtime Cognitivo Distribuido · OpenAI-Compatible</text:h>
      <text:p text:style-name="Horizontal_20_Line"/>
      <text:h text:style-name="Heading_20_1" text:outline-level="1">1. VISIÓN GENERAL</text:h>
      <text:p text:style-name="Text_20_body">AI-LAB es una infraestructura cognitiva distribuida diseñada para:</text:p>
      <text:list text:style-name="L1">
        <text:list-item>
          <text:p text:style-name="P1">inferencia local</text:p>
        </text:list-item>
        <text:list-item>
          <text:p text:style-name="P1">coordinación multi-modelo</text:p>
        </text:list-item>
        <text:list-item>
          <text:p text:style-name="P1">routing dinámico</text:p>
        </text:list-item>
        <text:list-item>
          <text:p text:style-name="P1">compatibilidad OpenAI</text:p>
        </text:list-item>
        <text:list-item>
          <text:p text:style-name="P1">observabilidad runtime</text:p>
        </text:list-item>
        <text:list-item>
          <text:p text:style-name="P1">streaming cognitivo</text:p>
        </text:list-item>
        <text:list-item>
          <text:p text:style-name="P1">ejecución distribuida</text:p>
        </text:list-item>
        <text:list-item>
          <text:p text:style-name="P1">futura orquestación multiagente</text:p>
        </text:list-item>
      </text:list>
      <text:p text:style-name="Text_20_body">El sistema opera como una capa runtime intermedia entre:</text:p>
      <text:list text:style-name="L2">
        <text:list-item>
          <text:p text:style-name="P2">clientes OpenAI-compatible</text:p>
        </text:list-item>
        <text:list-item>
          <text:p text:style-name="P2">modelos locales LM Studio</text:p>
        </text:list-item>
        <text:list-item>
          <text:p text:style-name="P2">motores cognitivos</text:p>
        </text:list-item>
        <text:list-item>
          <text:p text:style-name="P2">telemetría</text:p>
        </text:list-item>
        <text:list-item>
          <text:p text:style-name="P2">coordinación distribuida</text:p>
        </text:list-item>
      </text:list>
      <text:p text:style-name="Horizontal_20_Line"/>
      <text:h text:style-name="Heading_20_1" text:outline-level="1">2. OBJETIVOS DEL PROYECTO</text:h>
      <text:h text:style-name="Heading_20_2" text:outline-level="2">Objetivos funcionales</text:h>
      <text:list text:style-name="L3">
        <text:list-item>
          <text:p text:style-name="P3">Crear un runtime IA completamente local</text:p>
        </text:list-item>
        <text:list-item>
          <text:p text:style-name="P3">Mantener compatibilidad OpenAI API</text:p>
        </text:list-item>
        <text:list-item>
          <text:p text:style-name="P3">Permitir streaming SSE real</text:p>
        </text:list-item>
        <text:list-item>
          <text:p text:style-name="P3">Implementar routing cognitivo</text:p>
        </text:list-item>
        <text:list-item>
          <text:p text:style-name="P3">Coordinar múltiples modelos</text:p>
        </text:list-item>
        <text:list-item>
          <text:p text:style-name="P3">Construir una arquitectura observable</text:p>
        </text:list-item>
        <text:list-item>
          <text:p text:style-name="P3"><text:soft-page-break/>Crear una base para agentes distribuidos</text:p>
        </text:list-item>
      </text:list>
      <text:p text:style-name="Horizontal_20_Line"/>
      <text:h text:style-name="Heading_20_1" text:outline-level="1">3. ARQUITECTURA GENERAL</text:h>
      <text:h text:style-name="Heading_20_2" text:outline-level="2">Topología actual</text:h>
      <text:p text:style-name="P4">OpenCode / Clientes<text:line-break/> │<text:line-break/> ▼<text:line-break/>AI-LAB Gateway (8008)<text:line-break/> │<text:line-break/> ▼<text:line-break/>LM Studio Runtime (1234)<text:line-break/> │<text:line-break/> ▼<text:line-break/>Modelos Locales</text:p>
      <text:p text:style-name="Text_20_body"/>
      <text:h text:style-name="P5" text:outline-level="1">4. COMPONENTES PRINCIPALES</text:h>
      <text:h text:style-name="P6" text:outline-level="2">4.1 Gateway Runtime</text:h>
      <text:p text:style-name="Text_20_body">Ruta:</text:p>
      <text:section text:style-name="Sect1" text:name="code-block-viewer">
        <text:p text:style-name="P7"><text:span text:style-name="Source_20_Text">runtime/gateway/openai_gateway.py</text:span></text:p>
      </text:section>
      <text:p text:style-name="Text_20_body">Funciones:</text:p>
      <text:list text:style-name="L4">
        <text:list-item>
          <text:p text:style-name="P8">API OpenAI-compatible </text:p>
        </text:list-item>
        <text:list-item>
          <text:p text:style-name="P8">Streaming SSE </text:p>
        </text:list-item>
        <text:list-item>
          <text:p text:style-name="P8">Routing cognitivo </text:p>
        </text:list-item>
        <text:list-item>
          <text:p text:style-name="P8">Sanitización runtime </text:p>
        </text:list-item>
        <text:list-item>
          <text:p text:style-name="P8">Métricas </text:p>
        </text:list-item>
        <text:list-item>
          <text:p text:style-name="P8">Runtime state </text:p>
        </text:list-item>
        <text:list-item>
          <text:p text:style-name="P9">Integración telemetry </text:p>
        </text:list-item>
      </text:list>
      <text:p text:style-name="Text_20_body">Endpoints actuales:</text:p>
      <text:section text:style-name="Sect1" text:name="Sección1">
        <text:p text:style-name="P7"><text:bookmark text:name="code-block-viewer"/><text:span text:style-name="Source_20_Text">/v1/chat/completions</text:span></text:p>
        <text:p text:style-name="P10"><text:span text:style-name="Source_20_Text">/health</text:span></text:p>
        <text:p text:style-name="P10"><text:span text:style-name="Source_20_Text">/gateway/metrics</text:span></text:p>
        <text:p text:style-name="P10"><text:span text:style-name="Source_20_Text">/runtime/status</text:span></text:p>
        <text:p text:style-name="P10"><text:span text:style-name="Source_20_Text">/runtime/topology</text:span></text:p>
      </text:section>
      <text:p text:style-name="P11"/>
      <text:h text:style-name="P6" text:outline-level="2">4.2 Runtime State Layer</text:h>
      <text:p text:style-name="Text_20_body">Ruta:</text:p>
      <text:section text:style-name="Sect1" text:name="Sección2">
        <text:p text:style-name="P7"><text:bookmark text:name="code-block-viewer Copia 1"/><text:span text:style-name="Source_20_Text">runtime/state/runtime_state.py</text:span></text:p>
      </text:section>
      <text:p text:style-name="Text_20_body"><text:soft-page-break/>Responsabilidades:</text:p>
      <text:list text:style-name="L5">
        <text:list-item>
          <text:p text:style-name="P12">estado runtime </text:p>
        </text:list-item>
        <text:list-item>
          <text:p text:style-name="P12">streams activos </text:p>
        </text:list-item>
        <text:list-item>
          <text:p text:style-name="P12">sesiones </text:p>
        </text:list-item>
        <text:list-item>
          <text:p text:style-name="P12">última ejecución </text:p>
        </text:list-item>
        <text:list-item>
          <text:p text:style-name="P13">último modelo </text:p>
        </text:list-item>
      </text:list>
      <text:p text:style-name="P11"/>
      <text:h text:style-name="P6" text:outline-level="2">4.3 Telemetry Layer</text:h>
      <text:p text:style-name="Text_20_body">Ruta:</text:p>
      <text:section text:style-name="Sect1" text:name="Sección3">
        <text:p text:style-name="P7"><text:bookmark text:name="code-block-viewer Copia 2"/><text:span text:style-name="Source_20_Text">runtime/telemetry/</text:span></text:p>
      </text:section>
      <text:p text:style-name="Text_20_body">Funciones:</text:p>
      <text:list text:style-name="L6">
        <text:list-item>
          <text:p text:style-name="P14">métricas runtime </text:p>
        </text:list-item>
        <text:list-item>
          <text:p text:style-name="P14">latencia </text:p>
        </text:list-item>
        <text:list-item>
          <text:p text:style-name="P14">requests </text:p>
        </text:list-item>
        <text:list-item>
          <text:p text:style-name="P14">streams </text:p>
        </text:list-item>
        <text:list-item>
          <text:p text:style-name="P14">errores </text:p>
        </text:list-item>
        <text:list-item>
          <text:p text:style-name="P15">snapshots runtime </text:p>
        </text:list-item>
      </text:list>
      <text:p text:style-name="P11"/>
      <text:h text:style-name="P6" text:outline-level="2">4.4 Distributed Runtime Layer</text:h>
      <text:p text:style-name="Text_20_body">Ruta:</text:p>
      <text:section text:style-name="Sect1" text:name="Sección4">
        <text:p text:style-name="P7"><text:bookmark text:name="code-block-viewer Copia 3"/><text:span text:style-name="Source_20_Text">runtime/distributed/</text:span></text:p>
      </text:section>
      <text:p text:style-name="Text_20_body">Componentes:</text:p>
      <text:h text:style-name="P16" text:outline-level="3">execution_coordinator.py</text:h>
      <text:p text:style-name="Text_20_body">Coordina ejecuciones runtime.</text:p>
      <text:h text:style-name="P16" text:outline-level="3">runtime_topology.py</text:h>
      <text:p text:style-name="Text_20_body">Mantiene topología operacional.</text:p>
      <text:h text:style-name="P16" text:outline-level="3">runtime_event_bus.py</text:h>
      <text:p text:style-name="Text_20_body">Bus de eventos distribuido.</text:p>
      <text:h text:style-name="P16" text:outline-level="3">agent_registry.py</text:h>
      <text:p text:style-name="Text_20_body">Registro de agentes runtime.</text:p>
      <text:p text:style-name="P11"/>
      <text:h text:style-name="P6" text:outline-level="2">4.5 Memory Layer</text:h>
      <text:p text:style-name="Text_20_body">Ruta:</text:p>
      <text:section text:style-name="Sect1" text:name="Sección5">
        <text:p text:style-name="P7"><text:bookmark text:name="code-block-viewer Copia 4"/><text:span text:style-name="Source_20_Text">runtime/memory/</text:span></text:p>
      </text:section>
      <text:p text:style-name="Text_20_body">Componentes:</text:p>
      <text:h text:style-name="P16" text:outline-level="3"><text:soft-page-break/>runtime_memory.py</text:h>
      <text:p text:style-name="Text_20_body">Persistencia simple runtime.</text:p>
      <text:h text:style-name="P16" text:outline-level="3">cognitive_memory.py</text:h>
      <text:p text:style-name="Text_20_body">Memoria cognitiva namespace-aware.</text:p>
      <text:p text:style-name="P11"/>
      <text:h text:style-name="P6" text:outline-level="2">4.6 Session Layer</text:h>
      <text:p text:style-name="Text_20_body">Ruta:</text:p>
      <text:section text:style-name="Sect1" text:name="Sección6">
        <text:p text:style-name="P7"><text:bookmark text:name="code-block-viewer Copia 5"/><text:span text:style-name="Source_20_Text">runtime/sessions/</text:span></text:p>
      </text:section>
      <text:p text:style-name="Text_20_body">Componentes:</text:p>
      <text:h text:style-name="P16" text:outline-level="3">session_persistence.py</text:h>
      <text:p text:style-name="Text_20_body">Persistencia de sesiones.</text:p>
      <text:h text:style-name="P16" text:outline-level="3">session_replay.py</text:h>
      <text:p text:style-name="Text_20_body">Reconstrucción de sesiones históricas.</text:p>
      <text:p text:style-name="P11"/>
      <text:h text:style-name="P5" text:outline-level="1">5. MODELOS Y ROUTING</text:h>
      <text:h text:style-name="P6" text:outline-level="2">Routing cognitivo</text:h>
      <text:p text:style-name="Text_20_body">Ruta:</text:p>
      <text:section text:style-name="Sect1" text:name="Sección7">
        <text:p text:style-name="P7"><text:bookmark text:name="code-block-viewer Copia 6"/><text:span text:style-name="Source_20_Text">runtime/router/capability_router.py</text:span></text:p>
      </text:section>
      <text:p text:style-name="Text_20_body">Objetivo:</text:p>
      <text:p text:style-name="Text_20_body">Seleccionar automáticamente el modelo más adecuado según:</text:p>
      <text:list text:style-name="L7">
        <text:list-item>
          <text:p text:style-name="P17">reasoning </text:p>
        </text:list-item>
        <text:list-item>
          <text:p text:style-name="P17">coding </text:p>
        </text:list-item>
        <text:list-item>
          <text:p text:style-name="P17">general </text:p>
        </text:list-item>
        <text:list-item>
          <text:p text:style-name="P17">lightweight </text:p>
        </text:list-item>
        <text:list-item>
          <text:p text:style-name="P18">future multi-agent tasks </text:p>
        </text:list-item>
      </text:list>
      <text:p text:style-name="P11"/>
      <text:h text:style-name="P5" text:outline-level="1">6. MÉTRICAS Y OBSERVABILIDAD</text:h>
      <text:h text:style-name="P6" text:outline-level="2">Métricas actuales</text:h>
      <text:list text:style-name="L8">
        <text:list-item>
          <text:p text:style-name="P19">requests totales </text:p>
        </text:list-item>
        <text:list-item>
          <text:p text:style-name="P19">streams activos </text:p>
        </text:list-item>
        <text:list-item>
          <text:p text:style-name="P19">latencia </text:p>
        </text:list-item>
        <text:list-item>
          <text:p text:style-name="P19">errores </text:p>
        </text:list-item>
        <text:list-item>
          <text:p text:style-name="P20">ejecuciones </text:p>
        </text:list-item>
      </text:list>
      <text:p text:style-name="Text_20_body">Endpoint:</text:p>
      <text:section text:style-name="Sect1" text:name="Sección8">
        <text:p text:style-name="P7"><text:bookmark text:name="code-block-viewer Copia 7"/><text:soft-page-break/><text:span text:style-name="Source_20_Text">/gateway/metrics</text:span></text:p>
      </text:section>
      <text:p text:style-name="P11"/>
      <text:h text:style-name="P5" text:outline-level="1">7. STREAMING SSE</text:h>
      <text:p text:style-name="Text_20_body">AI-LAB implementa:</text:p>
      <text:list text:style-name="L9">
        <text:list-item>
          <text:p text:style-name="P21">streaming SSE real </text:p>
        </text:list-item>
        <text:list-item>
          <text:p text:style-name="P21">sanitización runtime </text:p>
        </text:list-item>
        <text:list-item>
          <text:p text:style-name="P21">compatibilidad OpenAI stream chunks </text:p>
        </text:list-item>
        <text:list-item>
          <text:p text:style-name="P22">relay transparente </text:p>
        </text:list-item>
      </text:list>
      <text:p text:style-name="Text_20_body">Ruta:</text:p>
      <text:section text:style-name="Sect1" text:name="Sección9">
        <text:p text:style-name="P7"><text:bookmark text:name="code-block-viewer Copia 8"/><text:span text:style-name="Source_20_Text">runtime/gateway/stream_sanitizer.py</text:span></text:p>
      </text:section>
      <text:p text:style-name="P11"/>
      <text:h text:style-name="P5" text:outline-level="1">8. DOCUMENTACIÓN ASTRO</text:h>
      <text:p text:style-name="Text_20_body">Ruta:</text:p>
      <text:section text:style-name="Sect1" text:name="Sección10">
        <text:p text:style-name="P7"><text:bookmark text:name="code-block-viewer Copia 9"/><text:span text:style-name="Source_20_Text">apps/ialab-docs/</text:span></text:p>
      </text:section>
      <text:p text:style-name="Text_20_body">Incluye:</text:p>
      <text:list text:style-name="L10">
        <text:list-item>
          <text:p text:style-name="P23">docs técnicas </text:p>
        </text:list-item>
        <text:list-item>
          <text:p text:style-name="P23">runbooks </text:p>
        </text:list-item>
        <text:list-item>
          <text:p text:style-name="P23">snapshots históricos </text:p>
        </text:list-item>
        <text:list-item>
          <text:p text:style-name="P23">topología </text:p>
        </text:list-item>
        <text:list-item>
          <text:p text:style-name="P23">observabilidad </text:p>
        </text:list-item>
        <text:list-item>
          <text:p text:style-name="P23">incidentes </text:p>
        </text:list-item>
        <text:list-item>
          <text:p text:style-name="P24">arquitectura </text:p>
        </text:list-item>
      </text:list>
      <text:p text:style-name="P11"/>
      <text:h text:style-name="P5" text:outline-level="1">9. SNAPSHOTS OPERACIONALES</text:h>
      <text:p text:style-name="Text_20_body">Ruta:</text:p>
      <text:section text:style-name="Sect1" text:name="Sección11">
        <text:p text:style-name="P7"><text:bookmark text:name="code-block-viewer Copia 10"/><text:span text:style-name="Source_20_Text">snapshots/</text:span></text:p>
      </text:section>
      <text:p text:style-name="Text_20_body">Objetivo:</text:p>
      <text:list text:style-name="L11">
        <text:list-item>
          <text:p text:style-name="P25">congelar estados estables </text:p>
        </text:list-item>
        <text:list-item>
          <text:p text:style-name="P25">rollback rápido </text:p>
        </text:list-item>
        <text:list-item>
          <text:p text:style-name="P25">auditoría histórica </text:p>
        </text:list-item>
        <text:list-item>
          <text:p text:style-name="P26">recuperación operacional </text:p>
        </text:list-item>
      </text:list>
      <text:p text:style-name="Text_20_body">Snapshots relevantes:</text:p>
      <text:section text:style-name="Sect1" text:name="Sección12">
        <text:p text:style-name="P7"><text:bookmark text:name="code-block-viewer Copia 11"/><text:span text:style-name="Source_20_Text">2026-05-14-realtime-cognitive-runtime-stable</text:span></text:p>
        <text:p text:style-name="P10"><text:span text:style-name="Source_20_Text">2026-05-14-runtime-state-layer</text:span></text:p>
        <text:p text:style-name="P10"><text:span text:style-name="Source_20_Text">2026-05-14-cognitive-memory-layer</text:span></text:p>
      </text:section>
      <text:p text:style-name="P11"/>
      <text:h text:style-name="P5" text:outline-level="1"><text:soft-page-break/>10. OPERACIÓN DIARIA</text:h>
      <text:h text:style-name="P6" text:outline-level="2">Arranque gateway</text:h>
      <text:section text:style-name="Sect1" text:name="Sección13">
        <text:p text:style-name="P7"><text:bookmark text:name="code-block-viewer Copia 12"/><text:span text:style-name="Source_20_Text">cd /opt/ai-lab</text:span></text:p>
        <text:p text:style-name="P10"><text:span text:style-name="Source_20_Text">source .venv/bin/activate</text:span></text:p>
        <text:p text:style-name="P10"><text:span text:style-name="Source_20_Text">export PYTHONPATH=/opt/ai-lab</text:span></text:p>
        <text:p text:style-name="P10"><text:span text:style-name="Source_20_Text">python3 runtime/gateway/openai_gateway.py</text:span></text:p>
      </text:section>
      <text:p text:style-name="P11"/>
      <text:h text:style-name="P6" text:outline-level="2">Test health</text:h>
      <text:section text:style-name="Sect1" text:name="Sección14">
        <text:p text:style-name="P7"><text:bookmark text:name="code-block-viewer Copia 13"/><text:span text:style-name="Source_20_Text">curl http://192.168.1.30:8008/health</text:span></text:p>
      </text:section>
      <text:p text:style-name="P11"/>
      <text:h text:style-name="P6" text:outline-level="2">Test metrics</text:h>
      <text:section text:style-name="Sect1" text:name="Sección15">
        <text:p text:style-name="P7"><text:bookmark text:name="code-block-viewer Copia 14"/><text:span text:style-name="Source_20_Text">curl http://192.168.1.30:8008/gateway/metrics</text:span></text:p>
      </text:section>
      <text:p text:style-name="P11"/>
      <text:h text:style-name="P6" text:outline-level="2">Test runtime status</text:h>
      <text:section text:style-name="Sect1" text:name="Sección16">
        <text:p text:style-name="P7"><text:bookmark text:name="code-block-viewer Copia 15"/><text:span text:style-name="Source_20_Text">curl http://192.168.1.30:8008/runtime/status</text:span></text:p>
      </text:section>
      <text:p text:style-name="P11"/>
      <text:h text:style-name="P6" text:outline-level="2">Test topology</text:h>
      <text:section text:style-name="Sect1" text:name="Sección17">
        <text:p text:style-name="P7"><text:bookmark text:name="code-block-viewer Copia 16"/><text:span text:style-name="Source_20_Text">curl http://192.168.1.30:8008/runtime/topology</text:span></text:p>
      </text:section>
      <text:p text:style-name="P11"/>
      <text:h text:style-name="P5" text:outline-level="1">11. BUILD DOCUMENTACIÓN</text:h>
      <text:h text:style-name="P6" text:outline-level="2">Astro Docs</text:h>
      <text:section text:style-name="Sect1" text:name="Sección18">
        <text:p text:style-name="P7"><text:bookmark text:name="code-block-viewer Copia 17"/><text:span text:style-name="Source_20_Text">cd /opt/ai-lab/apps/ialab-docs</text:span></text:p>
        <text:p text:style-name="P10"><text:span text:style-name="Source_20_Text">npm run build</text:span></text:p>
      </text:section>
      <text:p text:style-name="P11"/>
      <text:h text:style-name="P5" text:outline-level="1">12. RECUPERACIÓN OPERACIONAL</text:h>
      <text:h text:style-name="P6" text:outline-level="2">Restaurar gateway limpio</text:h>
      <text:section text:style-name="Sect1" text:name="Sección19">
        <text:p text:style-name="P7"><text:bookmark text:name="code-block-viewer Copia 18"/><text:span text:style-name="Source_20_Text">cp runtime/gateway/openai_gateway.py.pre-eventbus \</text:span></text:p>
        <text:p text:style-name="P10"><text:span text:style-name="Source_20_Text">runtime/gateway/openai_gateway.py</text:span></text:p>
      </text:section>
      <text:p text:style-name="P11"/>
      <text:h text:style-name="P5" text:outline-level="1">13. ESTADO ACTUAL DEL SISTEMA</text:h>
      <text:h text:style-name="P6" text:outline-level="2">Runtime operativo</text:h>
      <text:p text:style-name="Text_20_body">Estado:</text:p>
      <text:section text:style-name="Sect1" text:name="Sección20">
        <text:p text:style-name="P7"><text:bookmark text:name="code-block-viewer Copia 19"/><text:soft-page-break/><text:span text:style-name="Source_20_Text">ESTABLE</text:span></text:p>
      </text:section>
      <text:p text:style-name="Text_20_body">Capacidades confirmadas:</text:p>
      <text:list text:style-name="L12">
        <text:list-item>
          <text:p text:style-name="P27">OpenAI compatibility </text:p>
        </text:list-item>
        <text:list-item>
          <text:p text:style-name="P27">SSE streaming </text:p>
        </text:list-item>
        <text:list-item>
          <text:p text:style-name="P27">telemetry </text:p>
        </text:list-item>
        <text:list-item>
          <text:p text:style-name="P27">runtime state </text:p>
        </text:list-item>
        <text:list-item>
          <text:p text:style-name="P27">topology API </text:p>
        </text:list-item>
        <text:list-item>
          <text:p text:style-name="P27">distributed execution </text:p>
        </text:list-item>
        <text:list-item>
          <text:p text:style-name="P27">cognitive routing </text:p>
        </text:list-item>
        <text:list-item>
          <text:p text:style-name="P27">session persistence </text:p>
        </text:list-item>
        <text:list-item>
          <text:p text:style-name="P28">snapshot system </text:p>
        </text:list-item>
      </text:list>
      <text:p text:style-name="P11"/>
      <text:h text:style-name="P5" text:outline-level="1">14. PRÓXIMAS FASES</text:h>
      <text:h text:style-name="P6" text:outline-level="2">Runtime v2</text:h>
      <text:p text:style-name="Text_20_body">Objetivos:</text:p>
      <text:h text:style-name="P16" text:outline-level="3">1. Event-driven runtime</text:h>
      <text:p text:style-name="Text_20_body">Integrar:</text:p>
      <text:list text:style-name="L13">
        <text:list-item>
          <text:p text:style-name="P29">runtime_event_bus </text:p>
        </text:list-item>
        <text:list-item>
          <text:p text:style-name="P29">runtime agents </text:p>
        </text:list-item>
        <text:list-item>
          <text:p text:style-name="P30">eventos cognitivos </text:p>
        </text:list-item>
      </text:list>
      <text:p text:style-name="P11"/>
      <text:h text:style-name="P16" text:outline-level="3">2. Multi-agent orchestration</text:h>
      <text:p text:style-name="Text_20_body">Capacidades:</text:p>
      <text:list text:style-name="L14">
        <text:list-item>
          <text:p text:style-name="P31">coordinación agentes </text:p>
        </text:list-item>
        <text:list-item>
          <text:p text:style-name="P31">planificación distribuida </text:p>
        </text:list-item>
        <text:list-item>
          <text:p text:style-name="P32">task delegation </text:p>
        </text:list-item>
      </text:list>
      <text:p text:style-name="P11"/>
      <text:h text:style-name="P16" text:outline-level="3">3. Runtime Dashboard</text:h>
      <text:p text:style-name="Text_20_body">Integrar:</text:p>
      <text:list text:style-name="L15">
        <text:list-item>
          <text:p text:style-name="P33">Grafana </text:p>
        </text:list-item>
        <text:list-item>
          <text:p text:style-name="P33">Prometheus </text:p>
        </text:list-item>
        <text:list-item>
          <text:p text:style-name="P33">topology graph </text:p>
        </text:list-item>
        <text:list-item>
          <text:p text:style-name="P34">live runtime map </text:p>
        </text:list-item>
      </text:list>
      <text:p text:style-name="P11"/>
      <text:h text:style-name="P16" text:outline-level="3">4. Failover multi-model</text:h>
      <text:p text:style-name="Text_20_body">Objetivos:</text:p>
      <text:list text:style-name="L16">
        <text:list-item>
          <text:p text:style-name="P35">fallback automático </text:p>
        </text:list-item>
        <text:list-item>
          <text:p text:style-name="P35"><text:soft-page-break/>selección dinámica </text:p>
        </text:list-item>
        <text:list-item>
          <text:p text:style-name="P36">balanceo cognitivo </text:p>
        </text:list-item>
      </text:list>
      <text:p text:style-name="P11"/>
      <text:h text:style-name="P16" text:outline-level="3">5. Distributed cognition</text:h>
      <text:p text:style-name="Text_20_body">Capacidades futuras:</text:p>
      <text:list text:style-name="L17">
        <text:list-item>
          <text:p text:style-name="P37">swarm intelligence </text:p>
        </text:list-item>
        <text:list-item>
          <text:p text:style-name="P37">shared memory </text:p>
        </text:list-item>
        <text:list-item>
          <text:p text:style-name="P37">runtime mesh </text:p>
        </text:list-item>
        <text:list-item>
          <text:p text:style-name="P38">autonomous orchestration </text:p>
        </text:list-item>
      </text:list>
      <text:p text:style-name="P11"/>
      <text:h text:style-name="P5" text:outline-level="1">15. FILOSOFÍA OPERACIONAL</text:h>
      <text:p text:style-name="Text_20_body">AI-LAB no busca ser únicamente un servidor de modelos.</text:p>
      <text:p text:style-name="Text_20_body">Busca convertirse en:</text:p>
      <text:section text:style-name="Sect1" text:name="Sección21">
        <text:p text:style-name="P7"><text:bookmark text:name="code-block-viewer Copia 20"/><text:span text:style-name="Source_20_Text">Una infraestructura cognitiva distribuida operativa</text:span></text:p>
      </text:section>
      <text:p text:style-name="Text_20_body">Con:</text:p>
      <text:list text:style-name="L18">
        <text:list-item>
          <text:p text:style-name="P39">observabilidad </text:p>
        </text:list-item>
        <text:list-item>
          <text:p text:style-name="P39">persistencia </text:p>
        </text:list-item>
        <text:list-item>
          <text:p text:style-name="P39">coordinación </text:p>
        </text:list-item>
        <text:list-item>
          <text:p text:style-name="P39">razonamiento distribuido </text:p>
        </text:list-item>
        <text:list-item>
          <text:p text:style-name="P39">runtime orchestration </text:p>
        </text:list-item>
        <text:list-item>
          <text:p text:style-name="P40">autonomía progresiva </text:p>
        </text:list-item>
      </text:list>
      <text:p text:style-name="P11"/>
      <text:h text:style-name="P5" text:outline-level="1">16. HITO ACTUAL</text:h>
      <text:h text:style-name="P6" text:outline-level="2">AI-LAB Cognitive Runtime v1</text:h>
      <text:p text:style-name="Text_20_body">Estado alcanzado:</text:p>
      <text:section text:style-name="Sect1" text:name="Sección22">
        <text:p text:style-name="P7"><text:bookmark text:name="code-block-viewer Copia 21"/><text:span text:style-name="Source_20_Text">OPERATIVO</text:span></text:p>
      </text:section>
      <text:p text:style-name="Text_20_body">Fecha:</text:p>
      <text:section text:style-name="Sect1" text:name="Sección23">
        <text:p text:style-name="P7"><text:bookmark text:name="code-block-viewer Copia 22"/><text:span text:style-name="Source_20_Text">14 Mayo 2026</text:span></text:p>
      </text:section>
      <text:p text:style-name="Text_20_body">Capacidades verificadas:</text:p>
      <text:list text:style-name="L19">
        <text:list-item>
          <text:p text:style-name="P41">gateway OpenAI-compatible </text:p>
        </text:list-item>
        <text:list-item>
          <text:p text:style-name="P41">streaming SSE </text:p>
        </text:list-item>
        <text:list-item>
          <text:p text:style-name="P41">telemetry runtime </text:p>
        </text:list-item>
        <text:list-item>
          <text:p text:style-name="P41">runtime state </text:p>
        </text:list-item>
        <text:list-item>
          <text:p text:style-name="P41">topology layer </text:p>
        </text:list-item>
        <text:list-item>
          <text:p text:style-name="P41">memory layer </text:p>
        </text:list-item>
        <text:list-item>
          <text:p text:style-name="P41">distributed execution </text:p>
        </text:list-item>
        <text:list-item>
          <text:p text:style-name="P41">session persistence </text:p>
        </text:list-item>
        <text:list-item>
          <text:p text:style-name="P42"><text:soft-page-break/>Astro operational documentation </text:p>
        </text:list-item>
      </text:list>
      <text:p text:style-name="P11"/>
      <text:section text:style-name="Sect1" text:name="Sección24">
        <text:p text:style-name="P7"><text:bookmark text:name="code-block-viewer Copia 23"/>Y sinceramente: esto ya parece documentación de una plataforma real, no de un homelab improvisado.</text:p>
      </text:section>
      <text:p text:style-name="Text_20_body"/>
      <text:p text:style-name="P43">vale dame comando para arrancar opencode con el gateway activado que hare pruebas esta noche</text:p>
      <text:p text:style-name="P44"/>
      <text:p text:style-name="P44"/>
      <text:section text:style-name="Sect1" text:name="Sección25">
        <text:p text:style-name="P7"><text:bookmark text:name="code-block-viewer Copia 24"/><text:span text:style-name="Source_20_Text">cd /opt/ai-lab</text:span></text:p>
        <text:p text:style-name="P10"><text:span text:style-name="Source_20_Text">source .venv/bin/activate</text:span></text:p>
        <text:p text:style-name="P10"><text:span text:style-name="Source_20_Text">export PYTHONPATH=/opt/ai-lab</text:span></text:p>
        <text:p text:style-name="P10"><text:span text:style-name="Source_20_Text">python3 runtime/gateway/openai_gateway.py</text:span></text:p>
      </text:section>
      <text:p text:style-name="Text_20_body">Déjalo abierto.</text:p>
      <text:p text:style-name="Text_20_body">Cuando veas:</text:p>
      <text:section text:style-name="Sect1" text:name="Sección26">
        <text:p text:style-name="P7"><text:bookmark text:name="code-block-viewer Copia 25"/><text:span text:style-name="Source_20_Text">AI-LAB OPENAI GATEWAY</text:span></text:p>
        <text:p text:style-name="P10"><text:span text:style-name="Source_20_Text">Listening: http://0.0.0.0:8008</text:span></text:p>
        <text:p text:style-name="P10"><text:span text:style-name="Source_20_Text">Backend: http://192.168.1.50:1234/v1</text:span></text:p>
        <text:p text:style-name="P10"><text:span text:style-name="Source_20_Text">Mode: cognitive-runtime</text:span></text:p>
      </text:section>
      <text:p text:style-name="Text_20_body">Abre otra terminal y arranca OpenCode:</text:p>
      <text:section text:style-name="Sect1" text:name="Sección27">
        <text:p text:style-name="P7"><text:bookmark text:name="code-block-viewer Copia 26"/><text:span text:style-name="Source_20_Text">cd /opt/ai-lab/opencode</text:span></text:p>
        <text:p text:style-name="P10"><text:span text:style-name="Source_20_Text">opencode</text:span></text:p>
      </text:section>
      <text:p text:style-name="Text_20_body">Y dentro de OpenCode usa:</text:p>
      <text:section text:style-name="Sect1" text:name="Sección28">
        <text:p text:style-name="P7"><text:bookmark text:name="code-block-viewer Copia 27"/><text:span text:style-name="Source_20_Text">Provider:</text:span></text:p>
        <text:p text:style-name="P10"><text:span text:style-name="Source_20_Text">OpenAI Compatible</text:span></text:p>
      </text:section>
      <text:p text:style-name="Text_20_body">Base URL:</text:p>
      <text:section text:style-name="Sect1" text:name="Sección29">
        <text:p text:style-name="P7"><text:bookmark text:name="code-block-viewer Copia 28"/><text:span text:style-name="Source_20_Text">http://192.168.1.30:8008/v1</text:span></text:p>
      </text:section>
      <text:p text:style-name="Text_20_body">API Key:</text:p>
      <text:section text:style-name="Sect1" text:name="Sección30">
        <text:p text:style-name="P7"><text:bookmark text:name="code-block-viewer Copia 29"/><text:span text:style-name="Source_20_Text">lm-studio</text:span></text:p>
      </text:section>
      <text:p text:style-name="Text_20_body">Modelo:</text:p>
      <text:section text:style-name="Sect1" text:name="Sección31">
        <text:p text:style-name="P7"><text:bookmark text:name="code-block-viewer Copia 30"/><text:span text:style-name="Source_20_Text">qwen3.5-9b-claude-4.6-opus-reasoning-distilled-v2</text:span></text:p>
      </text:section>
      <text:p text:style-name="Text_20_body">Luego prueba algo tipo:</text:p>
      <text:section text:style-name="Sect1" text:name="Sección32">
        <text:p text:style-name="P7"><text:bookmark text:name="code-block-viewer Copia 31"/><text:span text:style-name="Source_20_Text">Describe la arquitectura completa de AI-LAB.</text:span></text:p>
      </text:section>
      <text:p text:style-name="Text_20_body">Y mientras tanto puedes monitorizar el runtime desde otra terminal:</text:p>
      <text:section text:style-name="Sect1" text:name="Sección33">
        <text:p text:style-name="P7"><text:bookmark text:name="code-block-viewer Copia 32"/><text:span text:style-name="Source_20_Text">curl http://192.168.1.30:8008/runtime/status</text:span></text:p>
      </text:section>
      <text:p text:style-name="Text_20_body">o:</text:p>
      <text:section text:style-name="Sect1" text:name="Sección34">
        <text:p text:style-name="P7"><text:bookmark text:name="code-block-viewer Copia 33"/><text:span text:style-name="Source_20_Text">curl http://192.168.1.30:8008/gateway/metrics</text:span></text:p>
      </text:section>
      <text:p text:style-name="Text_20_body"><text:soft-page-break/>Esta noche ya puedes empezar a probar:</text:p>
      <text:list text:style-name="L20">
        <text:list-item>
          <text:p text:style-name="P45">routing cognitivo </text:p>
        </text:list-item>
        <text:list-item>
          <text:p text:style-name="P45">persistencia </text:p>
        </text:list-item>
        <text:list-item>
          <text:p text:style-name="P45">streaming </text:p>
        </text:list-item>
        <text:list-item>
          <text:p text:style-name="P45">telemetría </text:p>
        </text:list-item>
        <text:list-item>
          <text:p text:style-name="P45">coordinación runtime </text:p>
        </text:list-item>
        <text:list-item>
          <text:p text:style-name="P45">sesiones largas </text:p>
        </text:list-item>
        <text:list-item>
          <text:p text:style-name="P45">prompts multi-fase </text:p>
        </text:list-item>
        <text:list-item>
          <text:p text:style-name="P46">generación de documentación automática </text:p>
        </text:list-item>
      </text:list>
      <text:p text:style-name="Text_20_body">Sin tocar LM Studio directamente.</text:p>
      <text:p text:style-name="Text_20_body"/>
      <text:p text:style-name="Text_20_body"/>
      <text:p text:style-name="P47">Pensó durante 4s</text:p>
      <text:p text:style-name="Text_20_body">Usa el comando que <text:span text:style-name="Strong_20_Emphasis">sí funcionó antes</text:span> en tu versión:</text:p>
      <text:section text:style-name="Sect1" text:name="Sección35">
        <text:p text:style-name="P7"><text:bookmark text:name="code-block-viewer Copia 34"/><text:span text:style-name="Source_20_Text">cd /opt/ai-lab</text:span></text:p>
        <text:p text:style-name="P10"><text:span text:style-name="Source_20_Text">opencode web \</text:span></text:p>
        <text:p text:style-name="P10"><text:span text:style-name="Source_20_Text"><text:s text:c="2"/>--hostname 0.0.0.0 \</text:span></text:p>
        <text:p text:style-name="P10"><text:span text:style-name="Source_20_Text"><text:s text:c="2"/>--port 8082 \</text:span></text:p>
        <text:p text:style-name="P10"><text:span text:style-name="Source_20_Text"><text:s text:c="2"/>--print-logs \</text:span></text:p>
        <text:p text:style-name="P10"><text:span text:style-name="Source_20_Text"><text:s text:c="2"/>--log-level INFO</text:span></text:p>
      </text:section>
      <text:p text:style-name="Text_20_body">Luego entra por navegador:</text:p>
      <text:section text:style-name="Sect1" text:name="Sección36">
        <text:p text:style-name="P7"><text:bookmark text:name="code-block-viewer Copia 35"/><text:span text:style-name="Source_20_Text">http://192.168.1.30:8082</text:span></text:p>
      </text:section>
      <text:p text:style-name="Text_20_body">El que te di de <text:span text:style-name="Source_20_Text">opencode serve</text:span> probablemente no existe en tu versión.</text:p>
      <text:p text:style-name="Text_20_body">Si no arranca, comprueba:</text:p>
      <text:section text:style-name="Sect1" text:name="Sección37">
        <text:p text:style-name="P7"><text:bookmark text:name="code-block-viewer Copia 36"/><text:span text:style-name="Source_20_Text">which opencode</text:span></text:p>
        <text:p text:style-name="P10"><text:span text:style-name="Source_20_Text">opencode web --help</text:span></text:p>
      </text:section>
      <text:p text:style-name="Text_20_body">Y si el puerto está ocupado:</text:p>
      <text:section text:style-name="Sect1" text:name="Sección38">
        <text:p text:style-name="P7"><text:bookmark text:name="code-block-viewer Copia 37"/><text:span text:style-name="Source_20_Text">ss -ltnp | grep 8082</text:span></text:p>
      </text:section>
      <text:p text:style-name="Text_20_body">Para matar uno viejo:</text:p>
      <text:section text:style-name="Sect1" text:name="Sección39">
        <text:p text:style-name="P7"><text:bookmark text:name="code-block-viewer Copia 38"/><text:span text:style-name="Source_20_Text">pkill -f opencode</text:span></text:p>
      </text:section>
      <text:p text:style-name="Text_20_body">Y volver a arrancar:</text:p>
      <text:section text:style-name="Sect1" text:name="Sección40">
        <text:p text:style-name="P7"><text:bookmark text:name="code-block-viewer Copia 39"/><text:span text:style-name="Source_20_Text">opencode web \</text:span></text:p>
        <text:p text:style-name="P10"><text:span text:style-name="Source_20_Text"><text:s text:c="2"/>--hostname 0.0.0.0 \</text:span></text:p>
        <text:p text:style-name="P10"><text:span text:style-name="Source_20_Text"><text:s text:c="2"/>--port 8082 \</text:span></text:p>
        <text:p text:style-name="P10"><text:span text:style-name="Source_20_Text"><text:s text:c="2"/>--print-logs \</text:span></text:p>
        <text:p text:style-name="P10"><text:span text:style-name="Source_20_Text"><text:s text:c="2"/>--log-level INFO</text:span></text:p>
      </text:section>
      <text:p text:style-name="Text_20_body"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4T21:19:19.876885700</meta:creation-date>
    <dc:date>2026-05-14T21:39:48.570432200</dc:date>
    <meta:editing-duration>PT15M12S</meta:editing-duration>
    <meta:editing-cycles>3</meta:editing-cycles>
    <meta:generator>LibreOffice/26.2.3.2$Windows_X86_64 LibreOffice_project/70e089b17412e4cb7773e41413306b17a2328c34</meta:generator>
    <meta:document-statistic meta:table-count="0" meta:image-count="0" meta:object-count="0" meta:page-count="11" meta:paragraph-count="303" meta:word-count="863" meta:character-count="6609" meta:non-whitespace-character-count="6056"/>
  </office:meta>
</office:document-meta>
</file>