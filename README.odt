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02674"/>
    </style:style>
    <style:style style:name="P2" style:family="paragraph" style:parent-style-name="Preformatted_20_Text">
      <style:text-properties style:font-name="Liberation Mono" fo:font-size="10pt" officeooo:paragraph-rsid="00102674" style:font-name-asian="NSimSun" style:font-size-asian="10pt" style:font-name-complex="Liberation Mono" style:font-size-complex="10pt"/>
    </style:style>
    <style:style style:name="P3" style:family="paragraph" style:parent-style-name="Heading_20_2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4" style:family="paragraph" style:parent-style-name="Text_20_body">
      <style:text-properties style:font-name="Liberation Mono" fo:font-size="10pt" style:font-name-asian="NSimSun" style:font-size-asian="10pt" style:font-name-complex="Liberation Mono" style:font-size-complex="10pt"/>
    </style:style>
    <style:style style:name="P5" style:family="paragraph" style:parent-style-name="Heading_20_1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7" style:family="paragraph" style:parent-style-name="Text_20_body" style:list-style-name="L1">
      <style:text-properties style:font-name="Liberation Mono" fo:font-size="10pt" style:font-name-asian="NSimSun" style:font-size-asian="10pt" style:font-name-complex="Liberation Mono" style:font-size-complex="10pt"/>
    </style:style>
    <style:style style:name="P8" style:family="paragraph" style:parent-style-name="Horizontal_20_Line">
      <style:paragraph-properties fo:margin-top="0cm" fo:margin-bottom="0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9" style:family="paragraph" style:parent-style-name="Heading_20_3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0" style:family="paragraph" style:parent-style-name="Preformatted_20_Text">
      <style:paragraph-properties fo:margin-left="0cm" fo:margin-right="0cm" fo:text-indent="0cm" style:auto-text-indent="false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4" style:family="paragraph" style:parent-style-name="Text_20_body" style:list-style-name="L2">
      <style:text-properties style:font-name="Liberation Mono" fo:font-size="10pt" style:font-name-asian="NSimSun" style:font-size-asian="10pt" style:font-name-complex="Liberation Mono" style:font-size-complex="10pt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6" style:family="paragraph" style:parent-style-name="Text_20_body" style:list-style-name="L3">
      <style:text-properties style:font-name="Liberation Mono" fo:font-size="10pt" style:font-name-asian="NSimSun" style:font-size-asian="10pt" style:font-name-complex="Liberation Mono" style:font-size-complex="10pt"/>
    </style:style>
    <style:style style:name="P17" style:family="paragraph" style:parent-style-name="Text_20_body" style:list-style-name="L4">
      <style:paragraph-properties fo:margin-top="0cm" fo:margin-bottom="0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8" style:family="paragraph" style:parent-style-name="Text_20_body" style:list-style-name="L4">
      <style:text-properties style:font-name="Liberation Mono" fo:font-size="10pt" style:font-name-asian="NSimSun" style:font-size-asian="10pt" style:font-name-complex="Liberation Mono" style:font-size-complex="10pt"/>
    </style:style>
    <style:style style:name="P19" style:family="paragraph" style:parent-style-name="Text_20_body" style:list-style-name="L5">
      <style:paragraph-properties fo:margin-top="0cm" fo:margin-bottom="0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20" style:family="paragraph" style:parent-style-name="Text_20_body" style:list-style-name="L5">
      <style:text-properties style:font-name="Liberation Mono" fo:font-size="10pt" style:font-name-asian="NSimSun" style:font-size-asian="10pt" style:font-name-complex="Liberation Mono" style:font-size-complex="10pt"/>
    </style:style>
    <style:style style:name="P21" style:family="paragraph" style:parent-style-name="Text_20_body" style:list-style-name="L6">
      <style:paragraph-properties fo:margin-top="0cm" fo:margin-bottom="0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22" style:family="paragraph" style:parent-style-name="Text_20_body" style:list-style-name="L6">
      <style:text-properties style:font-name="Liberation Mono" fo:font-size="10pt" style:font-name-asian="NSimSun" style:font-size-asian="10pt" style:font-name-complex="Liberation Mono" style:font-size-complex="10pt"/>
    </style:style>
    <style:style style:name="P23" style:family="paragraph" style:parent-style-name="Text_20_body" style:list-style-name="L7">
      <style:paragraph-properties fo:margin-top="0cm" fo:margin-bottom="0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24" style:family="paragraph" style:parent-style-name="Text_20_body" style:list-style-name="L7">
      <style:text-properties style:font-name="Liberation Mono" fo:font-size="10pt" style:font-name-asian="NSimSun" style:font-size-asian="10pt" style:font-name-complex="Liberation Mono" style:font-size-complex="10pt"/>
    </style:style>
    <style:style style:name="P25" style:family="paragraph" style:parent-style-name="Text_20_body" style:list-style-name="L8">
      <style:paragraph-properties fo:margin-top="0cm" fo:margin-bottom="0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26" style:family="paragraph" style:parent-style-name="Text_20_body" style:list-style-name="L8">
      <style:text-properties style:font-name="Liberation Mono" fo:font-size="10pt" style:font-name-asian="NSimSun" style:font-size-asian="10pt" style:font-name-complex="Liberation Mono" style:font-size-complex="10pt"/>
    </style:style>
    <style:style style:name="P27" style:family="paragraph" style:parent-style-name="Text_20_body" style:list-style-name="L9">
      <style:paragraph-properties fo:margin-top="0cm" fo:margin-bottom="0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28" style:family="paragraph" style:parent-style-name="Text_20_body" style:list-style-name="L9">
      <style:text-properties style:font-name="Liberation Mono" fo:font-size="10pt" style:font-name-asian="NSimSun" style:font-size-asian="10pt" style:font-name-complex="Liberation Mono" style:font-size-complex="10pt"/>
    </style:style>
    <style:style style:name="P29" style:family="paragraph" style:parent-style-name="Text_20_body" style:list-style-name="L10">
      <style:paragraph-properties fo:margin-top="0cm" fo:margin-bottom="0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30" style:family="paragraph" style:parent-style-name="Text_20_body" style:list-style-name="L10">
      <style:text-properties style:font-name="Liberation Mono" fo:font-size="10pt" style:font-name-asian="NSimSun" style:font-size-asian="10pt" style:font-name-complex="Liberation Mono" style:font-size-complex="10pt"/>
    </style:style>
    <style:style style:name="P31" style:family="paragraph" style:parent-style-name="Text_20_body" style:list-style-name="L11">
      <style:paragraph-properties fo:margin-top="0cm" fo:margin-bottom="0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32" style:family="paragraph" style:parent-style-name="Text_20_body" style:list-style-name="L11">
      <style:text-properties style:font-name="Liberation Mono" fo:font-size="10pt" style:font-name-asian="NSimSun" style:font-size-asian="10pt" style:font-name-complex="Liberation Mono" style:font-size-complex="10pt"/>
    </style:style>
    <style:style style:name="P33" style:family="paragraph" style:parent-style-name="Text_20_body" style:list-style-name="L12">
      <style:paragraph-properties fo:margin-top="0cm" fo:margin-bottom="0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34" style:family="paragraph" style:parent-style-name="Text_20_body" style:list-style-name="L12">
      <style:text-properties style:font-name="Liberation Mono" fo:font-size="10pt" style:font-name-asian="NSimSun" style:font-size-asian="10pt" style:font-name-complex="Liberation Mono" style:font-size-complex="10pt"/>
    </style:style>
    <style:style style:name="P35" style:family="paragraph" style:parent-style-name="Text_20_body" style:list-style-name="L13">
      <style:paragraph-properties fo:margin-top="0cm" fo:margin-bottom="0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36" style:family="paragraph" style:parent-style-name="Text_20_body" style:list-style-name="L13">
      <style:text-properties style:font-name="Liberation Mono" fo:font-size="10pt" style:font-name-asian="NSimSun" style:font-size-asian="10pt" style:font-name-complex="Liberation Mono" style:font-size-complex="10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AI Lab Homelab<text:line-break/><text:line-break/>Laboratorio local de IA para homelab.<text:line-break/><text:line-break/>Componentes previstos:<text:line-break/>- Traefik<text:line-break/>- Ollama<text:line-break/>- Open WebUI<text:line-break/>- Qdrant<text:line-break/>- PostgreSQL<text:line-break/>- Grafana<text:line-break/>- Prometheus<text:line-break/>- Loki<text:line-break/></text:p>
      <text:p text:style-name="P2"/>
      <text:p text:style-name="P2">AI Lab — Arquitectura, Estado Actual y Roadmap Futuro</text:p>
      <text:h text:style-name="P3" text:outline-level="2"/>
      <text:h text:style-name="P3" text:outline-level="2">🎯 Visión del Proyecto</text:h>
      <text:p text:style-name="P4">El objetivo del <text:span text:style-name="Strong_20_Emphasis">AI Lab</text:span> no es simplemente ejecutar modelos LLM locales, sino construir una:</text:p>
      <text:h text:style-name="P5" text:outline-level="1">Plataforma Cognitiva Operacional para Homelab</text:h>
      <text:p text:style-name="P4">Un sistema capaz de:</text:p>
      <text:list text:style-name="L1">
        <text:list-item>
          <text:p text:style-name="P6">ejecutar inferencia IA local; </text:p>
        </text:list-item>
        <text:list-item>
          <text:p text:style-name="P6">mantener memoria operacional; </text:p>
        </text:list-item>
        <text:list-item>
          <text:p text:style-name="P6">razonar sobre infraestructura; </text:p>
        </text:list-item>
        <text:list-item>
          <text:p text:style-name="P6">cargar capacidades dinámicamente; </text:p>
        </text:list-item>
        <text:list-item>
          <text:p text:style-name="P6">automatizar workflows; </text:p>
        </text:list-item>
        <text:list-item>
          <text:p text:style-name="P6">aprender del estado del sistema; </text:p>
        </text:list-item>
        <text:list-item>
          <text:p text:style-name="P7">operar como un “AI Operations Brain”. </text:p>
        </text:list-item>
      </text:list>
      <text:p text:style-name="P8"/>
      <text:h text:style-name="P5" text:outline-level="1"/>
      <text:h text:style-name="P5" text:outline-level="1">🏗️ Arquitectura Actual</text:h>
      <text:h text:style-name="P3" text:outline-level="2">Infraestructura Base</text:h>
      <text:h text:style-name="P9" text:outline-level="3">Host</text:h>
      <text:section text:style-name="Sect1" text:name="code-block-viewer">
        <text:p text:style-name="P10"><text:span text:style-name="Source_20_Text">Windows 11</text:span></text:p>
        <text:p text:style-name="P11"><text:span text:style-name="Source_20_Text">└── Hyper-V</text:span></text:p>
      </text:section>
      <text:h text:style-name="P9" text:outline-level="3">VM Principal</text:h>
      <text:section text:style-name="Sect1" text:name="Sección1">
        <text:p text:style-name="P12"><text:bookmark text:name="code-block-viewer"/><text:span text:style-name="Source_20_Text">Ubuntu Server 24.04 LTS</text:span></text:p>
      </text:section>
      <text:h text:style-name="P9" text:outline-level="3">Virtualización</text:h>
      <text:section text:style-name="Sect1" text:name="Sección2">
        <text:p text:style-name="P12"><text:bookmark text:name="code-block-viewer Copia 1"/><text:span text:style-name="Source_20_Text">Hyper-V VM dedicada</text:span></text:p>
      </text:section>
      <text:p text:style-name="P8"/>
      <text:h text:style-name="P5" text:outline-level="1"><text:soft-page-break/>🐳 Stack Base Docker</text:h>
      <text:h text:style-name="P3" text:outline-level="2">Reverse Proxy</text:h>
      <text:h text:style-name="P9" text:outline-level="3">Traefik</text:h>
      <text:p text:style-name="P4">Funciones:</text:p>
      <text:list text:style-name="L2">
        <text:list-item>
          <text:p text:style-name="P13">reverse proxy central; </text:p>
        </text:list-item>
        <text:list-item>
          <text:p text:style-name="P13">routing dinámico; </text:p>
        </text:list-item>
        <text:list-item>
          <text:p text:style-name="P13">dashboard; </text:p>
        </text:list-item>
        <text:list-item>
          <text:p text:style-name="P13">futura terminación TLS; </text:p>
        </text:list-item>
        <text:list-item>
          <text:p text:style-name="P14">integración Docker labels. </text:p>
        </text:list-item>
      </text:list>
      <text:p text:style-name="P4">Endpoints futuros:</text:p>
      <text:section text:style-name="Sect1" text:name="Sección3">
        <text:p text:style-name="P10"><text:bookmark text:name="code-block-viewer Copia 2"/><text:span text:style-name="Source_20_Text">openwebui.local</text:span></text:p>
        <text:p text:style-name="Preformatted_20_Text"><text:span text:style-name="Source_20_Text">grafana.local</text:span></text:p>
        <text:p text:style-name="Preformatted_20_Text"><text:span text:style-name="Source_20_Text">qdrant.local</text:span></text:p>
        <text:p text:style-name="P11"><text:span text:style-name="Source_20_Text">portainer.local</text:span></text:p>
      </text:section>
      <text:p text:style-name="P8"/>
      <text:h text:style-name="P3" text:outline-level="2">Gestión Docker</text:h>
      <text:h text:style-name="P9" text:outline-level="3">Portainer</text:h>
      <text:p text:style-name="P4">Funciones:</text:p>
      <text:list text:style-name="L3">
        <text:list-item>
          <text:p text:style-name="P15">gestión visual; </text:p>
        </text:list-item>
        <text:list-item>
          <text:p text:style-name="P15">logs; </text:p>
        </text:list-item>
        <text:list-item>
          <text:p text:style-name="P15">stacks; </text:p>
        </text:list-item>
        <text:list-item>
          <text:p text:style-name="P15">redes; </text:p>
        </text:list-item>
        <text:list-item>
          <text:p text:style-name="P15">debugging; </text:p>
        </text:list-item>
        <text:list-item>
          <text:p text:style-name="P16">administración de contenedores. </text:p>
        </text:list-item>
      </text:list>
      <text:p text:style-name="P8"/>
      <text:h text:style-name="P5" text:outline-level="1">🤖 Stack IA Actual</text:h>
      <text:h text:style-name="P3" text:outline-level="2">Open WebUI</text:h>
      <text:p text:style-name="P4">Rol:</text:p>
      <text:section text:style-name="Sect1" text:name="Sección4">
        <text:p text:style-name="P12"><text:bookmark text:name="code-block-viewer Copia 3"/><text:span text:style-name="Source_20_Text">Frontend unificado IA</text:span></text:p>
      </text:section>
      <text:p text:style-name="P4">Funciones:</text:p>
      <text:list text:style-name="L4">
        <text:list-item>
          <text:p text:style-name="P17">interfaz chat; </text:p>
        </text:list-item>
        <text:list-item>
          <text:p text:style-name="P17">multi-model; </text:p>
        </text:list-item>
        <text:list-item>
          <text:p text:style-name="P17">conexiones API; </text:p>
        </text:list-item>
        <text:list-item>
          <text:p text:style-name="P17">futura knowledge base; </text:p>
        </text:list-item>
        <text:list-item>
          <text:p text:style-name="P18">futura integración RAG. </text:p>
        </text:list-item>
      </text:list>
      <text:p text:style-name="P8"/>
      <text:h text:style-name="P3" text:outline-level="2">Ollama</text:h>
      <text:p text:style-name="P4">Rol:</text:p>
      <text:section text:style-name="Sect1" text:name="Sección5">
        <text:p text:style-name="P12"><text:bookmark text:name="code-block-viewer Copia 4"/><text:span text:style-name="Source_20_Text">Motor local de inferencia CPU</text:span></text:p>
      </text:section>
      <text:p text:style-name="P4">Uso:</text:p>
      <text:list text:style-name="L5">
        <text:list-item>
          <text:p text:style-name="P19"><text:soft-page-break/>modelos ligeros; </text:p>
        </text:list-item>
        <text:list-item>
          <text:p text:style-name="P19">embeddings; </text:p>
        </text:list-item>
        <text:list-item>
          <text:p text:style-name="P19">inferencia persistente; </text:p>
        </text:list-item>
        <text:list-item>
          <text:p text:style-name="P20">automatización. </text:p>
        </text:list-item>
      </text:list>
      <text:p text:style-name="P4">Modelos previstos:</text:p>
      <text:section text:style-name="Sect1" text:name="Sección6">
        <text:p text:style-name="P10"><text:bookmark text:name="code-block-viewer Copia 5"/><text:span text:style-name="Source_20_Text">qwen2.5</text:span></text:p>
        <text:p text:style-name="Preformatted_20_Text"><text:span text:style-name="Source_20_Text">mistral</text:span></text:p>
        <text:p text:style-name="Preformatted_20_Text"><text:span text:style-name="Source_20_Text">deepseek-coder</text:span></text:p>
        <text:p text:style-name="P11"><text:span text:style-name="Source_20_Text">llama3</text:span></text:p>
      </text:section>
      <text:p text:style-name="P8"/>
      <text:h text:style-name="P3" text:outline-level="2">LM Studio</text:h>
      <text:p text:style-name="P4">Rol:</text:p>
      <text:section text:style-name="Sect1" text:name="Sección7">
        <text:p text:style-name="P12"><text:bookmark text:name="code-block-viewer Copia 6"/><text:span text:style-name="Source_20_Text">Motor GPU externo</text:span></text:p>
      </text:section>
      <text:p text:style-name="P4">Arquitectura:</text:p>
      <text:section text:style-name="Sect1" text:name="Sección8">
        <text:p text:style-name="P10"><text:bookmark text:name="code-block-viewer Copia 7"/><text:span text:style-name="Source_20_Text">Windows GPU Workstation</text:span></text:p>
        <text:p text:style-name="P11"><text:span text:style-name="Source_20_Text">└── OpenAI-compatible API</text:span></text:p>
      </text:section>
      <text:p text:style-name="P4">Integración:</text:p>
      <text:section text:style-name="Sect1" text:name="Sección9">
        <text:p text:style-name="P10"><text:bookmark text:name="code-block-viewer Copia 8"/><text:span text:style-name="Source_20_Text">Open WebUI</text:span></text:p>
        <text:p text:style-name="P11"><text:span text:style-name="Source_20_Text">→ LM Studio API</text:span></text:p>
      </text:section>
      <text:p text:style-name="P8"/>
      <text:h text:style-name="P5" text:outline-level="1">💾 Arquitectura de Storage</text:h>
      <text:h text:style-name="P3" text:outline-level="2">Sistema</text:h>
      <text:section text:style-name="Sect1" text:name="Sección10">
        <text:p text:style-name="P12"><text:bookmark text:name="code-block-viewer Copia 9"/><text:span text:style-name="Source_20_Text">LVM</text:span></text:p>
      </text:section>
      <text:p text:style-name="P4">Distribución:</text:p>
      <text:section text:style-name="Sect1" text:name="Sección11">
        <text:p text:style-name="P10"><text:bookmark text:name="code-block-viewer Copia 10"/><text:span text:style-name="Source_20_Text">ubuntu-lv <text:s text:c="4"/>→ sistema operativo</text:span></text:p>
        <text:p text:style-name="P11"><text:span text:style-name="Source_20_Text">ai-models LV <text:s/>→ modelos IA</text:span></text:p>
      </text:section>
      <text:p text:style-name="P8"/>
      <text:h text:style-name="P3" text:outline-level="2">Volumen IA</text:h>
      <text:section text:style-name="Sect1" text:name="Sección12">
        <text:p text:style-name="P12"><text:bookmark text:name="code-block-viewer Copia 11"/><text:span text:style-name="Source_20_Text">/mnt/ai-models</text:span></text:p>
      </text:section>
      <text:p text:style-name="P4">Uso:</text:p>
      <text:list text:style-name="L6">
        <text:list-item>
          <text:p text:style-name="P21">modelos Ollama; </text:p>
        </text:list-item>
        <text:list-item>
          <text:p text:style-name="P21">embeddings; </text:p>
        </text:list-item>
        <text:list-item>
          <text:p text:style-name="P21">futuros datasets; </text:p>
        </text:list-item>
        <text:list-item>
          <text:p text:style-name="P22">memoria persistente. </text:p>
        </text:list-item>
      </text:list>
      <text:p text:style-name="P8"/>
      <text:h text:style-name="P5" text:outline-level="1">🌐 Acceso y Gestión</text:h>
      <text:h text:style-name="P3" text:outline-level="2">SSH</text:h>
      <text:p text:style-name="P4">Administración principal.</text:p>
      <text:p text:style-name="P8"/>
      <text:h text:style-name="P3" text:outline-level="2"><text:soft-page-break/>SMB</text:h>
      <text:p text:style-name="P4">Share Windows:</text:p>
      <text:section text:style-name="Sect1" text:name="Sección13">
        <text:p text:style-name="P12"><text:bookmark text:name="code-block-viewer Copia 12"/><text:span text:style-name="Source_20_Text">\\192.168.1.30\ai-lab</text:span></text:p>
      </text:section>
      <text:p text:style-name="P4">Permite:</text:p>
      <text:list text:style-name="L7">
        <text:list-item>
          <text:p text:style-name="P23">edición desde VSCode; </text:p>
        </text:list-item>
        <text:list-item>
          <text:p text:style-name="P23">gestión de compose; </text:p>
        </text:list-item>
        <text:list-item>
          <text:p text:style-name="P23">workflows; </text:p>
        </text:list-item>
        <text:list-item>
          <text:p text:style-name="P23">skills; </text:p>
        </text:list-item>
        <text:list-item>
          <text:p text:style-name="P24">runtime. </text:p>
        </text:list-item>
      </text:list>
      <text:p text:style-name="P8"/>
      <text:h text:style-name="P5" text:outline-level="1">📦 Git Infrastructure</text:h>
      <text:p text:style-name="P4">Repositorio:</text:p>
      <text:section text:style-name="Sect1" text:name="Sección14">
        <text:p text:style-name="P12"><text:bookmark text:name="code-block-viewer Copia 13"/><text:span text:style-name="Source_20_Text">/opt/ai-lab</text:span></text:p>
      </text:section>
      <text:p text:style-name="P4">Contiene:</text:p>
      <text:section text:style-name="Sect1" text:name="Sección15">
        <text:p text:style-name="P10"><text:bookmark text:name="code-block-viewer Copia 14"/><text:span text:style-name="Source_20_Text">docker stacks</text:span></text:p>
        <text:p text:style-name="Preformatted_20_Text"><text:span text:style-name="Source_20_Text">configs</text:span></text:p>
        <text:p text:style-name="Preformatted_20_Text"><text:span text:style-name="Source_20_Text">runtime cognitivo</text:span></text:p>
        <text:p text:style-name="Preformatted_20_Text"><text:span text:style-name="Source_20_Text">skills</text:span></text:p>
        <text:p text:style-name="P11"><text:span text:style-name="Source_20_Text">workflows</text:span></text:p>
      </text:section>
      <text:p text:style-name="P4">Excluye:</text:p>
      <text:section text:style-name="Sect1" text:name="Sección16">
        <text:p text:style-name="P10"><text:bookmark text:name="code-block-viewer Copia 15"/><text:span text:style-name="Source_20_Text">data/</text:span></text:p>
        <text:p text:style-name="Preformatted_20_Text"><text:span text:style-name="Source_20_Text">logs/</text:span></text:p>
        <text:p text:style-name="Preformatted_20_Text"><text:span text:style-name="Source_20_Text">modelos/</text:span></text:p>
        <text:p text:style-name="P11"><text:span text:style-name="Source_20_Text">runtime artifacts</text:span></text:p>
      </text:section>
      <text:p text:style-name="P8"/>
      <text:h text:style-name="P5" text:outline-level="1">🧠 Arquitectura Cognitiva</text:h>
      <text:h text:style-name="P3" text:outline-level="2">Runtime <text:span text:style-name="Source_20_Text">.agent</text:span></text:h>
      <text:p text:style-name="P4">Tu <text:span text:style-name="Source_20_Text">.agent</text:span> ya constituye una:</text:p>
      <text:h text:style-name="P5" text:outline-level="1">Arquitectura Cognitiva Modular</text:h>
      <text:p text:style-name="P8"/>
      <text:h text:style-name="P3" text:outline-level="2">Estructura Actual</text:h>
      <text:section text:style-name="Sect1" text:name="Sección17">
        <text:p text:style-name="P10"><text:bookmark text:name="code-block-viewer Copia 16"/><text:span text:style-name="Source_20_Text">.agent/</text:span></text:p>
        <text:p text:style-name="Preformatted_20_Text"><text:span text:style-name="Source_20_Text">├── agents/</text:span></text:p>
        <text:p text:style-name="Preformatted_20_Text"><text:span text:style-name="Source_20_Text">├── skills/</text:span></text:p>
        <text:p text:style-name="Preformatted_20_Text"><text:span text:style-name="Source_20_Text">├── workflows/</text:span></text:p>
        <text:p text:style-name="Preformatted_20_Text"><text:span text:style-name="Source_20_Text">├── rules/</text:span></text:p>
        <text:p text:style-name="Preformatted_20_Text"><text:span text:style-name="Source_20_Text">├── scripts/</text:span></text:p>
        <text:p text:style-name="P11"><text:span text:style-name="Source_20_Text">└── ARCHITECTURE.md</text:span></text:p>
      </text:section>
      <text:p text:style-name="P8"/>
      <text:h text:style-name="P5" text:outline-level="1">🤖 Agents</text:h>
      <text:p text:style-name="P4">Especialistas cognitivos:</text:p>
      <text:section text:style-name="Sect1" text:name="Sección18">
        <text:p text:style-name="P10"><text:bookmark text:name="code-block-viewer Copia 17"/><text:span text:style-name="Source_20_Text">backend-specialist</text:span></text:p>
        <text:p text:style-name="Preformatted_20_Text"><text:soft-page-break/><text:span text:style-name="Source_20_Text">frontend-specialist</text:span></text:p>
        <text:p text:style-name="Preformatted_20_Text"><text:span text:style-name="Source_20_Text">debugger</text:span></text:p>
        <text:p text:style-name="Preformatted_20_Text"><text:span text:style-name="Source_20_Text">security-auditor</text:span></text:p>
        <text:p text:style-name="Preformatted_20_Text"><text:span text:style-name="Source_20_Text">devops-engineer</text:span></text:p>
        <text:p text:style-name="Preformatted_20_Text"><text:span text:style-name="Source_20_Text">orchestrator</text:span></text:p>
        <text:p text:style-name="P11"><text:span text:style-name="Source_20_Text">...</text:span></text:p>
      </text:section>
      <text:p text:style-name="P4">Responsabilidad:</text:p>
      <text:list text:style-name="L8">
        <text:list-item>
          <text:p text:style-name="P25">razonamiento especializado; </text:p>
        </text:list-item>
        <text:list-item>
          <text:p text:style-name="P25">identidad operacional; </text:p>
        </text:list-item>
        <text:list-item>
          <text:p text:style-name="P26">coordinación multiagente futura. </text:p>
        </text:list-item>
      </text:list>
      <text:p text:style-name="P8"/>
      <text:h text:style-name="P5" text:outline-level="1">🧩 Skills</text:h>
      <text:p text:style-name="P4">Capacidades modulares cargables dinámicamente.</text:p>
      <text:p text:style-name="P4">Ejemplos:</text:p>
      <text:section text:style-name="Sect1" text:name="Sección19">
        <text:p text:style-name="P10"><text:bookmark text:name="code-block-viewer Copia 18"/><text:span text:style-name="Source_20_Text">docker-expert</text:span></text:p>
        <text:p text:style-name="Preformatted_20_Text"><text:span text:style-name="Source_20_Text">systematic-debugging</text:span></text:p>
        <text:p text:style-name="Preformatted_20_Text"><text:span text:style-name="Source_20_Text">deployment-procedures</text:span></text:p>
        <text:p text:style-name="Preformatted_20_Text"><text:span text:style-name="Source_20_Text">bash-linux</text:span></text:p>
        <text:p text:style-name="Preformatted_20_Text"><text:span text:style-name="Source_20_Text">database-design</text:span></text:p>
        <text:p text:style-name="P11"><text:span text:style-name="Source_20_Text">performance-profiling</text:span></text:p>
      </text:section>
      <text:p text:style-name="P4">Objetivo futuro:</text:p>
      <text:section text:style-name="Sect1" text:name="Sección20">
        <text:p text:style-name="P12"><text:bookmark text:name="code-block-viewer Copia 19"/><text:span text:style-name="Source_20_Text">semantic skill loading</text:span></text:p>
      </text:section>
      <text:p text:style-name="P8"/>
      <text:h text:style-name="P5" text:outline-level="1">🔄 Workflows</text:h>
      <text:p text:style-name="P4">Procesos ejecutables.</text:p>
      <text:p text:style-name="P4">Ejemplos:</text:p>
      <text:section text:style-name="Sect1" text:name="Sección21">
        <text:p text:style-name="P10"><text:bookmark text:name="code-block-viewer Copia 20"/><text:span text:style-name="Source_20_Text">/debug</text:span></text:p>
        <text:p text:style-name="Preformatted_20_Text"><text:span text:style-name="Source_20_Text">/deploy</text:span></text:p>
        <text:p text:style-name="Preformatted_20_Text"><text:span text:style-name="Source_20_Text">/orchestrate</text:span></text:p>
        <text:p text:style-name="Preformatted_20_Text"><text:span text:style-name="Source_20_Text">/test</text:span></text:p>
        <text:p text:style-name="P11"><text:span text:style-name="Source_20_Text">/plan</text:span></text:p>
      </text:section>
      <text:p text:style-name="P8"/>
      <text:h text:style-name="P5" text:outline-level="1">📜 Rules</text:h>
      <text:p text:style-name="P4">Gobernanza global:</text:p>
      <text:section text:style-name="Sect1" text:name="Sección22">
        <text:p text:style-name="P12"><text:bookmark text:name="code-block-viewer Copia 21"/><text:span text:style-name="Source_20_Text">GEMINI.md</text:span></text:p>
      </text:section>
      <text:p text:style-name="P4">Funciones:</text:p>
      <text:list text:style-name="L9">
        <text:list-item>
          <text:p text:style-name="P27">restricciones; </text:p>
        </text:list-item>
        <text:list-item>
          <text:p text:style-name="P27">políticas; </text:p>
        </text:list-item>
        <text:list-item>
          <text:p text:style-name="P27">alignment; </text:p>
        </text:list-item>
        <text:list-item>
          <text:p text:style-name="P28">comportamiento persistente. </text:p>
        </text:list-item>
      </text:list>
      <text:p text:style-name="P8"/>
      <text:h text:style-name="P5" text:outline-level="1">🧠 Estado Cognitivo Actual</text:h>
      <text:p text:style-name="P4">Actualmente:</text:p>
      <text:section text:style-name="Sect1" text:name="Sección23">
        <text:p text:style-name="P12"><text:bookmark text:name="code-block-viewer Copia 22"/><text:soft-page-break/><text:span text:style-name="Source_20_Text">.agent = knowledge layer</text:span></text:p>
      </text:section>
      <text:p text:style-name="P4">Todavía NO:</text:p>
      <text:list text:style-name="L10">
        <text:list-item>
          <text:p text:style-name="P29">routing dinámico; </text:p>
        </text:list-item>
        <text:list-item>
          <text:p text:style-name="P29">selección automática; </text:p>
        </text:list-item>
        <text:list-item>
          <text:p text:style-name="P29">ejecución multiagente; </text:p>
        </text:list-item>
        <text:list-item>
          <text:p text:style-name="P30">orchestration runtime. </text:p>
        </text:list-item>
      </text:list>
      <text:p text:style-name="P8"/>
      <text:h text:style-name="P5" text:outline-level="1">🚀 Roadmap Futuro</text:h>
      <text:h text:style-name="P5" text:outline-level="1">FASE 1 — Consolidación (Actual)</text:h>
      <text:p text:style-name="P4">✅ VM Ubuntu<text:line-break/>✅ Docker<text:line-break/>✅ Traefik<text:line-break/>✅ Portainer<text:line-break/>✅ Open WebUI<text:line-break/>✅ Ollama<text:line-break/>✅ LM Studio Integration<text:line-break/>✅ SMB<text:line-break/>✅ Git<text:line-break/>✅ LVM IA<text:line-break/>✅ Runtime <text:span text:style-name="Source_20_Text">.agent</text:span></text:p>
      <text:p text:style-name="P8"/>
      <text:h text:style-name="P5" text:outline-level="1">FASE 2 — Knowledge &amp; RAG</text:h>
      <text:h text:style-name="P3" text:outline-level="2">Objetivo</text:h>
      <text:p text:style-name="P4">Convertir <text:span text:style-name="Source_20_Text">.agent</text:span> en conocimiento semántico vivo.</text:p>
      <text:p text:style-name="P8"/>
      <text:h text:style-name="P3" text:outline-level="2">Componentes</text:h>
      <text:h text:style-name="P9" text:outline-level="3">Qdrant</text:h>
      <text:p text:style-name="P4">Rol:</text:p>
      <text:section text:style-name="Sect1" text:name="Sección24">
        <text:p text:style-name="P12"><text:bookmark text:name="code-block-viewer Copia 23"/><text:span text:style-name="Source_20_Text">Vector Database</text:span></text:p>
      </text:section>
      <text:p text:style-name="P4">Funciones:</text:p>
      <text:list text:style-name="L11">
        <text:list-item>
          <text:p text:style-name="P31">embeddings; </text:p>
        </text:list-item>
        <text:list-item>
          <text:p text:style-name="P31">búsqueda semántica; </text:p>
        </text:list-item>
        <text:list-item>
          <text:p text:style-name="P32">memoria contextual. </text:p>
        </text:list-item>
      </text:list>
      <text:p text:style-name="P8"/>
      <text:h text:style-name="P3" text:outline-level="2">Embeddings</text:h>
      <text:p text:style-name="P4">Modelo previsto:</text:p>
      <text:section text:style-name="Sect1" text:name="Sección25">
        <text:p text:style-name="P12"><text:bookmark text:name="code-block-viewer Copia 24"/><text:span text:style-name="Source_20_Text">nomic-embed-text-v1.5</text:span></text:p>
      </text:section>
      <text:p text:style-name="P8"/>
      <text:h text:style-name="P3" text:outline-level="2">Flujo</text:h>
      <text:section text:style-name="Sect1" text:name="Sección26">
        <text:p text:style-name="P10"><text:bookmark text:name="code-block-viewer Copia 25"/><text:span text:style-name="Source_20_Text">User Prompt</text:span></text:p>
        <text:p text:style-name="Preformatted_20_Text"><text:span text:style-name="Source_20_Text"><text:s text:c="4"/>↓</text:span></text:p>
        <text:p text:style-name="Preformatted_20_Text"><text:span text:style-name="Source_20_Text">Embedding</text:span></text:p>
        <text:p text:style-name="Preformatted_20_Text"><text:soft-page-break/><text:span text:style-name="Source_20_Text"><text:s text:c="4"/>↓</text:span></text:p>
        <text:p text:style-name="Preformatted_20_Text"><text:span text:style-name="Source_20_Text">Vector Search</text:span></text:p>
        <text:p text:style-name="Preformatted_20_Text"><text:span text:style-name="Source_20_Text"><text:s text:c="4"/>↓</text:span></text:p>
        <text:p text:style-name="Preformatted_20_Text"><text:span text:style-name="Source_20_Text">Relevant Skills</text:span></text:p>
        <text:p text:style-name="Preformatted_20_Text"><text:span text:style-name="Source_20_Text"><text:s text:c="4"/>↓</text:span></text:p>
        <text:p text:style-name="Preformatted_20_Text"><text:span text:style-name="Source_20_Text">Prompt Augmentation</text:span></text:p>
        <text:p text:style-name="Preformatted_20_Text"><text:span text:style-name="Source_20_Text"><text:s text:c="4"/>↓</text:span></text:p>
        <text:p text:style-name="P11"><text:span text:style-name="Source_20_Text">LLM</text:span></text:p>
      </text:section>
      <text:p text:style-name="P8"/>
      <text:h text:style-name="P5" text:outline-level="1">FASE 3 — Agent Runtime</text:h>
      <text:h text:style-name="P3" text:outline-level="2">Objetivo</text:h>
      <text:p text:style-name="P4">Crear runtime cognitivo real.</text:p>
      <text:p text:style-name="P8"/>
      <text:h text:style-name="P3" text:outline-level="2">Arquitectura prevista</text:h>
      <text:section text:style-name="Sect1" text:name="Sección27">
        <text:p text:style-name="P10"><text:bookmark text:name="code-block-viewer Copia 26"/><text:span text:style-name="Source_20_Text">Open WebUI</text:span></text:p>
        <text:p text:style-name="Preformatted_20_Text"><text:span text:style-name="Source_20_Text"><text:s text:c="4"/>↓</text:span></text:p>
        <text:p text:style-name="Preformatted_20_Text"><text:span text:style-name="Source_20_Text">Agent Runtime API</text:span></text:p>
        <text:p text:style-name="Preformatted_20_Text"><text:span text:style-name="Source_20_Text"><text:s text:c="4"/>↓</text:span></text:p>
        <text:p text:style-name="Preformatted_20_Text"><text:span text:style-name="Source_20_Text">Semantic Router</text:span></text:p>
        <text:p text:style-name="Preformatted_20_Text"><text:span text:style-name="Source_20_Text"><text:s text:c="4"/>↓</text:span></text:p>
        <text:p text:style-name="Preformatted_20_Text"><text:span text:style-name="Source_20_Text">Workflow Engine</text:span></text:p>
        <text:p text:style-name="Preformatted_20_Text"><text:span text:style-name="Source_20_Text"><text:s text:c="4"/>↓</text:span></text:p>
        <text:p text:style-name="P11"><text:span text:style-name="Source_20_Text">LLM Backend</text:span></text:p>
      </text:section>
      <text:p text:style-name="P8"/>
      <text:h text:style-name="P3" text:outline-level="2">Nuevos módulos</text:h>
      <text:section text:style-name="Sect1" text:name="Sección28">
        <text:p text:style-name="P10"><text:bookmark text:name="code-block-viewer Copia 27"/><text:span text:style-name="Source_20_Text">runtime/</text:span></text:p>
        <text:p text:style-name="Preformatted_20_Text"><text:span text:style-name="Source_20_Text">├── router.py</text:span></text:p>
        <text:p text:style-name="Preformatted_20_Text"><text:span text:style-name="Source_20_Text">├── orchestrator.py</text:span></text:p>
        <text:p text:style-name="Preformatted_20_Text"><text:span text:style-name="Source_20_Text">├── workflow_engine.py</text:span></text:p>
        <text:p text:style-name="Preformatted_20_Text"><text:span text:style-name="Source_20_Text">├── loader.py</text:span></text:p>
        <text:p text:style-name="Preformatted_20_Text"><text:span text:style-name="Source_20_Text">├── embeddings.py</text:span></text:p>
        <text:p text:style-name="P11"><text:span text:style-name="Source_20_Text">└── memory.py</text:span></text:p>
      </text:section>
      <text:p text:style-name="P8"/>
      <text:h text:style-name="P5" text:outline-level="1">FASE 4 — Observabilidad</text:h>
      <text:h text:style-name="P3" text:outline-level="2">Stack previsto</text:h>
      <text:section text:style-name="Sect1" text:name="Sección29">
        <text:p text:style-name="P10"><text:bookmark text:name="code-block-viewer Copia 28"/><text:span text:style-name="Source_20_Text">Prometheus</text:span></text:p>
        <text:p text:style-name="Preformatted_20_Text"><text:span text:style-name="Source_20_Text">Grafana</text:span></text:p>
        <text:p text:style-name="Preformatted_20_Text"><text:span text:style-name="Source_20_Text">Loki</text:span></text:p>
        <text:p text:style-name="Preformatted_20_Text"><text:span text:style-name="Source_20_Text">Promtail</text:span></text:p>
        <text:p text:style-name="Preformatted_20_Text"><text:span text:style-name="Source_20_Text">Node Exporter</text:span></text:p>
        <text:p text:style-name="P11"><text:span text:style-name="Source_20_Text">cAdvisor</text:span></text:p>
      </text:section>
      <text:p text:style-name="P8"/>
      <text:h text:style-name="P3" text:outline-level="2">Objetivo</text:h>
      <text:p text:style-name="P4">Permitir:</text:p>
      <text:list text:style-name="L12">
        <text:list-item>
          <text:p text:style-name="P33">análisis histórico; </text:p>
        </text:list-item>
        <text:list-item>
          <text:p text:style-name="P33">correlación eventos; </text:p>
        </text:list-item>
        <text:list-item>
          <text:p text:style-name="P33">reasoning operacional; </text:p>
        </text:list-item>
        <text:list-item>
          <text:p text:style-name="P34">detección anomalías. </text:p>
        </text:list-item>
      </text:list>
      <text:p text:style-name="P8"><text:soft-page-break/></text:p>
      <text:h text:style-name="P5" text:outline-level="1">FASE 5 — Knowledge Graph</text:h>
      <text:h text:style-name="P3" text:outline-level="2">Objetivo</text:h>
      <text:p text:style-name="P4">Memoria relacional persistente.</text:p>
      <text:p text:style-name="P8"/>
      <text:h text:style-name="P3" text:outline-level="2">Tecnología prevista</text:h>
      <text:section text:style-name="Sect1" text:name="Sección30">
        <text:p text:style-name="P12"><text:bookmark text:name="code-block-viewer Copia 29"/><text:span text:style-name="Source_20_Text">Neo4j</text:span></text:p>
      </text:section>
      <text:p text:style-name="P8"/>
      <text:h text:style-name="P3" text:outline-level="2">Ejemplo</text:h>
      <text:section text:style-name="Sect1" text:name="Sección31">
        <text:p text:style-name="P10"><text:bookmark text:name="code-block-viewer Copia 30"/><text:span text:style-name="Source_20_Text">Traefik</text:span></text:p>
        <text:p text:style-name="Preformatted_20_Text"><text:span text:style-name="Source_20_Text"><text:s/>├── USES_PORT → 443</text:span></text:p>
        <text:p text:style-name="Preformatted_20_Text"><text:span text:style-name="Source_20_Text"><text:s/>├── DEPENDS_ON → docker network</text:span></text:p>
        <text:p text:style-name="P11"><text:span text:style-name="Source_20_Text"><text:s/>└── EXPOSES → Open WebUI</text:span></text:p>
      </text:section>
      <text:p text:style-name="P8"/>
      <text:h text:style-name="P5" text:outline-level="1">FASE 6 — MCP Integration</text:h>
      <text:h text:style-name="P3" text:outline-level="2">Objetivo</text:h>
      <text:p text:style-name="P4">Dar herramientas reales al runtime.</text:p>
      <text:p text:style-name="P8"/>
      <text:h text:style-name="P3" text:outline-level="2">Herramientas futuras</text:h>
      <text:section text:style-name="Sect1" text:name="Sección32">
        <text:p text:style-name="P10"><text:bookmark text:name="code-block-viewer Copia 31"/><text:span text:style-name="Source_20_Text">filesystem</text:span></text:p>
        <text:p text:style-name="Preformatted_20_Text"><text:span text:style-name="Source_20_Text">docker</text:span></text:p>
        <text:p text:style-name="Preformatted_20_Text"><text:span text:style-name="Source_20_Text">git</text:span></text:p>
        <text:p text:style-name="Preformatted_20_Text"><text:span text:style-name="Source_20_Text">grafana</text:span></text:p>
        <text:p text:style-name="Preformatted_20_Text"><text:span text:style-name="Source_20_Text">prometheus</text:span></text:p>
        <text:p text:style-name="Preformatted_20_Text"><text:span text:style-name="Source_20_Text">shell</text:span></text:p>
        <text:p text:style-name="Preformatted_20_Text"><text:span text:style-name="Source_20_Text">browser automation</text:span></text:p>
        <text:p text:style-name="P11"><text:span text:style-name="Source_20_Text">proxmox</text:span></text:p>
      </text:section>
      <text:p text:style-name="P8"/>
      <text:h text:style-name="P5" text:outline-level="1">FASE 7 — Multi-Agent Orchestration</text:h>
      <text:h text:style-name="P3" text:outline-level="2">Objetivo</text:h>
      <text:p text:style-name="P4">Coordinación real entre agentes especializados.</text:p>
      <text:p text:style-name="P8"/>
      <text:h text:style-name="P3" text:outline-level="2">Ejemplo</text:h>
      <text:section text:style-name="Sect1" text:name="Sección33">
        <text:p text:style-name="P10"><text:bookmark text:name="code-block-viewer Copia 32"/><text:span text:style-name="Source_20_Text">planner-agent</text:span></text:p>
        <text:p text:style-name="Preformatted_20_Text"><text:span text:style-name="Source_20_Text"><text:s text:c="4"/>↓</text:span></text:p>
        <text:p text:style-name="Preformatted_20_Text"><text:span text:style-name="Source_20_Text">devops-agent</text:span></text:p>
        <text:p text:style-name="Preformatted_20_Text"><text:span text:style-name="Source_20_Text"><text:s text:c="4"/>↓</text:span></text:p>
        <text:p text:style-name="Preformatted_20_Text"><text:span text:style-name="Source_20_Text">security-agent</text:span></text:p>
        <text:p text:style-name="Preformatted_20_Text"><text:span text:style-name="Source_20_Text"><text:s text:c="4"/>↓</text:span></text:p>
        <text:p text:style-name="Preformatted_20_Text"><text:span text:style-name="Source_20_Text">testing-agent</text:span></text:p>
        <text:p text:style-name="Preformatted_20_Text"><text:span text:style-name="Source_20_Text"><text:s text:c="4"/>↓</text:span></text:p>
        <text:p text:style-name="P11"><text:span text:style-name="Source_20_Text">documentation-agent</text:span></text:p>
      </text:section>
      <text:p text:style-name="P8"/>
      <text:h text:style-name="P5" text:outline-level="1"><text:soft-page-break/>🎯 Objetivo Final</text:h>
      <text:p text:style-name="P4">Construir una:</text:p>
      <text:h text:style-name="P5" text:outline-level="1">Plataforma Cognitiva Operacional Local</text:h>
      <text:p text:style-name="P4">capaz de:</text:p>
      <text:list text:style-name="L13">
        <text:list-item>
          <text:p text:style-name="P35">razonar sobre infraestructura; </text:p>
        </text:list-item>
        <text:list-item>
          <text:p text:style-name="P35">cargar capacidades dinámicamente; </text:p>
        </text:list-item>
        <text:list-item>
          <text:p text:style-name="P35">mantener memoria persistente; </text:p>
        </text:list-item>
        <text:list-item>
          <text:p text:style-name="P35">ejecutar workflows; </text:p>
        </text:list-item>
        <text:list-item>
          <text:p text:style-name="P35">automatizar operaciones; </text:p>
        </text:list-item>
        <text:list-item>
          <text:p text:style-name="P35">aprender del estado del sistema; </text:p>
        </text:list-item>
        <text:list-item>
          <text:p text:style-name="P36">operar como un “AI Operations Brain”. </text:p>
        </text:list-item>
      </text:list>
      <text:p text:style-name="P8"/>
      <text:h text:style-name="P5" text:outline-level="1">🧭 Filosofía del Proyecto</text:h>
      <text:h text:style-name="P3" text:outline-level="2">Principios</text:h>
      <text:h text:style-name="P9" text:outline-level="3">Modularidad</text:h>
      <text:p text:style-name="P4">Separar:</text:p>
      <text:section text:style-name="Sect1" text:name="Sección34">
        <text:p text:style-name="P10"><text:bookmark text:name="code-block-viewer Copia 33"/><text:span text:style-name="Source_20_Text">knowledge</text:span></text:p>
        <text:p text:style-name="Preformatted_20_Text"><text:span text:style-name="Source_20_Text">behavior</text:span></text:p>
        <text:p text:style-name="Preformatted_20_Text"><text:span text:style-name="Source_20_Text">execution</text:span></text:p>
        <text:p text:style-name="Preformatted_20_Text"><text:span text:style-name="Source_20_Text">policy</text:span></text:p>
        <text:p text:style-name="Preformatted_20_Text"><text:span text:style-name="Source_20_Text">memory</text:span></text:p>
        <text:p text:style-name="P11"><text:span text:style-name="Source_20_Text">workflow</text:span></text:p>
      </text:section>
      <text:p text:style-name="P8"/>
      <text:h text:style-name="P9" text:outline-level="3">Local First</text:h>
      <text:p text:style-name="P4">Todo ejecutado:</text:p>
      <text:section text:style-name="Sect1" text:name="Sección35">
        <text:p text:style-name="P10"><text:bookmark text:name="code-block-viewer Copia 34"/><text:span text:style-name="Source_20_Text">local</text:span></text:p>
        <text:p text:style-name="Preformatted_20_Text"><text:span text:style-name="Source_20_Text">private</text:span></text:p>
        <text:p text:style-name="P11"><text:span text:style-name="Source_20_Text">self-hosted</text:span></text:p>
      </text:section>
      <text:p text:style-name="P8"/>
      <text:h text:style-name="P9" text:outline-level="3">Incremental Growth</text:h>
      <text:p text:style-name="P4">Construir por capas:</text:p>
      <text:section text:style-name="Sect1" text:name="Sección36">
        <text:p text:style-name="P10"><text:bookmark text:name="code-block-viewer Copia 35"/><text:span text:style-name="Source_20_Text">infraestructura</text:span></text:p>
        <text:p text:style-name="Preformatted_20_Text"><text:span text:style-name="Source_20_Text">→ conocimiento</text:span></text:p>
        <text:p text:style-name="Preformatted_20_Text"><text:span text:style-name="Source_20_Text">→ memoria</text:span></text:p>
        <text:p text:style-name="Preformatted_20_Text"><text:span text:style-name="Source_20_Text">→ runtime</text:span></text:p>
        <text:p text:style-name="Preformatted_20_Text"><text:span text:style-name="Source_20_Text">→ automatización</text:span></text:p>
        <text:p text:style-name="P11"><text:span text:style-name="Source_20_Text">→ inteligencia operacional</text:span></text:p>
      </text:section>
      <text:p text:style-name="P8"/>
      <text:h text:style-name="P5" text:outline-level="1">📌 Estado Actual del Proyecto</text:h>
      <text:h text:style-name="P3" text:outline-level="2">Nivel actual</text:h>
      <text:section text:style-name="Sect1" text:name="Sección37">
        <text:p text:style-name="P12"><text:bookmark text:name="code-block-viewer Copia 36"/><text:span text:style-name="Source_20_Text">AI Infrastructure Foundation</text:span></text:p>
      </text:section>
      <text:h text:style-name="P3" text:outline-level="2"><text:soft-page-break/>Próximo gran salto</text:h>
      <text:section text:style-name="Sect1" text:name="Sección38">
        <text:p text:style-name="P12"><text:bookmark text:name="code-block-viewer Copia 37"/><text:span text:style-name="Source_20_Text">Semantic Knowledge + Agent Runtime</text:span></text:p>
      </text:section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5-09T13:46:40.412845200</dc:date>
    <meta:editing-duration>PT2M19S</meta:editing-duration>
    <meta:editing-cycles>1</meta:editing-cycles>
    <meta:generator>LibreOffice/25.8.5.2$Windows_X86_64 LibreOffice_project/9c8b85f387cc00a89945a79c9e6239f32e450ac2</meta:generator>
    <meta:document-statistic meta:table-count="0" meta:image-count="0" meta:object-count="0" meta:page-count="10" meta:paragraph-count="314" meta:word-count="744" meta:character-count="5241" meta:non-whitespace-character-count="4740"/>
  </office:meta>
</office:document-meta>
</file>